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31cm"/>
    </style:style>
    <style:style style:name="co2" style:family="table-column">
      <style:table-column-properties fo:break-before="auto" style:column-width="3.831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6.992cm"/>
    </style:style>
    <style:style style:name="co6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3.972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7.049cm"/>
    </style:style>
    <style:style style:name="co10" style:family="table-column">
      <style:table-column-properties fo:break-before="auto" style:column-width="4.203cm"/>
    </style:style>
    <style:style style:name="co11" style:family="table-column">
      <style:table-column-properties fo:break-before="auto" style:column-width="3.16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RANSACTIONS">
      <style:table-properties table:display="true" style:writing-mode="lr-tb"/>
    </style:style>
    <style:style style:name="ta2" style:family="table" style:master-page-name="PageStyle_5f_ACCOUNTS">
      <style:table-properties table:display="true" style:writing-mode="lr-tb"/>
    </style:style>
    <style:style style:name="ta3" style:family="table" style:master-page-name="PageStyle_5f_PROFILE_5f_GROUP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8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AC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/>
        <table:table-row table:style-name="ro1">
          <table:table-cell table:style-name="ce1" office:value-type="string" calcext:value-type="string">
            <text:p>TRANSACTION_NUMBER</text:p>
          </table:table-cell>
          <table:table-cell table:style-name="ce1" office:value-type="string" calcext:value-type="string">
            <text:p>TRANSACTION_DATE</text:p>
          </table:table-cell>
          <table:table-cell table:style-name="ce1" office:value-type="string" calcext:value-type="string">
            <text:p>DEBIT_CREDIT</text:p>
          </table:table-cell>
          <table:table-cell table:style-name="ce1" office:value-type="string" calcext:value-type="string">
            <text:p>TRANSACTION_AMOUNT</text:p>
          </table:table-cell>
          <table:table-cell table:style-name="ce1" office:value-type="string" calcext:value-type="string">
            <text:p>TRANSACTION_ACCOUNT_NUMBER</text:p>
          </table:table-cell>
          <table:table-cell table:style-name="ce1" table:number-columns-repeated="16379"/>
        </table:table-row>
        <table:table-row table:style-name="ro1">
          <table:table-cell office:value-type="float" office:value="205906841" calcext:value-type="float">
            <text:p>205906841</text:p>
          </table:table-cell>
          <table:table-cell table:style-name="ce3" office:value-type="date" office:date-value="2023-12-30" calcext:value-type="date">
            <text:p>30/12/202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E7BF71DED9F59E55628202867442736</text:p>
          </table:table-cell>
          <table:table-cell table:style-name="ce2" table:number-columns-repeated="16379"/>
        </table:table-row>
        <table:table-row table:style-name="ro1">
          <table:table-cell office:value-type="float" office:value="205735087" calcext:value-type="float">
            <text:p>205735087</text:p>
          </table:table-cell>
          <table:table-cell table:style-name="ce3" office:value-type="date" office:date-value="2023-12-29" calcext:value-type="date">
            <text:p>29/12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36867B1DC4F68B5D5F91B3FAB34A6C</text:p>
          </table:table-cell>
          <table:table-cell table:style-name="ce2" table:number-columns-repeated="16379"/>
        </table:table-row>
        <table:table-row table:style-name="ro1">
          <table:table-cell office:value-type="float" office:value="205576482" calcext:value-type="float">
            <text:p>205576482</text:p>
          </table:table-cell>
          <table:table-cell table:style-name="ce3" office:value-type="date" office:date-value="2023-12-28" calcext:value-type="date">
            <text:p>28/12/2023</text:p>
          </table:table-cell>
          <table:table-cell office:value-type="string" calcext:value-type="string">
            <text:p>D</text:p>
          </table:table-cell>
          <table:table-cell office:value-type="float" office:value="93120.93" calcext:value-type="float">
            <text:p>93120.93</text:p>
          </table:table-cell>
          <table:table-cell office:value-type="string" calcext:value-type="string">
            <text:p>EF85CCC5C665E360E043CBD70E3C6621</text:p>
          </table:table-cell>
          <table:table-cell table:style-name="ce2" table:number-columns-repeated="16379"/>
        </table:table-row>
        <table:table-row table:style-name="ro1">
          <table:table-cell office:value-type="float" office:value="205555349" calcext:value-type="float">
            <text:p>205555349</text:p>
          </table:table-cell>
          <table:table-cell table:style-name="ce3" office:value-type="date" office:date-value="2023-12-27" calcext:value-type="date">
            <text:p>27/12/2023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6E21A450A7D0B419C0586772129F8E81</text:p>
          </table:table-cell>
          <table:table-cell table:style-name="ce2" table:number-columns-repeated="16379"/>
        </table:table-row>
        <table:table-row table:style-name="ro1">
          <table:table-cell office:value-type="float" office:value="205379894" calcext:value-type="float">
            <text:p>205379894</text:p>
          </table:table-cell>
          <table:table-cell table:style-name="ce3" office:value-type="date" office:date-value="2023-12-26" calcext:value-type="date">
            <text:p>26/12/2023</text:p>
          </table:table-cell>
          <table:table-cell office:value-type="string" calcext:value-type="string">
            <text:p>D</text:p>
          </table:table-cell>
          <table:table-cell office:value-type="float" office:value="12155.55" calcext:value-type="float">
            <text:p>12155.55</text:p>
          </table:table-cell>
          <table:table-cell office:value-type="string" calcext:value-type="string">
            <text:p>DF2D375FB009AE73A3FD509F541BDC45</text:p>
          </table:table-cell>
          <table:table-cell table:style-name="ce2" table:number-columns-repeated="16379"/>
        </table:table-row>
        <table:table-row table:style-name="ro1">
          <table:table-cell office:value-type="float" office:value="205288197" calcext:value-type="float">
            <text:p>205288197</text:p>
          </table:table-cell>
          <table:table-cell table:style-name="ce3" office:value-type="date" office:date-value="2023-12-23" calcext:value-type="date">
            <text:p>23/12/2023</text:p>
          </table:table-cell>
          <table:table-cell office:value-type="string" calcext:value-type="string">
            <text:p>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F63AF4A875D76FCA16AB494EE747DD8A</text:p>
          </table:table-cell>
          <table:table-cell table:style-name="ce2" table:number-columns-repeated="16379"/>
        </table:table-row>
        <table:table-row table:style-name="ro1">
          <table:table-cell office:value-type="float" office:value="205105757" calcext:value-type="float">
            <text:p>205105757</text:p>
          </table:table-cell>
          <table:table-cell table:style-name="ce3" office:value-type="date" office:date-value="2023-12-22" calcext:value-type="date">
            <text:p>22/12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4D0A7CF41CC516B51F625DCBA7762C</text:p>
          </table:table-cell>
          <table:table-cell table:style-name="ce2" table:number-columns-repeated="16379"/>
        </table:table-row>
        <table:table-row table:style-name="ro1">
          <table:table-cell office:value-type="float" office:value="204941004" calcext:value-type="float">
            <text:p>204941004</text:p>
          </table:table-cell>
          <table:table-cell table:style-name="ce3" office:value-type="date" office:date-value="2023-12-21" calcext:value-type="date">
            <text:p>21/12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52A72291AEB88BEDDEAFFEFB417289</text:p>
          </table:table-cell>
          <table:table-cell table:style-name="ce2" table:number-columns-repeated="16379"/>
        </table:table-row>
        <table:table-row table:style-name="ro1">
          <table:table-cell office:value-type="float" office:value="204793978" calcext:value-type="float">
            <text:p>204793978</text:p>
          </table:table-cell>
          <table:table-cell table:style-name="ce3" office:value-type="date" office:date-value="2023-12-20" calcext:value-type="date">
            <text:p>20/12/2023</text:p>
          </table:table-cell>
          <table:table-cell office:value-type="string" calcext:value-type="string">
            <text:p>D</text:p>
          </table:table-cell>
          <table:table-cell office:value-type="float" office:value="17643.61" calcext:value-type="float">
            <text:p>17643.61</text:p>
          </table:table-cell>
          <table:table-cell office:value-type="string" calcext:value-type="string">
            <text:p>71622720375753A730EADF3111615665</text:p>
          </table:table-cell>
          <table:table-cell table:style-name="ce2" table:number-columns-repeated="16379"/>
        </table:table-row>
        <table:table-row table:style-name="ro1">
          <table:table-cell office:value-type="float" office:value="204660127" calcext:value-type="float">
            <text:p>204660127</text:p>
          </table:table-cell>
          <table:table-cell table:style-name="ce3" office:value-type="date" office:date-value="2023-12-19" calcext:value-type="date">
            <text:p>19/12/2023</text:p>
          </table:table-cell>
          <table:table-cell office:value-type="string" calcext:value-type="string">
            <text:p>D</text:p>
          </table:table-cell>
          <table:table-cell office:value-type="float" office:value="95605.04" calcext:value-type="float">
            <text:p>95605.04</text:p>
          </table:table-cell>
          <table:table-cell office:value-type="string" calcext:value-type="string">
            <text:p>A7F176C40CA1D7E4C1A3635643505591</text:p>
          </table:table-cell>
          <table:table-cell table:style-name="ce2" table:number-columns-repeated="16379"/>
        </table:table-row>
        <table:table-row table:style-name="ro1">
          <table:table-cell office:value-type="float" office:value="204508646" calcext:value-type="float">
            <text:p>204508646</text:p>
          </table:table-cell>
          <table:table-cell table:style-name="ce3" office:value-type="date" office:date-value="2023-12-17" calcext:value-type="date">
            <text:p>17/12/2023</text:p>
          </table:table-cell>
          <table:table-cell office:value-type="string" calcext:value-type="string">
            <text:p>D</text:p>
          </table:table-cell>
          <table:table-cell office:value-type="float" office:value="16074.11" calcext:value-type="float">
            <text:p>16074.11</text:p>
          </table:table-cell>
          <table:table-cell office:value-type="string" calcext:value-type="string">
            <text:p>AC238DD1CCA81B0EC136BA2949600064</text:p>
          </table:table-cell>
          <table:table-cell table:style-name="ce2" table:number-columns-repeated="16379"/>
        </table:table-row>
        <table:table-row table:style-name="ro1">
          <table:table-cell office:value-type="float" office:value="204399638" calcext:value-type="float">
            <text:p>204399638</text:p>
          </table:table-cell>
          <table:table-cell table:style-name="ce3" office:value-type="date" office:date-value="2023-12-16" calcext:value-type="date">
            <text:p>16/12/2023</text:p>
          </table:table-cell>
          <table:table-cell office:value-type="string" calcext:value-type="string">
            <text:p>D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BAAD3983BBDC40D33C6EA29F7B3C5028</text:p>
          </table:table-cell>
          <table:table-cell table:style-name="ce2" table:number-columns-repeated="16379"/>
        </table:table-row>
        <table:table-row table:style-name="ro1">
          <table:table-cell office:value-type="float" office:value="204218757" calcext:value-type="float">
            <text:p>204218757</text:p>
          </table:table-cell>
          <table:table-cell table:style-name="ce3" office:value-type="date" office:date-value="2023-12-15" calcext:value-type="date">
            <text:p>15/12/2023</text:p>
          </table:table-cell>
          <table:table-cell office:value-type="string" calcext:value-type="string">
            <text:p>D</text:p>
          </table:table-cell>
          <table:table-cell office:value-type="float" office:value="144974.69" calcext:value-type="float">
            <text:p>144974.69</text:p>
          </table:table-cell>
          <table:table-cell office:value-type="string" calcext:value-type="string">
            <text:p>DBC08F4CF441263CA1CA4093CC0FA125</text:p>
          </table:table-cell>
          <table:table-cell table:style-name="ce2" table:number-columns-repeated="16379"/>
        </table:table-row>
        <table:table-row table:style-name="ro1">
          <table:table-cell office:value-type="float" office:value="204040580" calcext:value-type="float">
            <text:p>204040580</text:p>
          </table:table-cell>
          <table:table-cell table:style-name="ce3" office:value-type="date" office:date-value="2023-12-14" calcext:value-type="date">
            <text:p>14/12/2023</text:p>
          </table:table-cell>
          <table:table-cell office:value-type="string" calcext:value-type="string">
            <text:p>D</text:p>
          </table:table-cell>
          <table:table-cell office:value-type="float" office:value="17750" calcext:value-type="float">
            <text:p>17750</text:p>
          </table:table-cell>
          <table:table-cell office:value-type="string" calcext:value-type="string">
            <text:p>FFADCE73241A40BDFB5F92B800163632</text:p>
          </table:table-cell>
          <table:table-cell table:style-name="ce2" table:number-columns-repeated="16379"/>
        </table:table-row>
        <table:table-row table:style-name="ro1">
          <table:table-cell office:value-type="float" office:value="203905641" calcext:value-type="float">
            <text:p>203905641</text:p>
          </table:table-cell>
          <table:table-cell table:style-name="ce3" office:value-type="date" office:date-value="2023-12-12" calcext:value-type="date">
            <text:p>12/12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129CAC16E04C3585919A88FE1A1CAB</text:p>
          </table:table-cell>
          <table:table-cell table:style-name="ce2" table:number-columns-repeated="16379"/>
        </table:table-row>
        <table:table-row table:style-name="ro1">
          <table:table-cell office:value-type="float" office:value="203747609" calcext:value-type="float">
            <text:p>203747609</text:p>
          </table:table-cell>
          <table:table-cell table:style-name="ce3" office:value-type="date" office:date-value="2023-12-10" calcext:value-type="date">
            <text:p>10/12/2023</text:p>
          </table:table-cell>
          <table:table-cell office:value-type="string" calcext:value-type="string">
            <text:p>D</text:p>
          </table:table-cell>
          <table:table-cell office:value-type="float" office:value="18969.5" calcext:value-type="float">
            <text:p>18969.5</text:p>
          </table:table-cell>
          <table:table-cell office:value-type="string" calcext:value-type="string">
            <text:p>1EA30FB42C85F7BC5804DA0998212463</text:p>
          </table:table-cell>
          <table:table-cell table:style-name="ce2" table:number-columns-repeated="16379"/>
        </table:table-row>
        <table:table-row table:style-name="ro1">
          <table:table-cell office:value-type="float" office:value="203571922" calcext:value-type="float">
            <text:p>203571922</text:p>
          </table:table-cell>
          <table:table-cell table:style-name="ce3" office:value-type="date" office:date-value="2023-12-09" calcext:value-type="date">
            <text:p>09/12/2023</text:p>
          </table:table-cell>
          <table:table-cell office:value-type="string" calcext:value-type="string">
            <text:p>D</text:p>
          </table:table-cell>
          <table:table-cell office:value-type="float" office:value="40891.06" calcext:value-type="float">
            <text:p>40891.06</text:p>
          </table:table-cell>
          <table:table-cell table:style-name="ce4" office:value-type="string" calcext:value-type="string">
            <text:p>29E4793F9DD086ADF5427A24FB336C03</text:p>
          </table:table-cell>
          <table:table-cell table:style-name="ce2" table:number-columns-repeated="16379"/>
        </table:table-row>
        <table:table-row table:style-name="ro1">
          <table:table-cell office:value-type="float" office:value="203428275" calcext:value-type="float">
            <text:p>203428275</text:p>
          </table:table-cell>
          <table:table-cell table:style-name="ce3" office:value-type="date" office:date-value="2023-12-07" calcext:value-type="date">
            <text:p>07/12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4035A423DB656E5897C7E6DA811356</text:p>
          </table:table-cell>
          <table:table-cell table:style-name="ce2" table:number-columns-repeated="16379"/>
        </table:table-row>
        <table:table-row table:style-name="ro1">
          <table:table-cell office:value-type="float" office:value="203304880" calcext:value-type="float">
            <text:p>203304880</text:p>
          </table:table-cell>
          <table:table-cell table:style-name="ce3" office:value-type="date" office:date-value="2023-12-06" calcext:value-type="date">
            <text:p>06/12/2023</text:p>
          </table:table-cell>
          <table:table-cell office:value-type="string" calcext:value-type="string">
            <text:p>D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9E4DA95F3C0D559617D46514C15A3662</text:p>
          </table:table-cell>
          <table:table-cell table:style-name="ce2" table:number-columns-repeated="16379"/>
        </table:table-row>
        <table:table-row table:style-name="ro1">
          <table:table-cell office:value-type="float" office:value="203137387" calcext:value-type="float">
            <text:p>203137387</text:p>
          </table:table-cell>
          <table:table-cell table:style-name="ce3" office:value-type="date" office:date-value="2023-12-05" calcext:value-type="date">
            <text:p>05/12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2CA27A21FA814A912897DC1BDC049A</text:p>
          </table:table-cell>
          <table:table-cell table:style-name="ce2" table:number-columns-repeated="16379"/>
        </table:table-row>
        <table:table-row table:style-name="ro1">
          <table:table-cell office:value-type="float" office:value="202977251" calcext:value-type="float">
            <text:p>202977251</text:p>
          </table:table-cell>
          <table:table-cell table:style-name="ce3" office:value-type="date" office:date-value="2023-12-03" calcext:value-type="date">
            <text:p>03/12/2023</text:p>
          </table:table-cell>
          <table:table-cell office:value-type="string" calcext:value-type="string">
            <text:p>D</text:p>
          </table:table-cell>
          <table:table-cell office:value-type="float" office:value="22294.94" calcext:value-type="float">
            <text:p>22294.94</text:p>
          </table:table-cell>
          <table:table-cell office:value-type="string" calcext:value-type="string">
            <text:p>790F4E8FE99D709FA0019CC1B14FFD38</text:p>
          </table:table-cell>
          <table:table-cell table:style-name="ce2" table:number-columns-repeated="16379"/>
        </table:table-row>
        <table:table-row table:style-name="ro1">
          <table:table-cell office:value-type="float" office:value="202818901" calcext:value-type="float">
            <text:p>202818901</text:p>
          </table:table-cell>
          <table:table-cell table:style-name="ce3" office:value-type="date" office:date-value="2023-12-02" calcext:value-type="date">
            <text:p>02/12/2023</text:p>
          </table:table-cell>
          <table:table-cell office:value-type="string" calcext:value-type="string">
            <text:p>D</text:p>
          </table:table-cell>
          <table:table-cell office:value-type="float" office:value="191018.29" calcext:value-type="float">
            <text:p>191018.29</text:p>
          </table:table-cell>
          <table:table-cell office:value-type="string" calcext:value-type="string">
            <text:p>05F67BDA4E8207104CAA9E5D2272F1B0</text:p>
          </table:table-cell>
          <table:table-cell table:style-name="ce2" table:number-columns-repeated="16379"/>
        </table:table-row>
        <table:table-row table:style-name="ro1">
          <table:table-cell office:value-type="float" office:value="202689926" calcext:value-type="float">
            <text:p>202689926</text:p>
          </table:table-cell>
          <table:table-cell table:style-name="ce3" office:value-type="date" office:date-value="2023-12-01" calcext:value-type="date">
            <text:p>01/12/2023</text:p>
          </table:table-cell>
          <table:table-cell office:value-type="string" calcext:value-type="string">
            <text:p>D</text:p>
          </table:table-cell>
          <table:table-cell office:value-type="float" office:value="5563.82" calcext:value-type="float">
            <text:p>5563.82</text:p>
          </table:table-cell>
          <table:table-cell office:value-type="string" calcext:value-type="string">
            <text:p>560C1BEE2D636DF210E8E7F4F246578C</text:p>
          </table:table-cell>
          <table:table-cell table:style-name="ce2" table:number-columns-repeated="16379"/>
        </table:table-row>
        <table:table-row table:style-name="ro1">
          <table:table-cell office:value-type="float" office:value="202497177" calcext:value-type="float">
            <text:p>202497177</text:p>
          </table:table-cell>
          <table:table-cell table:style-name="ce3" office:value-type="date" office:date-value="2023-11-30" calcext:value-type="date">
            <text:p>30/1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F8FD685EC53C66E69AFE3968BC2A77B</text:p>
          </table:table-cell>
          <table:table-cell table:style-name="ce2" table:number-columns-repeated="16379"/>
        </table:table-row>
        <table:table-row table:style-name="ro1">
          <table:table-cell office:value-type="float" office:value="202345732" calcext:value-type="float">
            <text:p>202345732</text:p>
          </table:table-cell>
          <table:table-cell table:style-name="ce3" office:value-type="date" office:date-value="2023-11-29" calcext:value-type="date">
            <text:p>29/1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A90296A4BA9FFD05A894DAA38AF6B8</text:p>
          </table:table-cell>
          <table:table-cell table:style-name="ce2" table:number-columns-repeated="16379"/>
        </table:table-row>
        <table:table-row table:style-name="ro1">
          <table:table-cell office:value-type="float" office:value="202207009" calcext:value-type="float">
            <text:p>202207009</text:p>
          </table:table-cell>
          <table:table-cell table:style-name="ce3" office:value-type="date" office:date-value="2023-11-28" calcext:value-type="date">
            <text:p>28/11/2023</text:p>
          </table:table-cell>
          <table:table-cell office:value-type="string" calcext:value-type="string">
            <text:p>D</text:p>
          </table:table-cell>
          <table:table-cell office:value-type="float" office:value="401971.53" calcext:value-type="float">
            <text:p>401971.53</text:p>
          </table:table-cell>
          <table:table-cell office:value-type="string" calcext:value-type="string">
            <text:p>471AAC4DDD1B4C393361CD3F8FACFB78</text:p>
          </table:table-cell>
          <table:table-cell table:style-name="ce2" table:number-columns-repeated="16379"/>
        </table:table-row>
        <table:table-row table:style-name="ro1">
          <table:table-cell office:value-type="float" office:value="202049306" calcext:value-type="float">
            <text:p>202049306</text:p>
          </table:table-cell>
          <table:table-cell table:style-name="ce3" office:value-type="date" office:date-value="2023-11-26" calcext:value-type="date">
            <text:p>26/11/2023</text:p>
          </table:table-cell>
          <table:table-cell office:value-type="string" calcext:value-type="string">
            <text:p>D</text:p>
          </table:table-cell>
          <table:table-cell office:value-type="float" office:value="12490.78" calcext:value-type="float">
            <text:p>12490.78</text:p>
          </table:table-cell>
          <table:table-cell office:value-type="string" calcext:value-type="string">
            <text:p>DF2D375FB009AE73A3FD509F541BDC45</text:p>
          </table:table-cell>
          <table:table-cell table:style-name="ce2" table:number-columns-repeated="16379"/>
        </table:table-row>
        <table:table-row table:style-name="ro1">
          <table:table-cell office:value-type="float" office:value="201909204" calcext:value-type="float">
            <text:p>201909204</text:p>
          </table:table-cell>
          <table:table-cell table:style-name="ce3" office:value-type="date" office:date-value="2023-11-25" calcext:value-type="date">
            <text:p>25/11/2023</text:p>
          </table:table-cell>
          <table:table-cell office:value-type="string" calcext:value-type="string">
            <text:p>D</text:p>
          </table:table-cell>
          <table:table-cell office:value-type="float" office:value="146000" calcext:value-type="float">
            <text:p>146000</text:p>
          </table:table-cell>
          <table:table-cell office:value-type="string" calcext:value-type="string">
            <text:p>C9A7BCBFD003FC2E7147F32561511ADE</text:p>
          </table:table-cell>
          <table:table-cell table:style-name="ce2" table:number-columns-repeated="16379"/>
        </table:table-row>
        <table:table-row table:style-name="ro1">
          <table:table-cell office:value-type="float" office:value="201793784" calcext:value-type="float">
            <text:p>201793784</text:p>
          </table:table-cell>
          <table:table-cell table:style-name="ce3" office:value-type="date" office:date-value="2023-11-24" calcext:value-type="date">
            <text:p>24/1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8B98B4C5062394FF2F702282BD558C</text:p>
          </table:table-cell>
          <table:table-cell table:style-name="ce2" table:number-columns-repeated="16379"/>
        </table:table-row>
        <table:table-row table:style-name="ro1">
          <table:table-cell office:value-type="float" office:value="201657684" calcext:value-type="float">
            <text:p>201657684</text:p>
          </table:table-cell>
          <table:table-cell table:style-name="ce3" office:value-type="date" office:date-value="2023-11-23" calcext:value-type="date">
            <text:p>23/11/2023</text:p>
          </table:table-cell>
          <table:table-cell office:value-type="string" calcext:value-type="string">
            <text:p>D</text:p>
          </table:table-cell>
          <table:table-cell office:value-type="float" office:value="108158" calcext:value-type="float">
            <text:p>108158</text:p>
          </table:table-cell>
          <table:table-cell office:value-type="string" calcext:value-type="string">
            <text:p>28CACA267E1CD9160624662D60C2009E</text:p>
          </table:table-cell>
          <table:table-cell table:style-name="ce2" table:number-columns-repeated="16379"/>
        </table:table-row>
        <table:table-row table:style-name="ro1">
          <table:table-cell office:value-type="float" office:value="201566282" calcext:value-type="float">
            <text:p>201566282</text:p>
          </table:table-cell>
          <table:table-cell table:style-name="ce3" office:value-type="date" office:date-value="2023-11-22" calcext:value-type="date">
            <text:p>22/11/2023</text:p>
          </table:table-cell>
          <table:table-cell office:value-type="string" calcext:value-type="string">
            <text:p>D</text:p>
          </table:table-cell>
          <table:table-cell office:value-type="float" office:value="14672.34" calcext:value-type="float">
            <text:p>14672.34</text:p>
          </table:table-cell>
          <table:table-cell office:value-type="string" calcext:value-type="string">
            <text:p>7BFB420B5FB152EDB37351F40FF33440</text:p>
          </table:table-cell>
          <table:table-cell table:style-name="ce2" table:number-columns-repeated="16379"/>
        </table:table-row>
        <table:table-row table:style-name="ro1">
          <table:table-cell office:value-type="float" office:value="201378435" calcext:value-type="float">
            <text:p>201378435</text:p>
          </table:table-cell>
          <table:table-cell table:style-name="ce3" office:value-type="date" office:date-value="2023-11-21" calcext:value-type="date">
            <text:p>21/1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50DE7DC4CB606DD4C83EE9667D063F</text:p>
          </table:table-cell>
          <table:table-cell table:style-name="ce2" table:number-columns-repeated="16379"/>
        </table:table-row>
        <table:table-row table:style-name="ro1">
          <table:table-cell office:value-type="float" office:value="201219297" calcext:value-type="float">
            <text:p>201219297</text:p>
          </table:table-cell>
          <table:table-cell table:style-name="ce3" office:value-type="date" office:date-value="2023-11-20" calcext:value-type="date">
            <text:p>20/1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E64CA7D0F51FAE3D3E7C267AB690198</text:p>
          </table:table-cell>
          <table:table-cell table:style-name="ce2" table:number-columns-repeated="16379"/>
        </table:table-row>
        <table:table-row table:style-name="ro1">
          <table:table-cell office:value-type="float" office:value="201113736" calcext:value-type="float">
            <text:p>201113736</text:p>
          </table:table-cell>
          <table:table-cell table:style-name="ce3" office:value-type="date" office:date-value="2023-11-18" calcext:value-type="date">
            <text:p>18/1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05973DE587BC1947445EFF77B5DDFB</text:p>
          </table:table-cell>
          <table:table-cell table:style-name="ce2" table:number-columns-repeated="16379"/>
        </table:table-row>
        <table:table-row table:style-name="ro1">
          <table:table-cell office:value-type="float" office:value="201031964" calcext:value-type="float">
            <text:p>201031964</text:p>
          </table:table-cell>
          <table:table-cell table:style-name="ce3" office:value-type="date" office:date-value="2023-11-17" calcext:value-type="date">
            <text:p>17/11/2023</text:p>
          </table:table-cell>
          <table:table-cell office:value-type="string" calcext:value-type="string">
            <text:p>D</text:p>
          </table:table-cell>
          <table:table-cell office:value-type="float" office:value="177605.57" calcext:value-type="float">
            <text:p>177605.57</text:p>
          </table:table-cell>
          <table:table-cell office:value-type="string" calcext:value-type="string">
            <text:p>1FD270636F9B4E795A41AEA8BB7FA2FF</text:p>
          </table:table-cell>
          <table:table-cell table:style-name="ce2" table:number-columns-repeated="16379"/>
        </table:table-row>
        <table:table-row table:style-name="ro1">
          <table:table-cell office:value-type="float" office:value="200862065" calcext:value-type="float">
            <text:p>200862065</text:p>
          </table:table-cell>
          <table:table-cell table:style-name="ce3" office:value-type="date" office:date-value="2023-11-16" calcext:value-type="date">
            <text:p>16/11/2023</text:p>
          </table:table-cell>
          <table:table-cell office:value-type="string" calcext:value-type="string">
            <text:p>D</text:p>
          </table:table-cell>
          <table:table-cell office:value-type="float" office:value="103917" calcext:value-type="float">
            <text:p>103917</text:p>
          </table:table-cell>
          <table:table-cell office:value-type="string" calcext:value-type="string">
            <text:p>D38EBBCB7863747C1CCC64D098D20279</text:p>
          </table:table-cell>
          <table:table-cell table:style-name="ce2" table:number-columns-repeated="16379"/>
        </table:table-row>
        <table:table-row table:style-name="ro1">
          <table:table-cell office:value-type="float" office:value="200703732" calcext:value-type="float">
            <text:p>200703732</text:p>
          </table:table-cell>
          <table:table-cell table:style-name="ce3" office:value-type="date" office:date-value="2023-11-15" calcext:value-type="date">
            <text:p>15/1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CB2A17C54744B275D7A4A5D5B913D7A</text:p>
          </table:table-cell>
          <table:table-cell table:style-name="ce2" table:number-columns-repeated="16379"/>
        </table:table-row>
        <table:table-row table:style-name="ro1">
          <table:table-cell office:value-type="float" office:value="200901043" calcext:value-type="float">
            <text:p>200901043</text:p>
          </table:table-cell>
          <table:table-cell table:style-name="ce3" office:value-type="date" office:date-value="2023-11-15" calcext:value-type="date">
            <text:p>15/11/2023</text:p>
          </table:table-cell>
          <table:table-cell office:value-type="string" calcext:value-type="string">
            <text:p>D</text:p>
          </table:table-cell>
          <table:table-cell office:value-type="float" office:value="107100.65" calcext:value-type="float">
            <text:p>107100.65</text:p>
          </table:table-cell>
          <table:table-cell office:value-type="string" calcext:value-type="string">
            <text:p>EB2ECFCD92B837467138E58CB55CC426</text:p>
          </table:table-cell>
          <table:table-cell table:style-name="ce2" table:number-columns-repeated="16379"/>
        </table:table-row>
        <table:table-row table:style-name="ro1">
          <table:table-cell office:value-type="float" office:value="200600940" calcext:value-type="float">
            <text:p>200600940</text:p>
          </table:table-cell>
          <table:table-cell table:style-name="ce3" office:value-type="date" office:date-value="2023-11-14" calcext:value-type="date">
            <text:p>14/11/2023</text:p>
          </table:table-cell>
          <table:table-cell office:value-type="string" calcext:value-type="string">
            <text:p>D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70FF8A53AF6FF39F416819A5616562EF</text:p>
          </table:table-cell>
          <table:table-cell table:style-name="ce2" table:number-columns-repeated="16379"/>
        </table:table-row>
        <table:table-row table:style-name="ro1">
          <table:table-cell office:value-type="float" office:value="200416285" calcext:value-type="float">
            <text:p>200416285</text:p>
          </table:table-cell>
          <table:table-cell table:style-name="ce3" office:value-type="date" office:date-value="2023-11-13" calcext:value-type="date">
            <text:p>13/11/2023</text:p>
          </table:table-cell>
          <table:table-cell office:value-type="string" calcext:value-type="string">
            <text:p>D</text:p>
          </table:table-cell>
          <table:table-cell office:value-type="float" office:value="31454.57" calcext:value-type="float">
            <text:p>31454.57</text:p>
          </table:table-cell>
          <table:table-cell office:value-type="string" calcext:value-type="string">
            <text:p>5C53FB8042CC15D1F6F25323EA32E323</text:p>
          </table:table-cell>
          <table:table-cell table:style-name="ce2" table:number-columns-repeated="16379"/>
        </table:table-row>
        <table:table-row table:style-name="ro1">
          <table:table-cell office:value-type="float" office:value="200290468" calcext:value-type="float">
            <text:p>200290468</text:p>
          </table:table-cell>
          <table:table-cell table:style-name="ce3" office:value-type="date" office:date-value="2023-11-11" calcext:value-type="date">
            <text:p>11/1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486C39420C71C51A4CCEB9AFDB2DAB</text:p>
          </table:table-cell>
          <table:table-cell table:style-name="ce2" table:number-columns-repeated="16379"/>
        </table:table-row>
        <table:table-row table:style-name="ro1">
          <table:table-cell office:value-type="float" office:value="200185486" calcext:value-type="float">
            <text:p>200185486</text:p>
          </table:table-cell>
          <table:table-cell table:style-name="ce3" office:value-type="date" office:date-value="2023-11-10" calcext:value-type="date">
            <text:p>10/11/2023</text:p>
          </table:table-cell>
          <table:table-cell office:value-type="string" calcext:value-type="string">
            <text:p>D</text:p>
          </table:table-cell>
          <table:table-cell office:value-type="float" office:value="60428.44" calcext:value-type="float">
            <text:p>60428.44</text:p>
          </table:table-cell>
          <table:table-cell office:value-type="string" calcext:value-type="string">
            <text:p>0544709589632E65A84830FCA1E6EB78</text:p>
          </table:table-cell>
          <table:table-cell table:style-name="ce2" table:number-columns-repeated="16379"/>
        </table:table-row>
        <table:table-row table:style-name="ro1">
          <table:table-cell office:value-type="float" office:value="200032662" calcext:value-type="float">
            <text:p>200032662</text:p>
          </table:table-cell>
          <table:table-cell table:style-name="ce3" office:value-type="date" office:date-value="2023-11-09" calcext:value-type="date">
            <text:p>09/11/2023</text:p>
          </table:table-cell>
          <table:table-cell office:value-type="string" calcext:value-type="string">
            <text:p>D</text:p>
          </table:table-cell>
          <table:table-cell office:value-type="float" office:value="83776.07" calcext:value-type="float">
            <text:p>83776.07</text:p>
          </table:table-cell>
          <table:table-cell office:value-type="string" calcext:value-type="string">
            <text:p>06D82E6671A1370421CACBA22C4F0A1B</text:p>
          </table:table-cell>
          <table:table-cell table:style-name="ce2" table:number-columns-repeated="16379"/>
        </table:table-row>
        <table:table-row table:style-name="ro1">
          <table:table-cell office:value-type="float" office:value="199895408" calcext:value-type="float">
            <text:p>199895408</text:p>
          </table:table-cell>
          <table:table-cell table:style-name="ce3" office:value-type="date" office:date-value="2023-11-08" calcext:value-type="date">
            <text:p>08/11/2023</text:p>
          </table:table-cell>
          <table:table-cell office:value-type="string" calcext:value-type="string">
            <text:p>D</text:p>
          </table:table-cell>
          <table:table-cell office:value-type="float" office:value="33900" calcext:value-type="float">
            <text:p>33900</text:p>
          </table:table-cell>
          <table:table-cell office:value-type="string" calcext:value-type="string">
            <text:p>4F9CF04AC74FDD8053ECC3D815EC6373</text:p>
          </table:table-cell>
          <table:table-cell table:style-name="ce2" table:number-columns-repeated="16379"/>
        </table:table-row>
        <table:table-row table:style-name="ro1">
          <table:table-cell office:value-type="float" office:value="199755846" calcext:value-type="float">
            <text:p>199755846</text:p>
          </table:table-cell>
          <table:table-cell table:style-name="ce3" office:value-type="date" office:date-value="2023-11-07" calcext:value-type="date">
            <text:p>07/11/2023</text:p>
          </table:table-cell>
          <table:table-cell office:value-type="string" calcext:value-type="string">
            <text:p>D</text:p>
          </table:table-cell>
          <table:table-cell office:value-type="float" office:value="676951.07" calcext:value-type="float">
            <text:p>676951.07</text:p>
          </table:table-cell>
          <table:table-cell office:value-type="string" calcext:value-type="string">
            <text:p>835E3D8D81768027CC3339A6AA6FF04B</text:p>
          </table:table-cell>
          <table:table-cell table:style-name="ce2" table:number-columns-repeated="16379"/>
        </table:table-row>
        <table:table-row table:style-name="ro1">
          <table:table-cell office:value-type="float" office:value="199600776" calcext:value-type="float">
            <text:p>199600776</text:p>
          </table:table-cell>
          <table:table-cell table:style-name="ce3" office:value-type="date" office:date-value="2023-11-05" calcext:value-type="date">
            <text:p>05/11/2023</text:p>
          </table:table-cell>
          <table:table-cell office:value-type="string" calcext:value-type="string">
            <text:p>D</text:p>
          </table:table-cell>
          <table:table-cell office:value-type="float" office:value="64573.78" calcext:value-type="float">
            <text:p>64573.78</text:p>
          </table:table-cell>
          <table:table-cell office:value-type="string" calcext:value-type="string">
            <text:p>5D9D02EE2256311FB4F9ACC978DA7A36</text:p>
          </table:table-cell>
          <table:table-cell table:style-name="ce2" table:number-columns-repeated="16379"/>
        </table:table-row>
        <table:table-row table:style-name="ro1">
          <table:table-cell office:value-type="float" office:value="199474861" calcext:value-type="float">
            <text:p>199474861</text:p>
          </table:table-cell>
          <table:table-cell table:style-name="ce3" office:value-type="date" office:date-value="2023-11-04" calcext:value-type="date">
            <text:p>04/1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599575385CDE2011575827BA3ADDB3</text:p>
          </table:table-cell>
          <table:table-cell table:style-name="ce2" table:number-columns-repeated="16379"/>
        </table:table-row>
        <table:table-row table:style-name="ro1">
          <table:table-cell office:value-type="float" office:value="199318656" calcext:value-type="float">
            <text:p>199318656</text:p>
          </table:table-cell>
          <table:table-cell table:style-name="ce3" office:value-type="date" office:date-value="2023-11-03" calcext:value-type="date">
            <text:p>03/11/2023</text:p>
          </table:table-cell>
          <table:table-cell office:value-type="string" calcext:value-type="string">
            <text:p>D</text:p>
          </table:table-cell>
          <table:table-cell office:value-type="float" office:value="45621.84" calcext:value-type="float">
            <text:p>45621.84</text:p>
          </table:table-cell>
          <table:table-cell office:value-type="string" calcext:value-type="string">
            <text:p>C27DEFD35912BC5F72EB7FB757E7DB93</text:p>
          </table:table-cell>
          <table:table-cell table:style-name="ce2" table:number-columns-repeated="16379"/>
        </table:table-row>
        <table:table-row table:style-name="ro1">
          <table:table-cell office:value-type="float" office:value="199165278" calcext:value-type="float">
            <text:p>199165278</text:p>
          </table:table-cell>
          <table:table-cell table:style-name="ce3" office:value-type="date" office:date-value="2023-11-02" calcext:value-type="date">
            <text:p>02/11/2023</text:p>
          </table:table-cell>
          <table:table-cell office:value-type="string" calcext:value-type="string">
            <text:p>D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4F9CF04AC74FDD8053ECC3D815EC6373</text:p>
          </table:table-cell>
          <table:table-cell table:style-name="ce2" table:number-columns-repeated="16379"/>
        </table:table-row>
        <table:table-row table:style-name="ro1">
          <table:table-cell office:value-type="float" office:value="199035336" calcext:value-type="float">
            <text:p>199035336</text:p>
          </table:table-cell>
          <table:table-cell table:style-name="ce3" office:value-type="date" office:date-value="2023-11-01" calcext:value-type="date">
            <text:p>01/11/2023</text:p>
          </table:table-cell>
          <table:table-cell office:value-type="string" calcext:value-type="string">
            <text:p>D</text:p>
          </table:table-cell>
          <table:table-cell office:value-type="float" office:value="161735.85" calcext:value-type="float">
            <text:p>161735.85</text:p>
          </table:table-cell>
          <table:table-cell office:value-type="string" calcext:value-type="string">
            <text:p>7635DBF2B4CBD275A7D74E3864661054</text:p>
          </table:table-cell>
          <table:table-cell table:style-name="ce2" table:number-columns-repeated="16379"/>
        </table:table-row>
        <table:table-row table:style-name="ro1">
          <table:table-cell office:value-type="float" office:value="198932943" calcext:value-type="float">
            <text:p>198932943</text:p>
          </table:table-cell>
          <table:table-cell table:style-name="ce3" office:value-type="date" office:date-value="2023-10-31" calcext:value-type="date">
            <text:p>31/10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5AA510E39CE892F06E4F5847E8B35D</text:p>
          </table:table-cell>
          <table:table-cell table:style-name="ce2" table:number-columns-repeated="16379"/>
        </table:table-row>
        <table:table-row table:style-name="ro1">
          <table:table-cell office:value-type="float" office:value="198700348" calcext:value-type="float">
            <text:p>198700348</text:p>
          </table:table-cell>
          <table:table-cell table:style-name="ce3" office:value-type="date" office:date-value="2023-10-29" calcext:value-type="date">
            <text:p>29/10/2023</text:p>
          </table:table-cell>
          <table:table-cell office:value-type="string" calcext:value-type="string">
            <text:p>D</text:p>
          </table:table-cell>
          <table:table-cell office:value-type="float" office:value="133811.3" calcext:value-type="float">
            <text:p>133811.3</text:p>
          </table:table-cell>
          <table:table-cell office:value-type="string" calcext:value-type="string">
            <text:p>E79A9D71F0406F1E707528100748EF5B</text:p>
          </table:table-cell>
          <table:table-cell table:style-name="ce2" table:number-columns-repeated="16379"/>
        </table:table-row>
        <table:table-row table:style-name="ro1">
          <table:table-cell office:value-type="float" office:value="198558650" calcext:value-type="float">
            <text:p>198558650</text:p>
          </table:table-cell>
          <table:table-cell table:style-name="ce3" office:value-type="date" office:date-value="2023-10-28" calcext:value-type="date">
            <text:p>28/10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B67E7F998C0D6B467401DF54562E4D</text:p>
          </table:table-cell>
          <table:table-cell table:style-name="ce2" table:number-columns-repeated="16379"/>
        </table:table-row>
        <table:table-row table:style-name="ro1">
          <table:table-cell office:value-type="float" office:value="198442028" calcext:value-type="float">
            <text:p>198442028</text:p>
          </table:table-cell>
          <table:table-cell table:style-name="ce3" office:value-type="date" office:date-value="2023-10-27" calcext:value-type="date">
            <text:p>27/10/2023</text:p>
          </table:table-cell>
          <table:table-cell office:value-type="string" calcext:value-type="string">
            <text:p>D</text:p>
          </table:table-cell>
          <table:table-cell office:value-type="float" office:value="49999.94" calcext:value-type="float">
            <text:p>49999.94</text:p>
          </table:table-cell>
          <table:table-cell office:value-type="string" calcext:value-type="string">
            <text:p>A13BBE9E5BFDE9A87B25F0124AED7466</text:p>
          </table:table-cell>
          <table:table-cell table:style-name="ce2" table:number-columns-repeated="16379"/>
        </table:table-row>
        <table:table-row table:style-name="ro1">
          <table:table-cell office:value-type="float" office:value="198290721" calcext:value-type="float">
            <text:p>198290721</text:p>
          </table:table-cell>
          <table:table-cell table:style-name="ce3" office:value-type="date" office:date-value="2023-10-26" calcext:value-type="date">
            <text:p>26/10/2023</text:p>
          </table:table-cell>
          <table:table-cell office:value-type="string" calcext:value-type="string">
            <text:p>D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A1F9C629B86AC650C9F33733D0337FD4</text:p>
          </table:table-cell>
          <table:table-cell table:style-name="ce2" table:number-columns-repeated="16379"/>
        </table:table-row>
        <table:table-row table:style-name="ro1">
          <table:table-cell office:value-type="float" office:value="198178684" calcext:value-type="float">
            <text:p>198178684</text:p>
          </table:table-cell>
          <table:table-cell table:style-name="ce3" office:value-type="date" office:date-value="2023-10-25" calcext:value-type="date">
            <text:p>25/10/2023</text:p>
          </table:table-cell>
          <table:table-cell office:value-type="string" calcext:value-type="string">
            <text:p>D</text:p>
          </table:table-cell>
          <table:table-cell office:value-type="float" office:value="103740.93" calcext:value-type="float">
            <text:p>103740.93</text:p>
          </table:table-cell>
          <table:table-cell office:value-type="string" calcext:value-type="string">
            <text:p>5302674EB266B967EC77AC147252B3BA</text:p>
          </table:table-cell>
          <table:table-cell table:style-name="ce2" table:number-columns-repeated="16379"/>
        </table:table-row>
        <table:table-row table:style-name="ro1">
          <table:table-cell office:value-type="float" office:value="198029417" calcext:value-type="float">
            <text:p>198029417</text:p>
          </table:table-cell>
          <table:table-cell table:style-name="ce3" office:value-type="date" office:date-value="2023-10-24" calcext:value-type="date">
            <text:p>24/10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A10C80EEA5300615DFAC59751C207D5</text:p>
          </table:table-cell>
          <table:table-cell table:style-name="ce2" table:number-columns-repeated="16379"/>
        </table:table-row>
        <table:table-row table:style-name="ro1">
          <table:table-cell office:value-type="float" office:value="197874183" calcext:value-type="float">
            <text:p>197874183</text:p>
          </table:table-cell>
          <table:table-cell table:style-name="ce3" office:value-type="date" office:date-value="2023-10-23" calcext:value-type="date">
            <text:p>23/10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A6AD5077F789011C019B1D6FF495828</text:p>
          </table:table-cell>
          <table:table-cell table:style-name="ce2" table:number-columns-repeated="16379"/>
        </table:table-row>
        <table:table-row table:style-name="ro1">
          <table:table-cell office:value-type="float" office:value="197753739" calcext:value-type="float">
            <text:p>197753739</text:p>
          </table:table-cell>
          <table:table-cell table:style-name="ce3" office:value-type="date" office:date-value="2023-10-21" calcext:value-type="date">
            <text:p>21/10/2023</text:p>
          </table:table-cell>
          <table:table-cell office:value-type="string" calcext:value-type="string">
            <text:p>D</text:p>
          </table:table-cell>
          <table:table-cell office:value-type="float" office:value="103999.55" calcext:value-type="float">
            <text:p>103999.55</text:p>
          </table:table-cell>
          <table:table-cell office:value-type="string" calcext:value-type="string">
            <text:p>7C92F96BA782E2F03720D867A3C3DF8F</text:p>
          </table:table-cell>
          <table:table-cell table:style-name="ce2" table:number-columns-repeated="16379"/>
        </table:table-row>
        <table:table-row table:style-name="ro1">
          <table:table-cell office:value-type="float" office:value="197688647" calcext:value-type="float">
            <text:p>197688647</text:p>
          </table:table-cell>
          <table:table-cell table:style-name="ce3" office:value-type="date" office:date-value="2023-10-20" calcext:value-type="date">
            <text:p>20/10/2023</text:p>
          </table:table-cell>
          <table:table-cell office:value-type="string" calcext:value-type="string">
            <text:p>D</text:p>
          </table:table-cell>
          <table:table-cell office:value-type="float" office:value="4994.22" calcext:value-type="float">
            <text:p>4994.22</text:p>
          </table:table-cell>
          <table:table-cell office:value-type="string" calcext:value-type="string">
            <text:p>2C4A712599A73E15F7A6564D8F45CB35</text:p>
          </table:table-cell>
          <table:table-cell table:style-name="ce2" table:number-columns-repeated="16379"/>
        </table:table-row>
        <table:table-row table:style-name="ro1">
          <table:table-cell office:value-type="float" office:value="197564488" calcext:value-type="float">
            <text:p>197564488</text:p>
          </table:table-cell>
          <table:table-cell table:style-name="ce3" office:value-type="date" office:date-value="2023-10-19" calcext:value-type="date">
            <text:p>19/10/2023</text:p>
          </table:table-cell>
          <table:table-cell office:value-type="string" calcext:value-type="string">
            <text:p>D</text:p>
          </table:table-cell>
          <table:table-cell office:value-type="float" office:value="16116.62" calcext:value-type="float">
            <text:p>16116.62</text:p>
          </table:table-cell>
          <table:table-cell office:value-type="string" calcext:value-type="string">
            <text:p>951C438D1D40FEBEF9771AD4F5479AB7</text:p>
          </table:table-cell>
          <table:table-cell table:style-name="ce2" table:number-columns-repeated="16379"/>
        </table:table-row>
        <table:table-row table:style-name="ro1">
          <table:table-cell office:value-type="float" office:value="197374330" calcext:value-type="float">
            <text:p>197374330</text:p>
          </table:table-cell>
          <table:table-cell table:style-name="ce3" office:value-type="date" office:date-value="2023-10-18" calcext:value-type="date">
            <text:p>18/10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E8AFC97A1215731741512BE23177C27</text:p>
          </table:table-cell>
          <table:table-cell table:style-name="ce2" table:number-columns-repeated="16379"/>
        </table:table-row>
        <table:table-row table:style-name="ro1">
          <table:table-cell office:value-type="float" office:value="197241756" calcext:value-type="float">
            <text:p>197241756</text:p>
          </table:table-cell>
          <table:table-cell table:style-name="ce3" office:value-type="date" office:date-value="2023-10-17" calcext:value-type="date">
            <text:p>17/10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D67826EE1AF2F906FC1F9683F1C63A</text:p>
          </table:table-cell>
          <table:table-cell table:style-name="ce2" table:number-columns-repeated="16379"/>
        </table:table-row>
        <table:table-row table:style-name="ro1">
          <table:table-cell office:value-type="float" office:value="197098287" calcext:value-type="float">
            <text:p>197098287</text:p>
          </table:table-cell>
          <table:table-cell table:style-name="ce3" office:value-type="date" office:date-value="2023-10-15" calcext:value-type="date">
            <text:p>15/10/2023</text:p>
          </table:table-cell>
          <table:table-cell office:value-type="string" calcext:value-type="string">
            <text:p>D</text:p>
          </table:table-cell>
          <table:table-cell office:value-type="float" office:value="108257.28" calcext:value-type="float">
            <text:p>108257.28</text:p>
          </table:table-cell>
          <table:table-cell office:value-type="string" calcext:value-type="string">
            <text:p>EB2ECFCD92B837467138E58CB55CC426</text:p>
          </table:table-cell>
          <table:table-cell table:style-name="ce2" table:number-columns-repeated="16379"/>
        </table:table-row>
        <table:table-row table:style-name="ro1">
          <table:table-cell office:value-type="float" office:value="196962306" calcext:value-type="float">
            <text:p>196962306</text:p>
          </table:table-cell>
          <table:table-cell table:style-name="ce3" office:value-type="date" office:date-value="2023-10-14" calcext:value-type="date">
            <text:p>14/10/2023</text:p>
          </table:table-cell>
          <table:table-cell office:value-type="string" calcext:value-type="string">
            <text:p>D</text:p>
          </table:table-cell>
          <table:table-cell office:value-type="float" office:value="25773.25" calcext:value-type="float">
            <text:p>25773.25</text:p>
          </table:table-cell>
          <table:table-cell office:value-type="string" calcext:value-type="string">
            <text:p>484890EBDB08A4E03BCE995F0FB3E9C1</text:p>
          </table:table-cell>
          <table:table-cell table:style-name="ce2" table:number-columns-repeated="16379"/>
        </table:table-row>
        <table:table-row table:style-name="ro1">
          <table:table-cell office:value-type="float" office:value="196896557" calcext:value-type="float">
            <text:p>196896557</text:p>
          </table:table-cell>
          <table:table-cell table:style-name="ce3" office:value-type="date" office:date-value="2023-10-13" calcext:value-type="date">
            <text:p>13/10/2023</text:p>
          </table:table-cell>
          <table:table-cell office:value-type="string" calcext:value-type="string">
            <text:p>D</text:p>
          </table:table-cell>
          <table:table-cell office:value-type="float" office:value="9670.79" calcext:value-type="float">
            <text:p>9670.79</text:p>
          </table:table-cell>
          <table:table-cell office:value-type="string" calcext:value-type="string">
            <text:p>98487A83BFF8A19099323EE7FBEBA43C</text:p>
          </table:table-cell>
          <table:table-cell table:style-name="ce2" table:number-columns-repeated="16379"/>
        </table:table-row>
        <table:table-row table:style-name="ro1">
          <table:table-cell office:value-type="float" office:value="196737080" calcext:value-type="float">
            <text:p>196737080</text:p>
          </table:table-cell>
          <table:table-cell table:style-name="ce3" office:value-type="date" office:date-value="2023-10-12" calcext:value-type="date">
            <text:p>12/10/2023</text:p>
          </table:table-cell>
          <table:table-cell office:value-type="string" calcext:value-type="string">
            <text:p>D</text:p>
          </table:table-cell>
          <table:table-cell office:value-type="float" office:value="28728.9" calcext:value-type="float">
            <text:p>28728.9</text:p>
          </table:table-cell>
          <table:table-cell office:value-type="string" calcext:value-type="string">
            <text:p>D51A966454D1C12F8B15D99DA59D4D1E</text:p>
          </table:table-cell>
          <table:table-cell table:style-name="ce2" table:number-columns-repeated="16379"/>
        </table:table-row>
        <table:table-row table:style-name="ro1">
          <table:table-cell office:value-type="float" office:value="196569632" calcext:value-type="float">
            <text:p>196569632</text:p>
          </table:table-cell>
          <table:table-cell table:style-name="ce3" office:value-type="date" office:date-value="2023-10-11" calcext:value-type="date">
            <text:p>11/10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BC4F0629691DEA14CFC780B13D8C5E</text:p>
          </table:table-cell>
          <table:table-cell table:style-name="ce2" table:number-columns-repeated="16379"/>
        </table:table-row>
        <table:table-row table:style-name="ro1">
          <table:table-cell office:value-type="float" office:value="196443358" calcext:value-type="float">
            <text:p>196443358</text:p>
          </table:table-cell>
          <table:table-cell table:style-name="ce3" office:value-type="date" office:date-value="2023-10-10" calcext:value-type="date">
            <text:p>10/10/2023</text:p>
          </table:table-cell>
          <table:table-cell office:value-type="string" calcext:value-type="string">
            <text:p>D</text:p>
          </table:table-cell>
          <table:table-cell office:value-type="float" office:value="58329.63" calcext:value-type="float">
            <text:p>58329.63</text:p>
          </table:table-cell>
          <table:table-cell office:value-type="string" calcext:value-type="string">
            <text:p>A9525C578B7A011AC2C1A33AD5744DAF</text:p>
          </table:table-cell>
          <table:table-cell table:style-name="ce2" table:number-columns-repeated="16379"/>
        </table:table-row>
        <table:table-row table:style-name="ro1">
          <table:table-cell office:value-type="float" office:value="196282029" calcext:value-type="float">
            <text:p>196282029</text:p>
          </table:table-cell>
          <table:table-cell table:style-name="ce3" office:value-type="date" office:date-value="2023-10-09" calcext:value-type="date">
            <text:p>09/10/2023</text:p>
          </table:table-cell>
          <table:table-cell office:value-type="string" calcext:value-type="string">
            <text:p>D</text:p>
          </table:table-cell>
          <table:table-cell office:value-type="float" office:value="4404.3" calcext:value-type="float">
            <text:p>4404.3</text:p>
          </table:table-cell>
          <table:table-cell office:value-type="string" calcext:value-type="string">
            <text:p>0AB9EDF709177A80AE134143B9E9793A</text:p>
          </table:table-cell>
          <table:table-cell table:style-name="ce2" table:number-columns-repeated="16379"/>
        </table:table-row>
        <table:table-row table:style-name="ro1">
          <table:table-cell office:value-type="float" office:value="196158815" calcext:value-type="float">
            <text:p>196158815</text:p>
          </table:table-cell>
          <table:table-cell table:style-name="ce3" office:value-type="date" office:date-value="2023-10-07" calcext:value-type="date">
            <text:p>07/10/2023</text:p>
          </table:table-cell>
          <table:table-cell office:value-type="string" calcext:value-type="string">
            <text:p>D</text:p>
          </table:table-cell>
          <table:table-cell office:value-type="float" office:value="78564.59" calcext:value-type="float">
            <text:p>78564.59</text:p>
          </table:table-cell>
          <table:table-cell office:value-type="string" calcext:value-type="string">
            <text:p>179B1BA6FD069ABF81ED45210C1AFAC2</text:p>
          </table:table-cell>
          <table:table-cell table:style-name="ce2" table:number-columns-repeated="16379"/>
        </table:table-row>
        <table:table-row table:style-name="ro1">
          <table:table-cell office:value-type="float" office:value="196019727" calcext:value-type="float">
            <text:p>196019727</text:p>
          </table:table-cell>
          <table:table-cell table:style-name="ce3" office:value-type="date" office:date-value="2023-10-06" calcext:value-type="date">
            <text:p>06/10/2023</text:p>
          </table:table-cell>
          <table:table-cell office:value-type="string" calcext:value-type="string">
            <text:p>D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89DC4F7EEDD0D640B928999C16653391</text:p>
          </table:table-cell>
          <table:table-cell table:style-name="ce2" table:number-columns-repeated="16379"/>
        </table:table-row>
        <table:table-row table:style-name="ro1">
          <table:table-cell office:value-type="float" office:value="195878743" calcext:value-type="float">
            <text:p>195878743</text:p>
          </table:table-cell>
          <table:table-cell table:style-name="ce3" office:value-type="date" office:date-value="2023-10-05" calcext:value-type="date">
            <text:p>05/10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3E8091CC261B9AD157A7B06A2C3023F8</text:p>
          </table:table-cell>
          <table:table-cell table:style-name="ce2" table:number-columns-repeated="16379"/>
        </table:table-row>
        <table:table-row table:style-name="ro1">
          <table:table-cell office:value-type="float" office:value="195757925" calcext:value-type="float">
            <text:p>195757925</text:p>
          </table:table-cell>
          <table:table-cell table:style-name="ce3" office:value-type="date" office:date-value="2023-10-04" calcext:value-type="date">
            <text:p>04/10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CBDCC0AB86680B94B97C3274117F24</text:p>
          </table:table-cell>
          <table:table-cell table:style-name="ce2" table:number-columns-repeated="16379"/>
        </table:table-row>
        <table:table-row table:style-name="ro1">
          <table:table-cell office:value-type="float" office:value="195582431" calcext:value-type="float">
            <text:p>195582431</text:p>
          </table:table-cell>
          <table:table-cell table:style-name="ce3" office:value-type="date" office:date-value="2023-10-03" calcext:value-type="date">
            <text:p>03/10/2023</text:p>
          </table:table-cell>
          <table:table-cell office:value-type="string" calcext:value-type="string">
            <text:p>D</text:p>
          </table:table-cell>
          <table:table-cell office:value-type="float" office:value="13181.69" calcext:value-type="float">
            <text:p>13181.69</text:p>
          </table:table-cell>
          <table:table-cell office:value-type="string" calcext:value-type="string">
            <text:p>35BFAA6D1D6C4E588260C65ACB9DBA2C</text:p>
          </table:table-cell>
          <table:table-cell table:style-name="ce2" table:number-columns-repeated="16379"/>
        </table:table-row>
        <table:table-row table:style-name="ro1">
          <table:table-cell office:value-type="float" office:value="195462497" calcext:value-type="float">
            <text:p>195462497</text:p>
          </table:table-cell>
          <table:table-cell table:style-name="ce3" office:value-type="date" office:date-value="2023-10-02" calcext:value-type="date">
            <text:p>02/10/2023</text:p>
          </table:table-cell>
          <table:table-cell office:value-type="string" calcext:value-type="string">
            <text:p>D</text:p>
          </table:table-cell>
          <table:table-cell office:value-type="float" office:value="13319.24" calcext:value-type="float">
            <text:p>13319.24</text:p>
          </table:table-cell>
          <table:table-cell office:value-type="string" calcext:value-type="string">
            <text:p>2D4EAB3CEF868DDBE5C34FC3C7D12286</text:p>
          </table:table-cell>
          <table:table-cell table:style-name="ce2" table:number-columns-repeated="16379"/>
        </table:table-row>
        <table:table-row table:style-name="ro1">
          <table:table-cell office:value-type="float" office:value="195332608" calcext:value-type="float">
            <text:p>195332608</text:p>
          </table:table-cell>
          <table:table-cell table:style-name="ce3" office:value-type="date" office:date-value="2023-09-30" calcext:value-type="date">
            <text:p>30/09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5994A296CFD34269F518888751FEB6</text:p>
          </table:table-cell>
          <table:table-cell table:style-name="ce2" table:number-columns-repeated="16379"/>
        </table:table-row>
        <table:table-row table:style-name="ro1">
          <table:table-cell office:value-type="float" office:value="195164942" calcext:value-type="float">
            <text:p>195164942</text:p>
          </table:table-cell>
          <table:table-cell table:style-name="ce3" office:value-type="date" office:date-value="2023-09-29" calcext:value-type="date">
            <text:p>29/09/2023</text:p>
          </table:table-cell>
          <table:table-cell office:value-type="string" calcext:value-type="string">
            <text:p>D</text:p>
          </table:table-cell>
          <table:table-cell office:value-type="float" office:value="8847.23" calcext:value-type="float">
            <text:p>8847.23</text:p>
          </table:table-cell>
          <table:table-cell office:value-type="string" calcext:value-type="string">
            <text:p>64DE9FA20A37F1D0AD76DA441DBFAB0E</text:p>
          </table:table-cell>
          <table:table-cell table:style-name="ce2" table:number-columns-repeated="16379"/>
        </table:table-row>
        <table:table-row table:style-name="ro1">
          <table:table-cell office:value-type="float" office:value="194979044" calcext:value-type="float">
            <text:p>194979044</text:p>
          </table:table-cell>
          <table:table-cell table:style-name="ce3" office:value-type="date" office:date-value="2023-09-28" calcext:value-type="date">
            <text:p>28/09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8A9C42033FEC18242758F98407D118</text:p>
          </table:table-cell>
          <table:table-cell table:style-name="ce2" table:number-columns-repeated="16379"/>
        </table:table-row>
        <table:table-row table:style-name="ro1">
          <table:table-cell office:value-type="float" office:value="194899708" calcext:value-type="float">
            <text:p>194899708</text:p>
          </table:table-cell>
          <table:table-cell table:style-name="ce3" office:value-type="date" office:date-value="2023-09-27" calcext:value-type="date">
            <text:p>27/09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FB2A14FA09BE7FC141FBA8E2FAAB29E</text:p>
          </table:table-cell>
          <table:table-cell table:style-name="ce2" table:number-columns-repeated="16379"/>
        </table:table-row>
        <table:table-row table:style-name="ro1">
          <table:table-cell office:value-type="float" office:value="194712131" calcext:value-type="float">
            <text:p>194712131</text:p>
          </table:table-cell>
          <table:table-cell table:style-name="ce3" office:value-type="date" office:date-value="2023-09-26" calcext:value-type="date">
            <text:p>26/09/2023</text:p>
          </table:table-cell>
          <table:table-cell office:value-type="string" calcext:value-type="string">
            <text:p>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61E5163C1F3367E9B4892144CC830BA</text:p>
          </table:table-cell>
          <table:table-cell table:style-name="ce2" table:number-columns-repeated="16379"/>
        </table:table-row>
        <table:table-row table:style-name="ro1">
          <table:table-cell office:value-type="float" office:value="194568334" calcext:value-type="float">
            <text:p>194568334</text:p>
          </table:table-cell>
          <table:table-cell table:style-name="ce3" office:value-type="date" office:date-value="2023-09-24" calcext:value-type="date">
            <text:p>24/09/2023</text:p>
          </table:table-cell>
          <table:table-cell office:value-type="string" calcext:value-type="string">
            <text:p>D</text:p>
          </table:table-cell>
          <table:table-cell office:value-type="float" office:value="541.6" calcext:value-type="float">
            <text:p>541.6</text:p>
          </table:table-cell>
          <table:table-cell office:value-type="string" calcext:value-type="string">
            <text:p>80EAD4116B3F9CB3DBC26B0EA4D1372C</text:p>
          </table:table-cell>
          <table:table-cell table:style-name="ce2" table:number-columns-repeated="16379"/>
        </table:table-row>
        <table:table-row table:style-name="ro1">
          <table:table-cell office:value-type="float" office:value="194457335" calcext:value-type="float">
            <text:p>194457335</text:p>
          </table:table-cell>
          <table:table-cell table:style-name="ce3" office:value-type="date" office:date-value="2023-09-23" calcext:value-type="date">
            <text:p>23/09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96B58C9EB8A54F2169B01FA21F11DB</text:p>
          </table:table-cell>
          <table:table-cell table:style-name="ce2" table:number-columns-repeated="16379"/>
        </table:table-row>
        <table:table-row table:style-name="ro1">
          <table:table-cell office:value-type="float" office:value="194293929" calcext:value-type="float">
            <text:p>194293929</text:p>
          </table:table-cell>
          <table:table-cell table:style-name="ce3" office:value-type="date" office:date-value="2023-09-21" calcext:value-type="date">
            <text:p>21/09/2023</text:p>
          </table:table-cell>
          <table:table-cell office:value-type="string" calcext:value-type="string">
            <text:p>D</text:p>
          </table:table-cell>
          <table:table-cell office:value-type="float" office:value="113231.89" calcext:value-type="float">
            <text:p>113231.89</text:p>
          </table:table-cell>
          <table:table-cell office:value-type="string" calcext:value-type="string">
            <text:p>05211F45E6ABA87D8A96BAB9836A76C8</text:p>
          </table:table-cell>
          <table:table-cell table:style-name="ce2" table:number-columns-repeated="16379"/>
        </table:table-row>
        <table:table-row table:style-name="ro1">
          <table:table-cell office:value-type="float" office:value="194143554" calcext:value-type="float">
            <text:p>194143554</text:p>
          </table:table-cell>
          <table:table-cell table:style-name="ce3" office:value-type="date" office:date-value="2023-09-20" calcext:value-type="date">
            <text:p>20/09/2023</text:p>
          </table:table-cell>
          <table:table-cell office:value-type="string" calcext:value-type="string">
            <text:p>D</text:p>
          </table:table-cell>
          <table:table-cell office:value-type="float" office:value="33898.27" calcext:value-type="float">
            <text:p>33898.27</text:p>
          </table:table-cell>
          <table:table-cell office:value-type="string" calcext:value-type="string">
            <text:p>7342531C32C73E7CA3ADEFBBB9986E3B</text:p>
          </table:table-cell>
          <table:table-cell table:style-name="ce2" table:number-columns-repeated="16379"/>
        </table:table-row>
        <table:table-row table:style-name="ro1">
          <table:table-cell office:value-type="float" office:value="194035541" calcext:value-type="float">
            <text:p>194035541</text:p>
          </table:table-cell>
          <table:table-cell table:style-name="ce3" office:value-type="date" office:date-value="2023-09-19" calcext:value-type="date">
            <text:p>19/09/2023</text:p>
          </table:table-cell>
          <table:table-cell office:value-type="string" calcext:value-type="string">
            <text:p>D</text:p>
          </table:table-cell>
          <table:table-cell office:value-type="float" office:value="29378.82" calcext:value-type="float">
            <text:p>29378.82</text:p>
          </table:table-cell>
          <table:table-cell office:value-type="string" calcext:value-type="string">
            <text:p>1420190EC8489EDB3D6EED45DA832260</text:p>
          </table:table-cell>
          <table:table-cell table:style-name="ce2" table:number-columns-repeated="16379"/>
        </table:table-row>
        <table:table-row table:style-name="ro1">
          <table:table-cell office:value-type="float" office:value="193878972" calcext:value-type="float">
            <text:p>193878972</text:p>
          </table:table-cell>
          <table:table-cell table:style-name="ce3" office:value-type="date" office:date-value="2023-09-17" calcext:value-type="date">
            <text:p>17/09/2023</text:p>
          </table:table-cell>
          <table:table-cell office:value-type="string" calcext:value-type="string">
            <text:p>D</text:p>
          </table:table-cell>
          <table:table-cell office:value-type="float" office:value="16198.2" calcext:value-type="float">
            <text:p>16198.2</text:p>
          </table:table-cell>
          <table:table-cell office:value-type="string" calcext:value-type="string">
            <text:p>AC238DD1CCA81B0EC136BA2949600064</text:p>
          </table:table-cell>
          <table:table-cell table:style-name="ce2" table:number-columns-repeated="16379"/>
        </table:table-row>
        <table:table-row table:style-name="ro1">
          <table:table-cell office:value-type="float" office:value="193738216" calcext:value-type="float">
            <text:p>193738216</text:p>
          </table:table-cell>
          <table:table-cell table:style-name="ce3" office:value-type="date" office:date-value="2023-09-16" calcext:value-type="date">
            <text:p>16/09/2023</text:p>
          </table:table-cell>
          <table:table-cell office:value-type="string" calcext:value-type="string">
            <text:p>D</text:p>
          </table:table-cell>
          <table:table-cell office:value-type="float" office:value="183137.08" calcext:value-type="float">
            <text:p>183137.08</text:p>
          </table:table-cell>
          <table:table-cell office:value-type="string" calcext:value-type="string">
            <text:p>7339A6FA63F527C79CB6D29DC4A62240</text:p>
          </table:table-cell>
          <table:table-cell table:style-name="ce2" table:number-columns-repeated="16379"/>
        </table:table-row>
        <table:table-row table:style-name="ro1">
          <table:table-cell office:value-type="float" office:value="193627743" calcext:value-type="float">
            <text:p>193627743</text:p>
          </table:table-cell>
          <table:table-cell table:style-name="ce3" office:value-type="date" office:date-value="2023-09-15" calcext:value-type="date">
            <text:p>15/09/2023</text:p>
          </table:table-cell>
          <table:table-cell office:value-type="string" calcext:value-type="string">
            <text:p>D</text:p>
          </table:table-cell>
          <table:table-cell office:value-type="float" office:value="22724.17" calcext:value-type="float">
            <text:p>22724.17</text:p>
          </table:table-cell>
          <table:table-cell office:value-type="string" calcext:value-type="string">
            <text:p>9C9FF8FD6B4E2F02D1E369E568BE22A7</text:p>
          </table:table-cell>
          <table:table-cell table:style-name="ce2" table:number-columns-repeated="16379"/>
        </table:table-row>
        <table:table-row table:style-name="ro1">
          <table:table-cell office:value-type="float" office:value="193522955" calcext:value-type="float">
            <text:p>193522955</text:p>
          </table:table-cell>
          <table:table-cell table:style-name="ce3" office:value-type="date" office:date-value="2023-09-14" calcext:value-type="date">
            <text:p>14/09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DE0DF0B964F2A90DB0B6E26F2B0A77</text:p>
          </table:table-cell>
          <table:table-cell table:style-name="ce2" table:number-columns-repeated="16379"/>
        </table:table-row>
        <table:table-row table:style-name="ro1">
          <table:table-cell office:value-type="float" office:value="193347721" calcext:value-type="float">
            <text:p>193347721</text:p>
          </table:table-cell>
          <table:table-cell table:style-name="ce3" office:value-type="date" office:date-value="2023-09-13" calcext:value-type="date">
            <text:p>13/09/2023</text:p>
          </table:table-cell>
          <table:table-cell office:value-type="string" calcext:value-type="string">
            <text:p>D</text:p>
          </table:table-cell>
          <table:table-cell office:value-type="float" office:value="85043.32" calcext:value-type="float">
            <text:p>85043.32</text:p>
          </table:table-cell>
          <table:table-cell office:value-type="string" calcext:value-type="string">
            <text:p>06D82E6671A1370421CACBA22C4F0A1B</text:p>
          </table:table-cell>
          <table:table-cell table:style-name="ce2" table:number-columns-repeated="16379"/>
        </table:table-row>
        <table:table-row table:style-name="ro1">
          <table:table-cell office:value-type="float" office:value="193218778" calcext:value-type="float">
            <text:p>193218778</text:p>
          </table:table-cell>
          <table:table-cell table:style-name="ce3" office:value-type="date" office:date-value="2023-09-12" calcext:value-type="date">
            <text:p>12/09/2023</text:p>
          </table:table-cell>
          <table:table-cell office:value-type="string" calcext:value-type="string">
            <text:p>D</text:p>
          </table:table-cell>
          <table:table-cell office:value-type="float" office:value="158768" calcext:value-type="float">
            <text:p>158768</text:p>
          </table:table-cell>
          <table:table-cell office:value-type="string" calcext:value-type="string">
            <text:p>E576D7A20EE213792634740CE318064E</text:p>
          </table:table-cell>
          <table:table-cell table:style-name="ce2" table:number-columns-repeated="16379"/>
        </table:table-row>
        <table:table-row table:style-name="ro1">
          <table:table-cell office:value-type="float" office:value="193074696" calcext:value-type="float">
            <text:p>193074696</text:p>
          </table:table-cell>
          <table:table-cell table:style-name="ce3" office:value-type="date" office:date-value="2023-09-10" calcext:value-type="date">
            <text:p>10/09/2023</text:p>
          </table:table-cell>
          <table:table-cell office:value-type="string" calcext:value-type="string">
            <text:p>D</text:p>
          </table:table-cell>
          <table:table-cell office:value-type="float" office:value="74.17" calcext:value-type="float">
            <text:p>74.17</text:p>
          </table:table-cell>
          <table:table-cell office:value-type="string" calcext:value-type="string">
            <text:p>9B85B531C4A040ED20BC89126BDC0ACB</text:p>
          </table:table-cell>
          <table:table-cell table:style-name="ce2" table:number-columns-repeated="16379"/>
        </table:table-row>
        <table:table-row table:style-name="ro1">
          <table:table-cell office:value-type="float" office:value="192906980" calcext:value-type="float">
            <text:p>192906980</text:p>
          </table:table-cell>
          <table:table-cell table:style-name="ce3" office:value-type="date" office:date-value="2023-09-09" calcext:value-type="date">
            <text:p>09/09/2023</text:p>
          </table:table-cell>
          <table:table-cell office:value-type="string" calcext:value-type="string">
            <text:p>D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A08D190AF6D2569C5AA55A90A61EA5C0</text:p>
          </table:table-cell>
          <table:table-cell table:style-name="ce2" table:number-columns-repeated="16379"/>
        </table:table-row>
        <table:table-row table:style-name="ro1">
          <table:table-cell office:value-type="float" office:value="192777257" calcext:value-type="float">
            <text:p>192777257</text:p>
          </table:table-cell>
          <table:table-cell table:style-name="ce3" office:value-type="date" office:date-value="2023-09-07" calcext:value-type="date">
            <text:p>07/09/2023</text:p>
          </table:table-cell>
          <table:table-cell office:value-type="string" calcext:value-type="string">
            <text:p>D</text:p>
          </table:table-cell>
          <table:table-cell office:value-type="float" office:value="15341.74" calcext:value-type="float">
            <text:p>15341.74</text:p>
          </table:table-cell>
          <table:table-cell office:value-type="string" calcext:value-type="string">
            <text:p>1FCE5A8F5B4F573EE809C9CA4596AE4D</text:p>
          </table:table-cell>
          <table:table-cell table:style-name="ce2" table:number-columns-repeated="16379"/>
        </table:table-row>
        <table:table-row table:style-name="ro1">
          <table:table-cell office:value-type="float" office:value="192669842" calcext:value-type="float">
            <text:p>192669842</text:p>
          </table:table-cell>
          <table:table-cell table:style-name="ce3" office:value-type="date" office:date-value="2023-09-06" calcext:value-type="date">
            <text:p>06/09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3FEACC4B303F8730BF83ECA2F7B39A</text:p>
          </table:table-cell>
          <table:table-cell table:style-name="ce2" table:number-columns-repeated="16379"/>
        </table:table-row>
        <table:table-row table:style-name="ro1">
          <table:table-cell office:value-type="float" office:value="192495652" calcext:value-type="float">
            <text:p>192495652</text:p>
          </table:table-cell>
          <table:table-cell table:style-name="ce3" office:value-type="date" office:date-value="2023-09-05" calcext:value-type="date">
            <text:p>05/09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7E6F4ACADCE59FA476B3F8E2BA9006</text:p>
          </table:table-cell>
          <table:table-cell table:style-name="ce2" table:number-columns-repeated="16379"/>
        </table:table-row>
        <table:table-row table:style-name="ro1">
          <table:table-cell office:value-type="float" office:value="192331835" calcext:value-type="float">
            <text:p>192331835</text:p>
          </table:table-cell>
          <table:table-cell table:style-name="ce3" office:value-type="date" office:date-value="2023-09-04" calcext:value-type="date">
            <text:p>04/09/2023</text:p>
          </table:table-cell>
          <table:table-cell office:value-type="string" calcext:value-type="string">
            <text:p>D</text:p>
          </table:table-cell>
          <table:table-cell office:value-type="float" office:value="65400" calcext:value-type="float">
            <text:p>65400</text:p>
          </table:table-cell>
          <table:table-cell office:value-type="string" calcext:value-type="string">
            <text:p>240B256AE25165866998727A91A18ED2</text:p>
          </table:table-cell>
          <table:table-cell table:style-name="ce2" table:number-columns-repeated="16379"/>
        </table:table-row>
        <table:table-row table:style-name="ro1">
          <table:table-cell office:value-type="float" office:value="192221184" calcext:value-type="float">
            <text:p>192221184</text:p>
          </table:table-cell>
          <table:table-cell table:style-name="ce3" office:value-type="date" office:date-value="2023-09-02" calcext:value-type="date">
            <text:p>02/09/2023</text:p>
          </table:table-cell>
          <table:table-cell office:value-type="string" calcext:value-type="string">
            <text:p>D</text:p>
          </table:table-cell>
          <table:table-cell office:value-type="float" office:value="3499.55" calcext:value-type="float">
            <text:p>3499.55</text:p>
          </table:table-cell>
          <table:table-cell office:value-type="string" calcext:value-type="string">
            <text:p>F9EA880CA8A6BBA710F96BC9C95F091C</text:p>
          </table:table-cell>
          <table:table-cell table:style-name="ce2" table:number-columns-repeated="16379"/>
        </table:table-row>
        <table:table-row table:style-name="ro1">
          <table:table-cell office:value-type="float" office:value="192104841" calcext:value-type="float">
            <text:p>192104841</text:p>
          </table:table-cell>
          <table:table-cell table:style-name="ce3" office:value-type="date" office:date-value="2023-09-01" calcext:value-type="date">
            <text:p>01/09/2023</text:p>
          </table:table-cell>
          <table:table-cell office:value-type="string" calcext:value-type="string">
            <text:p>D</text:p>
          </table:table-cell>
          <table:table-cell office:value-type="float" office:value="78082.18" calcext:value-type="float">
            <text:p>78082.18</text:p>
          </table:table-cell>
          <table:table-cell office:value-type="string" calcext:value-type="string">
            <text:p>60A7EB1B208DC1EE8BA053F75D3DC48C</text:p>
          </table:table-cell>
          <table:table-cell table:style-name="ce2" table:number-columns-repeated="16379"/>
        </table:table-row>
        <table:table-row table:style-name="ro1">
          <table:table-cell office:value-type="float" office:value="191969747" calcext:value-type="float">
            <text:p>191969747</text:p>
          </table:table-cell>
          <table:table-cell table:style-name="ce3" office:value-type="date" office:date-value="2023-08-31" calcext:value-type="date">
            <text:p>31/08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CD69252A2D268BBADFD3F3618A0385F</text:p>
          </table:table-cell>
          <table:table-cell table:style-name="ce2" table:number-columns-repeated="16379"/>
        </table:table-row>
        <table:table-row table:style-name="ro1">
          <table:table-cell office:value-type="float" office:value="191765908" calcext:value-type="float">
            <text:p>191765908</text:p>
          </table:table-cell>
          <table:table-cell table:style-name="ce3" office:value-type="date" office:date-value="2023-08-30" calcext:value-type="date">
            <text:p>30/08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A6CB2ED7CDD064560EC62D2C161AFF</text:p>
          </table:table-cell>
          <table:table-cell table:style-name="ce2" table:number-columns-repeated="16379"/>
        </table:table-row>
        <table:table-row table:style-name="ro1">
          <table:table-cell office:value-type="float" office:value="191655910" calcext:value-type="float">
            <text:p>191655910</text:p>
          </table:table-cell>
          <table:table-cell table:style-name="ce3" office:value-type="date" office:date-value="2023-08-29" calcext:value-type="date">
            <text:p>29/08/2023</text:p>
          </table:table-cell>
          <table:table-cell office:value-type="string" calcext:value-type="string">
            <text:p>D</text:p>
          </table:table-cell>
          <table:table-cell office:value-type="float" office:value="927.81" calcext:value-type="float">
            <text:p>927.81</text:p>
          </table:table-cell>
          <table:table-cell office:value-type="string" calcext:value-type="string">
            <text:p>25599DF9BAEBED3CBD9A1D8914E951DE</text:p>
          </table:table-cell>
          <table:table-cell table:style-name="ce2" table:number-columns-repeated="16379"/>
        </table:table-row>
        <table:table-row table:style-name="ro1">
          <table:table-cell office:value-type="float" office:value="191487557" calcext:value-type="float">
            <text:p>191487557</text:p>
          </table:table-cell>
          <table:table-cell table:style-name="ce3" office:value-type="date" office:date-value="2023-08-27" calcext:value-type="date">
            <text:p>27/08/2023</text:p>
          </table:table-cell>
          <table:table-cell office:value-type="string" calcext:value-type="string">
            <text:p>D</text:p>
          </table:table-cell>
          <table:table-cell office:value-type="float" office:value="13489.04" calcext:value-type="float">
            <text:p>13489.04</text:p>
          </table:table-cell>
          <table:table-cell office:value-type="string" calcext:value-type="string">
            <text:p>DF2D375FB009AE73A3FD509F541BDC45</text:p>
          </table:table-cell>
          <table:table-cell table:style-name="ce2" table:number-columns-repeated="16379"/>
        </table:table-row>
        <table:table-row table:style-name="ro1">
          <table:table-cell office:value-type="float" office:value="191381343" calcext:value-type="float">
            <text:p>191381343</text:p>
          </table:table-cell>
          <table:table-cell table:style-name="ce3" office:value-type="date" office:date-value="2023-08-26" calcext:value-type="date">
            <text:p>26/08/2023</text:p>
          </table:table-cell>
          <table:table-cell office:value-type="string" calcext:value-type="string">
            <text:p>D</text:p>
          </table:table-cell>
          <table:table-cell office:value-type="float" office:value="25628.96" calcext:value-type="float">
            <text:p>25628.96</text:p>
          </table:table-cell>
          <table:table-cell office:value-type="string" calcext:value-type="string">
            <text:p>3179433F26E824667EAA9E60E710D5CB</text:p>
          </table:table-cell>
          <table:table-cell table:style-name="ce2" table:number-columns-repeated="16379"/>
        </table:table-row>
        <table:table-row table:style-name="ro1">
          <table:table-cell office:value-type="float" office:value="191236010" calcext:value-type="float">
            <text:p>191236010</text:p>
          </table:table-cell>
          <table:table-cell table:style-name="ce3" office:value-type="date" office:date-value="2023-08-25" calcext:value-type="date">
            <text:p>25/08/2023</text:p>
          </table:table-cell>
          <table:table-cell office:value-type="string" calcext:value-type="string">
            <text:p>D</text:p>
          </table:table-cell>
          <table:table-cell office:value-type="float" office:value="79713.55" calcext:value-type="float">
            <text:p>79713.55</text:p>
          </table:table-cell>
          <table:table-cell office:value-type="string" calcext:value-type="string">
            <text:p>CDD315219E7A6A3D7AF618C5AF9C9850</text:p>
          </table:table-cell>
          <table:table-cell table:style-name="ce2" table:number-columns-repeated="16379"/>
        </table:table-row>
        <table:table-row table:style-name="ro1">
          <table:table-cell office:value-type="float" office:value="191146915" calcext:value-type="float">
            <text:p>191146915</text:p>
          </table:table-cell>
          <table:table-cell table:style-name="ce3" office:value-type="date" office:date-value="2023-08-24" calcext:value-type="date">
            <text:p>24/08/2023</text:p>
          </table:table-cell>
          <table:table-cell office:value-type="string" calcext:value-type="string">
            <text:p>D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63AF4A875D76FCA16AB494EE747DD8A</text:p>
          </table:table-cell>
          <table:table-cell table:style-name="ce2" table:number-columns-repeated="16379"/>
        </table:table-row>
        <table:table-row table:style-name="ro1">
          <table:table-cell office:value-type="float" office:value="190960726" calcext:value-type="float">
            <text:p>190960726</text:p>
          </table:table-cell>
          <table:table-cell table:style-name="ce3" office:value-type="date" office:date-value="2023-08-23" calcext:value-type="date">
            <text:p>23/08/2023</text:p>
          </table:table-cell>
          <table:table-cell office:value-type="string" calcext:value-type="string">
            <text:p>D</text:p>
          </table:table-cell>
          <table:table-cell office:value-type="float" office:value="72623.82" calcext:value-type="float">
            <text:p>72623.82</text:p>
          </table:table-cell>
          <table:table-cell office:value-type="string" calcext:value-type="string">
            <text:p>3D65C1C0B11BE6382120F7AB7B7A4A5E</text:p>
          </table:table-cell>
          <table:table-cell table:style-name="ce2" table:number-columns-repeated="16379"/>
        </table:table-row>
        <table:table-row table:style-name="ro1">
          <table:table-cell office:value-type="float" office:value="190852976" calcext:value-type="float">
            <text:p>190852976</text:p>
          </table:table-cell>
          <table:table-cell table:style-name="ce3" office:value-type="date" office:date-value="2023-08-22" calcext:value-type="date">
            <text:p>22/08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61E0C3D913515F5A405F7A46417F99</text:p>
          </table:table-cell>
          <table:table-cell table:style-name="ce2" table:number-columns-repeated="16379"/>
        </table:table-row>
        <table:table-row table:style-name="ro1">
          <table:table-cell office:value-type="float" office:value="190702784" calcext:value-type="float">
            <text:p>190702784</text:p>
          </table:table-cell>
          <table:table-cell table:style-name="ce3" office:value-type="date" office:date-value="2023-08-20" calcext:value-type="date">
            <text:p>20/08/2023</text:p>
          </table:table-cell>
          <table:table-cell office:value-type="string" calcext:value-type="string">
            <text:p>D</text:p>
          </table:table-cell>
          <table:table-cell office:value-type="float" office:value="113478.13" calcext:value-type="float">
            <text:p>113478.13</text:p>
          </table:table-cell>
          <table:table-cell office:value-type="string" calcext:value-type="string">
            <text:p>05211F45E6ABA87D8A96BAB9836A76C8</text:p>
          </table:table-cell>
          <table:table-cell table:style-name="ce2" table:number-columns-repeated="16379"/>
        </table:table-row>
        <table:table-row table:style-name="ro1">
          <table:table-cell office:value-type="float" office:value="190626105" calcext:value-type="float">
            <text:p>190626105</text:p>
          </table:table-cell>
          <table:table-cell table:style-name="ce3" office:value-type="date" office:date-value="2023-08-19" calcext:value-type="date">
            <text:p>19/08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A1191BE4CE9D14206C1277035491B0F</text:p>
          </table:table-cell>
          <table:table-cell table:style-name="ce2" table:number-columns-repeated="16379"/>
        </table:table-row>
        <table:table-row table:style-name="ro1">
          <table:table-cell office:value-type="float" office:value="190498575" calcext:value-type="float">
            <text:p>190498575</text:p>
          </table:table-cell>
          <table:table-cell table:style-name="ce3" office:value-type="date" office:date-value="2023-08-18" calcext:value-type="date">
            <text:p>18/08/202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6D984DCEB949F6936B9ABFE24AC784</text:p>
          </table:table-cell>
          <table:table-cell table:style-name="ce2" table:number-columns-repeated="16379"/>
        </table:table-row>
        <table:table-row table:style-name="ro1">
          <table:table-cell office:value-type="float" office:value="190188813" calcext:value-type="float">
            <text:p>190188813</text:p>
          </table:table-cell>
          <table:table-cell table:style-name="ce3" office:value-type="date" office:date-value="2023-08-17" calcext:value-type="date">
            <text:p>17/08/2023</text:p>
          </table:table-cell>
          <table:table-cell office:value-type="string" calcext:value-type="string">
            <text:p>D</text:p>
          </table:table-cell>
          <table:table-cell office:value-type="float" office:value="137319.44" calcext:value-type="float">
            <text:p>137319.44</text:p>
          </table:table-cell>
          <table:table-cell office:value-type="string" calcext:value-type="string">
            <text:p>77F728D46FE292C58062C3F62DB451BE</text:p>
          </table:table-cell>
          <table:table-cell table:style-name="ce2" table:number-columns-repeated="16379"/>
        </table:table-row>
        <table:table-row table:style-name="ro1">
          <table:table-cell office:value-type="float" office:value="189916449" calcext:value-type="float">
            <text:p>189916449</text:p>
          </table:table-cell>
          <table:table-cell table:style-name="ce3" office:value-type="date" office:date-value="2023-08-16" calcext:value-type="date">
            <text:p>16/08/2023</text:p>
          </table:table-cell>
          <table:table-cell office:value-type="string" calcext:value-type="string">
            <text:p>D</text:p>
          </table:table-cell>
          <table:table-cell office:value-type="float" office:value="77221.29" calcext:value-type="float">
            <text:p>77221.29</text:p>
          </table:table-cell>
          <table:table-cell office:value-type="string" calcext:value-type="string">
            <text:p>19681C1DBB53A587EC977B4EC1570F18</text:p>
          </table:table-cell>
          <table:table-cell table:style-name="ce2" table:number-columns-repeated="16379"/>
        </table:table-row>
        <table:table-row table:style-name="ro1">
          <table:table-cell office:value-type="float" office:value="189621655" calcext:value-type="float">
            <text:p>189621655</text:p>
          </table:table-cell>
          <table:table-cell table:style-name="ce3" office:value-type="date" office:date-value="2023-08-13" calcext:value-type="date">
            <text:p>13/08/2023</text:p>
          </table:table-cell>
          <table:table-cell office:value-type="string" calcext:value-type="string">
            <text:p>D</text:p>
          </table:table-cell>
          <table:table-cell office:value-type="float" office:value="9563.24" calcext:value-type="float">
            <text:p>9563.24</text:p>
          </table:table-cell>
          <table:table-cell office:value-type="string" calcext:value-type="string">
            <text:p>91BFBAC6A5653A2BFF7A0686B0294E41</text:p>
          </table:table-cell>
          <table:table-cell table:style-name="ce2" table:number-columns-repeated="16379"/>
        </table:table-row>
        <table:table-row table:style-name="ro1">
          <table:table-cell office:value-type="float" office:value="189544355" calcext:value-type="float">
            <text:p>189544355</text:p>
          </table:table-cell>
          <table:table-cell table:style-name="ce3" office:value-type="date" office:date-value="2023-08-12" calcext:value-type="date">
            <text:p>12/08/2023</text:p>
          </table:table-cell>
          <table:table-cell office:value-type="string" calcext:value-type="string">
            <text:p>D</text:p>
          </table:table-cell>
          <table:table-cell office:value-type="float" office:value="16530.47" calcext:value-type="float">
            <text:p>16530.47</text:p>
          </table:table-cell>
          <table:table-cell office:value-type="string" calcext:value-type="string">
            <text:p>7BFB420B5FB152EDB37351F40FF33440</text:p>
          </table:table-cell>
          <table:table-cell table:style-name="ce2" table:number-columns-repeated="16379"/>
        </table:table-row>
        <table:table-row table:style-name="ro1">
          <table:table-cell office:value-type="float" office:value="189193289" calcext:value-type="float">
            <text:p>189193289</text:p>
          </table:table-cell>
          <table:table-cell table:style-name="ce3" office:value-type="date" office:date-value="2023-08-11" calcext:value-type="date">
            <text:p>11/08/2023</text:p>
          </table:table-cell>
          <table:table-cell office:value-type="string" calcext:value-type="string">
            <text:p>D</text:p>
          </table:table-cell>
          <table:table-cell office:value-type="float" office:value="18119.79" calcext:value-type="float">
            <text:p>18119.79</text:p>
          </table:table-cell>
          <table:table-cell office:value-type="string" calcext:value-type="string">
            <text:p>CBF0B43CE065476AAF6BA7C2583034AF</text:p>
          </table:table-cell>
          <table:table-cell table:style-name="ce2" table:number-columns-repeated="16379"/>
        </table:table-row>
        <table:table-row table:style-name="ro1">
          <table:table-cell office:value-type="float" office:value="188995050" calcext:value-type="float">
            <text:p>188995050</text:p>
          </table:table-cell>
          <table:table-cell table:style-name="ce3" office:value-type="date" office:date-value="2023-08-10" calcext:value-type="date">
            <text:p>10/08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FB576E8C1531BF9E8241E948618798</text:p>
          </table:table-cell>
          <table:table-cell table:style-name="ce2" table:number-columns-repeated="16379"/>
        </table:table-row>
        <table:table-row table:style-name="ro1">
          <table:table-cell office:value-type="float" office:value="188822128" calcext:value-type="float">
            <text:p>188822128</text:p>
          </table:table-cell>
          <table:table-cell table:style-name="ce3" office:value-type="date" office:date-value="2023-08-09" calcext:value-type="date">
            <text:p>09/08/2023</text:p>
          </table:table-cell>
          <table:table-cell office:value-type="string" calcext:value-type="string">
            <text:p>D</text:p>
          </table:table-cell>
          <table:table-cell office:value-type="float" office:value="376087" calcext:value-type="float">
            <text:p>376087</text:p>
          </table:table-cell>
          <table:table-cell office:value-type="string" calcext:value-type="string">
            <text:p>382183311B2542D813C816F268643A23</text:p>
          </table:table-cell>
          <table:table-cell table:style-name="ce2" table:number-columns-repeated="16379"/>
        </table:table-row>
        <table:table-row table:style-name="ro1">
          <table:table-cell office:value-type="float" office:value="188696351" calcext:value-type="float">
            <text:p>188696351</text:p>
          </table:table-cell>
          <table:table-cell table:style-name="ce3" office:value-type="date" office:date-value="2023-08-08" calcext:value-type="date">
            <text:p>08/08/2023</text:p>
          </table:table-cell>
          <table:table-cell office:value-type="string" calcext:value-type="string">
            <text:p>D</text:p>
          </table:table-cell>
          <table:table-cell office:value-type="float" office:value="4882.97" calcext:value-type="float">
            <text:p>4882.97</text:p>
          </table:table-cell>
          <table:table-cell office:value-type="string" calcext:value-type="string">
            <text:p>0AB9EDF709177A80AE134143B9E9793A</text:p>
          </table:table-cell>
          <table:table-cell table:style-name="ce2" table:number-columns-repeated="16379"/>
        </table:table-row>
        <table:table-row table:style-name="ro1">
          <table:table-cell office:value-type="float" office:value="188546196" calcext:value-type="float">
            <text:p>188546196</text:p>
          </table:table-cell>
          <table:table-cell table:style-name="ce3" office:value-type="date" office:date-value="2023-08-06" calcext:value-type="date">
            <text:p>06/08/2023</text:p>
          </table:table-cell>
          <table:table-cell office:value-type="string" calcext:value-type="string">
            <text:p>D</text:p>
          </table:table-cell>
          <table:table-cell office:value-type="float" office:value="26165.67" calcext:value-type="float">
            <text:p>26165.67</text:p>
          </table:table-cell>
          <table:table-cell office:value-type="string" calcext:value-type="string">
            <text:p>CC565124C590A114AB29E7F98C2DAE89</text:p>
          </table:table-cell>
          <table:table-cell table:style-name="ce2" table:number-columns-repeated="16379"/>
        </table:table-row>
        <table:table-row table:style-name="ro1">
          <table:table-cell office:value-type="float" office:value="188469048" calcext:value-type="float">
            <text:p>188469048</text:p>
          </table:table-cell>
          <table:table-cell table:style-name="ce3" office:value-type="date" office:date-value="2023-08-05" calcext:value-type="date">
            <text:p>05/08/2023</text:p>
          </table:table-cell>
          <table:table-cell office:value-type="string" calcext:value-type="string">
            <text:p>D</text:p>
          </table:table-cell>
          <table:table-cell office:value-type="float" office:value="187861.38" calcext:value-type="float">
            <text:p>187861.38</text:p>
          </table:table-cell>
          <table:table-cell office:value-type="string" calcext:value-type="string">
            <text:p>36B04375F2BDCF6C722C3FD172C6DBB3</text:p>
          </table:table-cell>
          <table:table-cell table:style-name="ce2" table:number-columns-repeated="16379"/>
        </table:table-row>
        <table:table-row table:style-name="ro1">
          <table:table-cell office:value-type="float" office:value="188299618" calcext:value-type="float">
            <text:p>188299618</text:p>
          </table:table-cell>
          <table:table-cell table:style-name="ce3" office:value-type="date" office:date-value="2023-08-04" calcext:value-type="date">
            <text:p>04/08/2023</text:p>
          </table:table-cell>
          <table:table-cell office:value-type="string" calcext:value-type="string">
            <text:p>D</text:p>
          </table:table-cell>
          <table:table-cell office:value-type="float" office:value="7108.28" calcext:value-type="float">
            <text:p>7108.28</text:p>
          </table:table-cell>
          <table:table-cell office:value-type="string" calcext:value-type="string">
            <text:p>F21B905909019F0D616067EB4BE9EE71</text:p>
          </table:table-cell>
          <table:table-cell table:style-name="ce2" table:number-columns-repeated="16379"/>
        </table:table-row>
        <table:table-row table:style-name="ro1">
          <table:table-cell office:value-type="float" office:value="188148969" calcext:value-type="float">
            <text:p>188148969</text:p>
          </table:table-cell>
          <table:table-cell table:style-name="ce3" office:value-type="date" office:date-value="2023-08-03" calcext:value-type="date">
            <text:p>03/08/2023</text:p>
          </table:table-cell>
          <table:table-cell office:value-type="string" calcext:value-type="string">
            <text:p>D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1EE613B51CF6799D53FF7A39947A895F</text:p>
          </table:table-cell>
          <table:table-cell table:style-name="ce2" table:number-columns-repeated="16379"/>
        </table:table-row>
        <table:table-row table:style-name="ro1">
          <table:table-cell office:value-type="float" office:value="188026157" calcext:value-type="float">
            <text:p>188026157</text:p>
          </table:table-cell>
          <table:table-cell table:style-name="ce3" office:value-type="date" office:date-value="2023-08-02" calcext:value-type="date">
            <text:p>02/08/2023</text:p>
          </table:table-cell>
          <table:table-cell office:value-type="string" calcext:value-type="string">
            <text:p>D</text:p>
          </table:table-cell>
          <table:table-cell office:value-type="float" office:value="391656" calcext:value-type="float">
            <text:p>391656</text:p>
          </table:table-cell>
          <table:table-cell office:value-type="string" calcext:value-type="string">
            <text:p>9E4DA95F3C0D559617D46514C15A3662</text:p>
          </table:table-cell>
          <table:table-cell table:style-name="ce2" table:number-columns-repeated="16379"/>
        </table:table-row>
        <table:table-row table:style-name="ro1">
          <table:table-cell office:value-type="float" office:value="187935330" calcext:value-type="float">
            <text:p>187935330</text:p>
          </table:table-cell>
          <table:table-cell table:style-name="ce3" office:value-type="date" office:date-value="2023-08-01" calcext:value-type="date">
            <text:p>01/08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26826E4A44A7D92941B63BBB53E38</text:p>
          </table:table-cell>
          <table:table-cell table:style-name="ce2" table:number-columns-repeated="16379"/>
        </table:table-row>
        <table:table-row table:style-name="ro1">
          <table:table-cell office:value-type="float" office:value="187692225" calcext:value-type="float">
            <text:p>187692225</text:p>
          </table:table-cell>
          <table:table-cell table:style-name="ce3" office:value-type="date" office:date-value="2023-07-30" calcext:value-type="date">
            <text:p>30/07/2023</text:p>
          </table:table-cell>
          <table:table-cell office:value-type="string" calcext:value-type="string">
            <text:p>D</text:p>
          </table:table-cell>
          <table:table-cell office:value-type="float" office:value="141076.02" calcext:value-type="float">
            <text:p>141076.02</text:p>
          </table:table-cell>
          <table:table-cell office:value-type="string" calcext:value-type="string">
            <text:p>C77967EB434F66CD4AFA31C23311DD56</text:p>
          </table:table-cell>
          <table:table-cell table:style-name="ce2" table:number-columns-repeated="16379"/>
        </table:table-row>
        <table:table-row table:style-name="ro1">
          <table:table-cell office:value-type="float" office:value="187584003" calcext:value-type="float">
            <text:p>187584003</text:p>
          </table:table-cell>
          <table:table-cell table:style-name="ce3" office:value-type="date" office:date-value="2023-07-29" calcext:value-type="date">
            <text:p>29/07/2023</text:p>
          </table:table-cell>
          <table:table-cell office:value-type="string" calcext:value-type="string">
            <text:p>D</text:p>
          </table:table-cell>
          <table:table-cell office:value-type="float" office:value="13242.4" calcext:value-type="float">
            <text:p>13242.4</text:p>
          </table:table-cell>
          <table:table-cell office:value-type="string" calcext:value-type="string">
            <text:p>6AFB9DDA5C077AB20CC4164C12442119</text:p>
          </table:table-cell>
          <table:table-cell table:style-name="ce2" table:number-columns-repeated="16379"/>
        </table:table-row>
        <table:table-row table:style-name="ro1">
          <table:table-cell office:value-type="float" office:value="187456978" calcext:value-type="float">
            <text:p>187456978</text:p>
          </table:table-cell>
          <table:table-cell table:style-name="ce3" office:value-type="date" office:date-value="2023-07-28" calcext:value-type="date">
            <text:p>28/07/2023</text:p>
          </table:table-cell>
          <table:table-cell office:value-type="string" calcext:value-type="string">
            <text:p>D</text:p>
          </table:table-cell>
          <table:table-cell office:value-type="float" office:value="650.31" calcext:value-type="float">
            <text:p>650.31</text:p>
          </table:table-cell>
          <table:table-cell office:value-type="string" calcext:value-type="string">
            <text:p>1AECB91534C6C7B14DEE1CDB6E5C0AAC</text:p>
          </table:table-cell>
          <table:table-cell table:style-name="ce2" table:number-columns-repeated="16379"/>
        </table:table-row>
        <table:table-row table:style-name="ro1">
          <table:table-cell office:value-type="float" office:value="187284669" calcext:value-type="float">
            <text:p>187284669</text:p>
          </table:table-cell>
          <table:table-cell table:style-name="ce3" office:value-type="date" office:date-value="2023-07-27" calcext:value-type="date">
            <text:p>27/07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B884464211F04400B86D97E0674EF04</text:p>
          </table:table-cell>
          <table:table-cell table:style-name="ce2" table:number-columns-repeated="16379"/>
        </table:table-row>
        <table:table-row table:style-name="ro1">
          <table:table-cell office:value-type="float" office:value="187148062" calcext:value-type="float">
            <text:p>187148062</text:p>
          </table:table-cell>
          <table:table-cell table:style-name="ce3" office:value-type="date" office:date-value="2023-07-26" calcext:value-type="date">
            <text:p>26/07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12649A5D53F03632950D71A4DC24D4</text:p>
          </table:table-cell>
          <table:table-cell table:style-name="ce2" table:number-columns-repeated="16379"/>
        </table:table-row>
        <table:table-row table:style-name="ro1">
          <table:table-cell office:value-type="float" office:value="187022715" calcext:value-type="float">
            <text:p>187022715</text:p>
          </table:table-cell>
          <table:table-cell table:style-name="ce3" office:value-type="date" office:date-value="2023-07-25" calcext:value-type="date">
            <text:p>25/07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896B6DAD82A39189A77CB29DA3115A</text:p>
          </table:table-cell>
          <table:table-cell table:style-name="ce2" table:number-columns-repeated="16379"/>
        </table:table-row>
        <table:table-row table:style-name="ro1">
          <table:table-cell office:value-type="float" office:value="186886987" calcext:value-type="float">
            <text:p>186886987</text:p>
          </table:table-cell>
          <table:table-cell table:style-name="ce3" office:value-type="date" office:date-value="2023-07-23" calcext:value-type="date">
            <text:p>23/07/2023</text:p>
          </table:table-cell>
          <table:table-cell office:value-type="string" calcext:value-type="string">
            <text:p>D</text:p>
          </table:table-cell>
          <table:table-cell office:value-type="float" office:value="19081.72" calcext:value-type="float">
            <text:p>19081.72</text:p>
          </table:table-cell>
          <table:table-cell office:value-type="string" calcext:value-type="string">
            <text:p>D97009A3EABF324DB80B9F8E1D09EC9F</text:p>
          </table:table-cell>
          <table:table-cell table:style-name="ce2" table:number-columns-repeated="16379"/>
        </table:table-row>
        <table:table-row table:style-name="ro1">
          <table:table-cell office:value-type="float" office:value="186809274" calcext:value-type="float">
            <text:p>186809274</text:p>
          </table:table-cell>
          <table:table-cell table:style-name="ce3" office:value-type="date" office:date-value="2023-07-22" calcext:value-type="date">
            <text:p>22/07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EE3231624A0D4DA826173544D02486</text:p>
          </table:table-cell>
          <table:table-cell table:style-name="ce2" table:number-columns-repeated="16379"/>
        </table:table-row>
        <table:table-row table:style-name="ro1">
          <table:table-cell office:value-type="float" office:value="186645682" calcext:value-type="float">
            <text:p>186645682</text:p>
          </table:table-cell>
          <table:table-cell table:style-name="ce3" office:value-type="date" office:date-value="2023-07-21" calcext:value-type="date">
            <text:p>21/07/2023</text:p>
          </table:table-cell>
          <table:table-cell office:value-type="string" calcext:value-type="string">
            <text:p>D</text:p>
          </table:table-cell>
          <table:table-cell office:value-type="float" office:value="28082.38" calcext:value-type="float">
            <text:p>28082.38</text:p>
          </table:table-cell>
          <table:table-cell office:value-type="string" calcext:value-type="string">
            <text:p>8E8EB190FEB1FF5941141D2EF24AEC61</text:p>
          </table:table-cell>
          <table:table-cell table:style-name="ce2" table:number-columns-repeated="16379"/>
        </table:table-row>
        <table:table-row table:style-name="ro1">
          <table:table-cell office:value-type="float" office:value="186504050" calcext:value-type="float">
            <text:p>186504050</text:p>
          </table:table-cell>
          <table:table-cell table:style-name="ce3" office:value-type="date" office:date-value="2023-07-20" calcext:value-type="date">
            <text:p>20/07/2023</text:p>
          </table:table-cell>
          <table:table-cell office:value-type="string" calcext:value-type="string">
            <text:p>D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462F26F81B6BF51740411BAEF884C26B</text:p>
          </table:table-cell>
          <table:table-cell table:style-name="ce2" table:number-columns-repeated="16379"/>
        </table:table-row>
        <table:table-row table:style-name="ro1">
          <table:table-cell office:value-type="float" office:value="186432481" calcext:value-type="float">
            <text:p>186432481</text:p>
          </table:table-cell>
          <table:table-cell table:style-name="ce3" office:value-type="date" office:date-value="2023-07-19" calcext:value-type="date">
            <text:p>19/07/2023</text:p>
          </table:table-cell>
          <table:table-cell office:value-type="string" calcext:value-type="string">
            <text:p>D</text:p>
          </table:table-cell>
          <table:table-cell office:value-type="float" office:value="17475.05" calcext:value-type="float">
            <text:p>17475.05</text:p>
          </table:table-cell>
          <table:table-cell office:value-type="string" calcext:value-type="string">
            <text:p>951C438D1D40FEBEF9771AD4F5479AB7</text:p>
          </table:table-cell>
          <table:table-cell table:style-name="ce2" table:number-columns-repeated="16379"/>
        </table:table-row>
        <table:table-row table:style-name="ro1">
          <table:table-cell office:value-type="float" office:value="186250920" calcext:value-type="float">
            <text:p>186250920</text:p>
          </table:table-cell>
          <table:table-cell table:style-name="ce3" office:value-type="date" office:date-value="2023-07-18" calcext:value-type="date">
            <text:p>18/07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8AF97CD000C742B31F2D72F874839A</text:p>
          </table:table-cell>
          <table:table-cell table:style-name="ce2" table:number-columns-repeated="16379"/>
        </table:table-row>
        <table:table-row table:style-name="ro1">
          <table:table-cell office:value-type="float" office:value="186109993" calcext:value-type="float">
            <text:p>186109993</text:p>
          </table:table-cell>
          <table:table-cell table:style-name="ce3" office:value-type="date" office:date-value="2023-07-16" calcext:value-type="date">
            <text:p>16/07/2023</text:p>
          </table:table-cell>
          <table:table-cell office:value-type="string" calcext:value-type="string">
            <text:p>D</text:p>
          </table:table-cell>
          <table:table-cell office:value-type="float" office:value="109560.49" calcext:value-type="float">
            <text:p>109560.49</text:p>
          </table:table-cell>
          <table:table-cell office:value-type="string" calcext:value-type="string">
            <text:p>EB2ECFCD92B837467138E58CB55CC426</text:p>
          </table:table-cell>
          <table:table-cell table:style-name="ce2" table:number-columns-repeated="16379"/>
        </table:table-row>
        <table:table-row table:style-name="ro1">
          <table:table-cell office:value-type="float" office:value="186022369" calcext:value-type="float">
            <text:p>186022369</text:p>
          </table:table-cell>
          <table:table-cell table:style-name="ce3" office:value-type="date" office:date-value="2023-07-15" calcext:value-type="date">
            <text:p>15/07/2023</text:p>
          </table:table-cell>
          <table:table-cell office:value-type="string" calcext:value-type="string">
            <text:p>D</text:p>
          </table:table-cell>
          <table:table-cell office:value-type="float" office:value="334041.5" calcext:value-type="float">
            <text:p>334041.5</text:p>
          </table:table-cell>
          <table:table-cell office:value-type="string" calcext:value-type="string">
            <text:p>401F5EA448D32C89CE4D7C55AA9353FE</text:p>
          </table:table-cell>
          <table:table-cell table:style-name="ce2" table:number-columns-repeated="16379"/>
        </table:table-row>
        <table:table-row table:style-name="ro1">
          <table:table-cell office:value-type="float" office:value="185852043" calcext:value-type="float">
            <text:p>185852043</text:p>
          </table:table-cell>
          <table:table-cell table:style-name="ce3" office:value-type="date" office:date-value="2023-07-14" calcext:value-type="date">
            <text:p>14/07/2023</text:p>
          </table:table-cell>
          <table:table-cell office:value-type="string" calcext:value-type="string">
            <text:p>D</text:p>
          </table:table-cell>
          <table:table-cell office:value-type="float" office:value="1058.62" calcext:value-type="float">
            <text:p>1058.62</text:p>
          </table:table-cell>
          <table:table-cell office:value-type="string" calcext:value-type="string">
            <text:p>94153343AA3CB4935930DCDD619EA93E</text:p>
          </table:table-cell>
          <table:table-cell table:style-name="ce2" table:number-columns-repeated="16379"/>
        </table:table-row>
        <table:table-row table:style-name="ro1">
          <table:table-cell office:value-type="float" office:value="185776791" calcext:value-type="float">
            <text:p>185776791</text:p>
          </table:table-cell>
          <table:table-cell table:style-name="ce3" office:value-type="date" office:date-value="2023-07-13" calcext:value-type="date">
            <text:p>13/07/2023</text:p>
          </table:table-cell>
          <table:table-cell office:value-type="string" calcext:value-type="string">
            <text:p>D</text:p>
          </table:table-cell>
          <table:table-cell office:value-type="float" office:value="11358.6" calcext:value-type="float">
            <text:p>11358.6</text:p>
          </table:table-cell>
          <table:table-cell office:value-type="string" calcext:value-type="string">
            <text:p>98487A83BFF8A19099323EE7FBEBA43C</text:p>
          </table:table-cell>
          <table:table-cell table:style-name="ce2" table:number-columns-repeated="16379"/>
        </table:table-row>
        <table:table-row table:style-name="ro1">
          <table:table-cell office:value-type="float" office:value="185646920" calcext:value-type="float">
            <text:p>185646920</text:p>
          </table:table-cell>
          <table:table-cell table:style-name="ce3" office:value-type="date" office:date-value="2023-07-12" calcext:value-type="date">
            <text:p>12/07/2023</text:p>
          </table:table-cell>
          <table:table-cell office:value-type="string" calcext:value-type="string">
            <text:p>D</text:p>
          </table:table-cell>
          <table:table-cell office:value-type="float" office:value="88129.42" calcext:value-type="float">
            <text:p>88129.42</text:p>
          </table:table-cell>
          <table:table-cell office:value-type="string" calcext:value-type="string">
            <text:p>341BA68C49A7A0D581EEE0F856E7CF58</text:p>
          </table:table-cell>
          <table:table-cell table:style-name="ce2" table:number-columns-repeated="16379"/>
        </table:table-row>
        <table:table-row table:style-name="ro1">
          <table:table-cell office:value-type="float" office:value="185647181" calcext:value-type="float">
            <text:p>185647181</text:p>
          </table:table-cell>
          <table:table-cell table:style-name="ce3" office:value-type="date" office:date-value="2023-07-11" calcext:value-type="date">
            <text:p>11/07/2023</text:p>
          </table:table-cell>
          <table:table-cell office:value-type="string" calcext:value-type="string">
            <text:p>D</text:p>
          </table:table-cell>
          <table:table-cell office:value-type="float" office:value="76439.2" calcext:value-type="float">
            <text:p>76439.2</text:p>
          </table:table-cell>
          <table:table-cell office:value-type="string" calcext:value-type="string">
            <text:p>68C4BF851DF4B69D2E2FC9BACFE36AE5</text:p>
          </table:table-cell>
          <table:table-cell table:style-name="ce2" table:number-columns-repeated="16379"/>
        </table:table-row>
        <table:table-row table:style-name="ro1">
          <table:table-cell office:value-type="float" office:value="185466551" calcext:value-type="float">
            <text:p>185466551</text:p>
          </table:table-cell>
          <table:table-cell table:style-name="ce3" office:value-type="date" office:date-value="2023-07-11" calcext:value-type="date">
            <text:p>11/07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4CCD93E0B1B70AE5D720EE5ACF03F6</text:p>
          </table:table-cell>
          <table:table-cell table:style-name="ce2" table:number-columns-repeated="16379"/>
        </table:table-row>
        <table:table-row table:style-name="ro1">
          <table:table-cell office:value-type="float" office:value="185328896" calcext:value-type="float">
            <text:p>185328896</text:p>
          </table:table-cell>
          <table:table-cell table:style-name="ce3" office:value-type="date" office:date-value="2023-07-09" calcext:value-type="date">
            <text:p>09/07/2023</text:p>
          </table:table-cell>
          <table:table-cell office:value-type="string" calcext:value-type="string">
            <text:p>D</text:p>
          </table:table-cell>
          <table:table-cell office:value-type="float" office:value="5971.44" calcext:value-type="float">
            <text:p>5971.44</text:p>
          </table:table-cell>
          <table:table-cell office:value-type="string" calcext:value-type="string">
            <text:p>9F8F8E4D4D10DBAB1EDD6FE65FB79A31</text:p>
          </table:table-cell>
          <table:table-cell table:style-name="ce2" table:number-columns-repeated="16379"/>
        </table:table-row>
        <table:table-row table:style-name="ro1">
          <table:table-cell office:value-type="float" office:value="185194046" calcext:value-type="float">
            <text:p>185194046</text:p>
          </table:table-cell>
          <table:table-cell table:style-name="ce3" office:value-type="date" office:date-value="2023-07-08" calcext:value-type="date">
            <text:p>08/07/2023</text:p>
          </table:table-cell>
          <table:table-cell office:value-type="string" calcext:value-type="string">
            <text:p>D</text:p>
          </table:table-cell>
          <table:table-cell office:value-type="float" office:value="139000" calcext:value-type="float">
            <text:p>139000</text:p>
          </table:table-cell>
          <table:table-cell office:value-type="string" calcext:value-type="string">
            <text:p>670170B7C5DAE57A833D65DDEF17AF2F</text:p>
          </table:table-cell>
          <table:table-cell table:style-name="ce2" table:number-columns-repeated="16379"/>
        </table:table-row>
        <table:table-row table:style-name="ro1">
          <table:table-cell office:value-type="float" office:value="185096686" calcext:value-type="float">
            <text:p>185096686</text:p>
          </table:table-cell>
          <table:table-cell table:style-name="ce3" office:value-type="date" office:date-value="2023-07-07" calcext:value-type="date">
            <text:p>07/07/2023</text:p>
          </table:table-cell>
          <table:table-cell office:value-type="string" calcext:value-type="string">
            <text:p>D</text:p>
          </table:table-cell>
          <table:table-cell office:value-type="float" office:value="184477.64" calcext:value-type="float">
            <text:p>184477.64</text:p>
          </table:table-cell>
          <table:table-cell office:value-type="string" calcext:value-type="string">
            <text:p>40EC4E628648A5508B83B34CC9A2D7D5</text:p>
          </table:table-cell>
          <table:table-cell table:style-name="ce2" table:number-columns-repeated="16379"/>
        </table:table-row>
        <table:table-row table:style-name="ro1">
          <table:table-cell office:value-type="float" office:value="184952388" calcext:value-type="float">
            <text:p>184952388</text:p>
          </table:table-cell>
          <table:table-cell table:style-name="ce3" office:value-type="date" office:date-value="2023-07-06" calcext:value-type="date">
            <text:p>06/07/2023</text:p>
          </table:table-cell>
          <table:table-cell office:value-type="string" calcext:value-type="string">
            <text:p>D</text:p>
          </table:table-cell>
          <table:table-cell office:value-type="float" office:value="9999.52" calcext:value-type="float">
            <text:p>9999.52</text:p>
          </table:table-cell>
          <table:table-cell office:value-type="string" calcext:value-type="string">
            <text:p>5F17DFBEDDDDFF31D083F976FABA6382</text:p>
          </table:table-cell>
          <table:table-cell table:style-name="ce2" table:number-columns-repeated="16379"/>
        </table:table-row>
        <table:table-row table:style-name="ro1">
          <table:table-cell office:value-type="float" office:value="184797988" calcext:value-type="float">
            <text:p>184797988</text:p>
          </table:table-cell>
          <table:table-cell table:style-name="ce3" office:value-type="date" office:date-value="2023-07-05" calcext:value-type="date">
            <text:p>05/07/2023</text:p>
          </table:table-cell>
          <table:table-cell office:value-type="string" calcext:value-type="string">
            <text:p>D</text:p>
          </table:table-cell>
          <table:table-cell office:value-type="float" office:value="19105.81" calcext:value-type="float">
            <text:p>19105.81</text:p>
          </table:table-cell>
          <table:table-cell office:value-type="string" calcext:value-type="string">
            <text:p>75D30B8EF26F3F1D9984C824019F70C8</text:p>
          </table:table-cell>
          <table:table-cell table:style-name="ce2" table:number-columns-repeated="16379"/>
        </table:table-row>
        <table:table-row table:style-name="ro1">
          <table:table-cell office:value-type="float" office:value="184667158" calcext:value-type="float">
            <text:p>184667158</text:p>
          </table:table-cell>
          <table:table-cell table:style-name="ce3" office:value-type="date" office:date-value="2023-07-04" calcext:value-type="date">
            <text:p>04/07/2023</text:p>
          </table:table-cell>
          <table:table-cell office:value-type="string" calcext:value-type="string">
            <text:p>D</text:p>
          </table:table-cell>
          <table:table-cell office:value-type="float" office:value="9859.2" calcext:value-type="float">
            <text:p>9859.2</text:p>
          </table:table-cell>
          <table:table-cell office:value-type="string" calcext:value-type="string">
            <text:p>2A005C7582108E674921FB71C8C2E841</text:p>
          </table:table-cell>
          <table:table-cell table:style-name="ce2" table:number-columns-repeated="16379"/>
        </table:table-row>
        <table:table-row table:style-name="ro1">
          <table:table-cell office:value-type="float" office:value="184485550" calcext:value-type="float">
            <text:p>184485550</text:p>
          </table:table-cell>
          <table:table-cell table:style-name="ce3" office:value-type="date" office:date-value="2023-07-03" calcext:value-type="date">
            <text:p>03/07/2023</text:p>
          </table:table-cell>
          <table:table-cell office:value-type="string" calcext:value-type="string">
            <text:p>D</text:p>
          </table:table-cell>
          <table:table-cell office:value-type="float" office:value="84029.58" calcext:value-type="float">
            <text:p>84029.58</text:p>
          </table:table-cell>
          <table:table-cell office:value-type="string" calcext:value-type="string">
            <text:p>62ECADE2A6EECDDB4BFF37B71BAC4C61</text:p>
          </table:table-cell>
          <table:table-cell table:style-name="ce2" table:number-columns-repeated="16379"/>
        </table:table-row>
        <table:table-row table:style-name="ro1">
          <table:table-cell office:value-type="float" office:value="184342036" calcext:value-type="float">
            <text:p>184342036</text:p>
          </table:table-cell>
          <table:table-cell table:style-name="ce3" office:value-type="date" office:date-value="2023-07-01" calcext:value-type="date">
            <text:p>01/07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B0B57A0D5642B8DAB84D81786889628</text:p>
          </table:table-cell>
          <table:table-cell table:style-name="ce2" table:number-columns-repeated="16379"/>
        </table:table-row>
        <table:table-row table:style-name="ro1">
          <table:table-cell office:value-type="float" office:value="184162313" calcext:value-type="float">
            <text:p>184162313</text:p>
          </table:table-cell>
          <table:table-cell table:style-name="ce3" office:value-type="date" office:date-value="2023-06-30" calcext:value-type="date">
            <text:p>30/06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70EEAB69F70E77247685E804931C2A</text:p>
          </table:table-cell>
          <table:table-cell table:style-name="ce2" table:number-columns-repeated="16379"/>
        </table:table-row>
        <table:table-row table:style-name="ro1">
          <table:table-cell office:value-type="float" office:value="184018875" calcext:value-type="float">
            <text:p>184018875</text:p>
          </table:table-cell>
          <table:table-cell table:style-name="ce3" office:value-type="date" office:date-value="2023-06-28" calcext:value-type="date">
            <text:p>28/06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32289C06539E4383635D5F3A2CCDD2</text:p>
          </table:table-cell>
          <table:table-cell table:style-name="ce2" table:number-columns-repeated="16379"/>
        </table:table-row>
        <table:table-row table:style-name="ro1">
          <table:table-cell office:value-type="float" office:value="183903431" calcext:value-type="float">
            <text:p>183903431</text:p>
          </table:table-cell>
          <table:table-cell table:style-name="ce3" office:value-type="date" office:date-value="2023-06-27" calcext:value-type="date">
            <text:p>27/06/2023</text:p>
          </table:table-cell>
          <table:table-cell office:value-type="string" calcext:value-type="string">
            <text:p>D</text:p>
          </table:table-cell>
          <table:table-cell office:value-type="float" office:value="29656" calcext:value-type="float">
            <text:p>29656</text:p>
          </table:table-cell>
          <table:table-cell office:value-type="string" calcext:value-type="string">
            <text:p>0BD539D0EE4025C42D14E87506933B42</text:p>
          </table:table-cell>
          <table:table-cell table:style-name="ce2" table:number-columns-repeated="16379"/>
        </table:table-row>
        <table:table-row table:style-name="ro1">
          <table:table-cell office:value-type="float" office:value="183748085" calcext:value-type="float">
            <text:p>183748085</text:p>
          </table:table-cell>
          <table:table-cell table:style-name="ce3" office:value-type="date" office:date-value="2023-06-25" calcext:value-type="date">
            <text:p>25/06/2023</text:p>
          </table:table-cell>
          <table:table-cell office:value-type="string" calcext:value-type="string">
            <text:p>D</text:p>
          </table:table-cell>
          <table:table-cell office:value-type="float" office:value="1045.95" calcext:value-type="float">
            <text:p>1045.95</text:p>
          </table:table-cell>
          <table:table-cell office:value-type="string" calcext:value-type="string">
            <text:p>80EAD4116B3F9CB3DBC26B0EA4D1372C</text:p>
          </table:table-cell>
          <table:table-cell table:style-name="ce2" table:number-columns-repeated="16379"/>
        </table:table-row>
        <table:table-row table:style-name="ro1">
          <table:table-cell office:value-type="float" office:value="183616450" calcext:value-type="float">
            <text:p>183616450</text:p>
          </table:table-cell>
          <table:table-cell table:style-name="ce3" office:value-type="date" office:date-value="2023-06-24" calcext:value-type="date">
            <text:p>24/06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7EF1849251B237CB2254AC8D16C5DC7</text:p>
          </table:table-cell>
          <table:table-cell table:style-name="ce2" table:number-columns-repeated="16379"/>
        </table:table-row>
        <table:table-row table:style-name="ro1">
          <table:table-cell office:value-type="float" office:value="183493114" calcext:value-type="float">
            <text:p>183493114</text:p>
          </table:table-cell>
          <table:table-cell table:style-name="ce3" office:value-type="date" office:date-value="2023-06-23" calcext:value-type="date">
            <text:p>23/06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7A23418D3A5B9246D6E266D74353A7</text:p>
          </table:table-cell>
          <table:table-cell table:style-name="ce2" table:number-columns-repeated="16379"/>
        </table:table-row>
        <table:table-row table:style-name="ro1">
          <table:table-cell office:value-type="float" office:value="183367635" calcext:value-type="float">
            <text:p>183367635</text:p>
          </table:table-cell>
          <table:table-cell table:style-name="ce3" office:value-type="date" office:date-value="2023-06-22" calcext:value-type="date">
            <text:p>22/06/2023</text:p>
          </table:table-cell>
          <table:table-cell office:value-type="string" calcext:value-type="string">
            <text:p>D</text:p>
          </table:table-cell>
          <table:table-cell office:value-type="float" office:value="147963.82" calcext:value-type="float">
            <text:p>147963.82</text:p>
          </table:table-cell>
          <table:table-cell office:value-type="string" calcext:value-type="string">
            <text:p>86C27EE67C5EC4AD94E423F601D27830</text:p>
          </table:table-cell>
          <table:table-cell table:style-name="ce2" table:number-columns-repeated="16379"/>
        </table:table-row>
        <table:table-row table:style-name="ro1">
          <table:table-cell office:value-type="float" office:value="183263175" calcext:value-type="float">
            <text:p>183263175</text:p>
          </table:table-cell>
          <table:table-cell table:style-name="ce3" office:value-type="date" office:date-value="2023-06-21" calcext:value-type="date">
            <text:p>21/06/2023</text:p>
          </table:table-cell>
          <table:table-cell office:value-type="string" calcext:value-type="string">
            <text:p>D</text:p>
          </table:table-cell>
          <table:table-cell office:value-type="float" office:value="57434.84" calcext:value-type="float">
            <text:p>57434.84</text:p>
          </table:table-cell>
          <table:table-cell table:style-name="ce4" office:value-type="string" calcext:value-type="string">
            <text:p>193E715CA5D705E89DD29CB78FF9C796</text:p>
          </table:table-cell>
          <table:table-cell table:style-name="ce2" table:number-columns-repeated="16379"/>
        </table:table-row>
        <table:table-row table:style-name="ro1">
          <table:table-cell office:value-type="float" office:value="183117433" calcext:value-type="float">
            <text:p>183117433</text:p>
          </table:table-cell>
          <table:table-cell table:style-name="ce3" office:value-type="date" office:date-value="2023-06-20" calcext:value-type="date">
            <text:p>20/06/2023</text:p>
          </table:table-cell>
          <table:table-cell office:value-type="string" calcext:value-type="string">
            <text:p>D</text:p>
          </table:table-cell>
          <table:table-cell office:value-type="float" office:value="28191.35" calcext:value-type="float">
            <text:p>28191.35</text:p>
          </table:table-cell>
          <table:table-cell office:value-type="string" calcext:value-type="string">
            <text:p>DE40BAA1931A1A90056A0DBC065B5836</text:p>
          </table:table-cell>
          <table:table-cell table:style-name="ce2" table:number-columns-repeated="16379"/>
        </table:table-row>
        <table:table-row table:style-name="ro1">
          <table:table-cell office:value-type="float" office:value="182978752" calcext:value-type="float">
            <text:p>182978752</text:p>
          </table:table-cell>
          <table:table-cell table:style-name="ce3" office:value-type="date" office:date-value="2023-06-18" calcext:value-type="date">
            <text:p>18/06/2023</text:p>
          </table:table-cell>
          <table:table-cell office:value-type="string" calcext:value-type="string">
            <text:p>D</text:p>
          </table:table-cell>
          <table:table-cell office:value-type="float" office:value="11052.02" calcext:value-type="float">
            <text:p>11052.02</text:p>
          </table:table-cell>
          <table:table-cell office:value-type="string" calcext:value-type="string">
            <text:p>0232DC75F95C04A3FBD5F34B1858DEB3</text:p>
          </table:table-cell>
          <table:table-cell table:style-name="ce2" table:number-columns-repeated="16379"/>
        </table:table-row>
        <table:table-row table:style-name="ro1">
          <table:table-cell office:value-type="float" office:value="182846036" calcext:value-type="float">
            <text:p>182846036</text:p>
          </table:table-cell>
          <table:table-cell table:style-name="ce3" office:value-type="date" office:date-value="2023-06-17" calcext:value-type="date">
            <text:p>17/06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989A60637F893EFDA3020CCCD404D1</text:p>
          </table:table-cell>
          <table:table-cell table:style-name="ce2" table:number-columns-repeated="16379"/>
        </table:table-row>
        <table:table-row table:style-name="ro1">
          <table:table-cell office:value-type="float" office:value="182719906" calcext:value-type="float">
            <text:p>182719906</text:p>
          </table:table-cell>
          <table:table-cell table:style-name="ce3" office:value-type="date" office:date-value="2023-06-16" calcext:value-type="date">
            <text:p>16/06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0656001C7A608CEEB57FE62D18710BF</text:p>
          </table:table-cell>
          <table:table-cell table:style-name="ce2" table:number-columns-repeated="16379"/>
        </table:table-row>
        <table:table-row table:style-name="ro1">
          <table:table-cell office:value-type="float" office:value="182583179" calcext:value-type="float">
            <text:p>182583179</text:p>
          </table:table-cell>
          <table:table-cell table:style-name="ce3" office:value-type="date" office:date-value="2023-06-15" calcext:value-type="date">
            <text:p>15/06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D58BEC71DE7BA1D54C73A434513467</text:p>
          </table:table-cell>
          <table:table-cell table:style-name="ce2" table:number-columns-repeated="16379"/>
        </table:table-row>
        <table:table-row table:style-name="ro1">
          <table:table-cell office:value-type="float" office:value="182515630" calcext:value-type="float">
            <text:p>182515630</text:p>
          </table:table-cell>
          <table:table-cell table:style-name="ce3" office:value-type="date" office:date-value="2023-06-14" calcext:value-type="date">
            <text:p>14/06/202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E9AE881DFC960D695C57D1EA8C5316</text:p>
          </table:table-cell>
          <table:table-cell table:style-name="ce2" table:number-columns-repeated="16379"/>
        </table:table-row>
        <table:table-row table:style-name="ro1">
          <table:table-cell office:value-type="float" office:value="182337491" calcext:value-type="float">
            <text:p>182337491</text:p>
          </table:table-cell>
          <table:table-cell table:style-name="ce3" office:value-type="date" office:date-value="2023-06-13" calcext:value-type="date">
            <text:p>13/06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FF474B37BCD66F796827E07C56B349</text:p>
          </table:table-cell>
          <table:table-cell table:style-name="ce2" table:number-columns-repeated="16379"/>
        </table:table-row>
        <table:table-row table:style-name="ro1">
          <table:table-cell office:value-type="float" office:value="182187343" calcext:value-type="float">
            <text:p>182187343</text:p>
          </table:table-cell>
          <table:table-cell table:style-name="ce3" office:value-type="date" office:date-value="2023-06-12" calcext:value-type="date">
            <text:p>12/06/2023</text:p>
          </table:table-cell>
          <table:table-cell office:value-type="string" calcext:value-type="string">
            <text:p>D</text:p>
          </table:table-cell>
          <table:table-cell office:value-type="float" office:value="23195.71" calcext:value-type="float">
            <text:p>23195.71</text:p>
          </table:table-cell>
          <table:table-cell office:value-type="string" calcext:value-type="string">
            <text:p>8655C9314F39211B16DDEF5FF683E118</text:p>
          </table:table-cell>
          <table:table-cell table:style-name="ce2" table:number-columns-repeated="16379"/>
        </table:table-row>
        <table:table-row table:style-name="ro1">
          <table:table-cell office:value-type="float" office:value="182067030" calcext:value-type="float">
            <text:p>182067030</text:p>
          </table:table-cell>
          <table:table-cell table:style-name="ce3" office:value-type="date" office:date-value="2023-06-10" calcext:value-type="date">
            <text:p>10/06/2023</text:p>
          </table:table-cell>
          <table:table-cell office:value-type="string" calcext:value-type="string">
            <text:p>D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543F4D6B9E81F2D701201EFB34F13C82</text:p>
          </table:table-cell>
          <table:table-cell table:style-name="ce2" table:number-columns-repeated="16379"/>
        </table:table-row>
        <table:table-row table:style-name="ro1">
          <table:table-cell office:value-type="float" office:value="182010165" calcext:value-type="float">
            <text:p>182010165</text:p>
          </table:table-cell>
          <table:table-cell table:style-name="ce3" office:value-type="date" office:date-value="2023-06-09" calcext:value-type="date">
            <text:p>09/06/2023</text:p>
          </table:table-cell>
          <table:table-cell office:value-type="string" calcext:value-type="string">
            <text:p>D</text:p>
          </table:table-cell>
          <table:table-cell office:value-type="float" office:value="131972.95" calcext:value-type="float">
            <text:p>131972.95</text:p>
          </table:table-cell>
          <table:table-cell office:value-type="string" calcext:value-type="string">
            <text:p>5474ECAE94A2C52F8FF6C36E6FC0EEEF</text:p>
          </table:table-cell>
          <table:table-cell table:style-name="ce2" table:number-columns-repeated="16379"/>
        </table:table-row>
        <table:table-row table:style-name="ro1">
          <table:table-cell office:value-type="float" office:value="181807357" calcext:value-type="float">
            <text:p>181807357</text:p>
          </table:table-cell>
          <table:table-cell table:style-name="ce3" office:value-type="date" office:date-value="2023-06-07" calcext:value-type="date">
            <text:p>07/06/2023</text:p>
          </table:table-cell>
          <table:table-cell office:value-type="string" calcext:value-type="string">
            <text:p>D</text:p>
          </table:table-cell>
          <table:table-cell office:value-type="float" office:value="26547.43" calcext:value-type="float">
            <text:p>26547.43</text:p>
          </table:table-cell>
          <table:table-cell office:value-type="string" calcext:value-type="string">
            <text:p>CC565124C590A114AB29E7F98C2DAE89</text:p>
          </table:table-cell>
          <table:table-cell table:style-name="ce2" table:number-columns-repeated="16379"/>
        </table:table-row>
        <table:table-row table:style-name="ro1">
          <table:table-cell office:value-type="float" office:value="181660702" calcext:value-type="float">
            <text:p>181660702</text:p>
          </table:table-cell>
          <table:table-cell table:style-name="ce3" office:value-type="date" office:date-value="2023-06-06" calcext:value-type="date">
            <text:p>06/06/202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89D97226840474609FE3399322AB41</text:p>
          </table:table-cell>
          <table:table-cell table:style-name="ce2" table:number-columns-repeated="16379"/>
        </table:table-row>
        <table:table-row table:style-name="ro1">
          <table:table-cell office:value-type="float" office:value="181504191" calcext:value-type="float">
            <text:p>181504191</text:p>
          </table:table-cell>
          <table:table-cell table:style-name="ce3" office:value-type="date" office:date-value="2023-06-05" calcext:value-type="date">
            <text:p>05/06/2023</text:p>
          </table:table-cell>
          <table:table-cell office:value-type="string" calcext:value-type="string">
            <text:p>D</text:p>
          </table:table-cell>
          <table:table-cell office:value-type="float" office:value="111892.72" calcext:value-type="float">
            <text:p>111892.72</text:p>
          </table:table-cell>
          <table:table-cell office:value-type="string" calcext:value-type="string">
            <text:p>DC70DE1057533A0B35C97533206EEA60</text:p>
          </table:table-cell>
          <table:table-cell table:style-name="ce2" table:number-columns-repeated="16379"/>
        </table:table-row>
        <table:table-row table:style-name="ro1">
          <table:table-cell office:value-type="float" office:value="181443077" calcext:value-type="float">
            <text:p>181443077</text:p>
          </table:table-cell>
          <table:table-cell table:style-name="ce3" office:value-type="date" office:date-value="2023-06-03" calcext:value-type="date">
            <text:p>03/06/2023</text:p>
          </table:table-cell>
          <table:table-cell office:value-type="string" calcext:value-type="string">
            <text:p>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F63AF4A875D76FCA16AB494EE747DD8A</text:p>
          </table:table-cell>
          <table:table-cell table:style-name="ce2" table:number-columns-repeated="16379"/>
        </table:table-row>
        <table:table-row table:style-name="ro1">
          <table:table-cell office:value-type="float" office:value="181248262" calcext:value-type="float">
            <text:p>181248262</text:p>
          </table:table-cell>
          <table:table-cell table:style-name="ce3" office:value-type="date" office:date-value="2023-06-02" calcext:value-type="date">
            <text:p>02/06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82F78F3A2479DADC2B241DD475EF1A</text:p>
          </table:table-cell>
          <table:table-cell table:style-name="ce2" table:number-columns-repeated="16379"/>
        </table:table-row>
        <table:table-row table:style-name="ro1">
          <table:table-cell office:value-type="float" office:value="181109839" calcext:value-type="float">
            <text:p>181109839</text:p>
          </table:table-cell>
          <table:table-cell table:style-name="ce3" office:value-type="date" office:date-value="2023-06-01" calcext:value-type="date">
            <text:p>01/06/2023</text:p>
          </table:table-cell>
          <table:table-cell office:value-type="string" calcext:value-type="string">
            <text:p>D</text:p>
          </table:table-cell>
          <table:table-cell office:value-type="float" office:value="27700" calcext:value-type="float">
            <text:p>27700</text:p>
          </table:table-cell>
          <table:table-cell office:value-type="string" calcext:value-type="string">
            <text:p>3B5E40A92CEBF59D8F84AFEA15CB86F2</text:p>
          </table:table-cell>
          <table:table-cell table:style-name="ce2" table:number-columns-repeated="16379"/>
        </table:table-row>
        <table:table-row table:style-name="ro1">
          <table:table-cell office:value-type="float" office:value="180966142" calcext:value-type="float">
            <text:p>180966142</text:p>
          </table:table-cell>
          <table:table-cell table:style-name="ce3" office:value-type="date" office:date-value="2023-05-31" calcext:value-type="date">
            <text:p>31/05/2023</text:p>
          </table:table-cell>
          <table:table-cell office:value-type="string" calcext:value-type="string">
            <text:p>D</text:p>
          </table:table-cell>
          <table:table-cell office:value-type="float" office:value="5601.8" calcext:value-type="float">
            <text:p>5601.8</text:p>
          </table:table-cell>
          <table:table-cell office:value-type="string" calcext:value-type="string">
            <text:p>B14E447FAE3195A7E7627DC2E052B148</text:p>
          </table:table-cell>
          <table:table-cell table:style-name="ce2" table:number-columns-repeated="16379"/>
        </table:table-row>
        <table:table-row table:style-name="ro1">
          <table:table-cell office:value-type="float" office:value="180827706" calcext:value-type="float">
            <text:p>180827706</text:p>
          </table:table-cell>
          <table:table-cell table:style-name="ce3" office:value-type="date" office:date-value="2023-05-30" calcext:value-type="date">
            <text:p>30/05/2023</text:p>
          </table:table-cell>
          <table:table-cell office:value-type="string" calcext:value-type="string">
            <text:p>D</text:p>
          </table:table-cell>
          <table:table-cell office:value-type="float" office:value="22895.4" calcext:value-type="float">
            <text:p>22895.4</text:p>
          </table:table-cell>
          <table:table-cell office:value-type="string" calcext:value-type="string">
            <text:p>6AFB9DDA5C077AB20CC4164C12442119</text:p>
          </table:table-cell>
          <table:table-cell table:style-name="ce2" table:number-columns-repeated="16379"/>
        </table:table-row>
        <table:table-row table:style-name="ro1">
          <table:table-cell office:value-type="float" office:value="180685596" calcext:value-type="float">
            <text:p>180685596</text:p>
          </table:table-cell>
          <table:table-cell table:style-name="ce3" office:value-type="date" office:date-value="2023-05-28" calcext:value-type="date">
            <text:p>28/05/2023</text:p>
          </table:table-cell>
          <table:table-cell office:value-type="string" calcext:value-type="string">
            <text:p>D</text:p>
          </table:table-cell>
          <table:table-cell office:value-type="float" office:value="58283.85" calcext:value-type="float">
            <text:p>58283.85</text:p>
          </table:table-cell>
          <table:table-cell office:value-type="string" calcext:value-type="string">
            <text:p>6CF90CACA909F757F1E12C3D688A406E</text:p>
          </table:table-cell>
          <table:table-cell table:style-name="ce2" table:number-columns-repeated="16379"/>
        </table:table-row>
        <table:table-row table:style-name="ro1">
          <table:table-cell office:value-type="float" office:value="180570824" calcext:value-type="float">
            <text:p>180570824</text:p>
          </table:table-cell>
          <table:table-cell table:style-name="ce3" office:value-type="date" office:date-value="2023-05-27" calcext:value-type="date">
            <text:p>27/05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E0E6BEDB209FF4ABA459665EAE9BD0</text:p>
          </table:table-cell>
          <table:table-cell table:style-name="ce2" table:number-columns-repeated="16379"/>
        </table:table-row>
        <table:table-row table:style-name="ro1">
          <table:table-cell office:value-type="float" office:value="180431088" calcext:value-type="float">
            <text:p>180431088</text:p>
          </table:table-cell>
          <table:table-cell table:style-name="ce3" office:value-type="date" office:date-value="2023-05-26" calcext:value-type="date">
            <text:p>26/05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13ECA7A4D641588CECF1F8AAB5C939</text:p>
          </table:table-cell>
          <table:table-cell table:style-name="ce2" table:number-columns-repeated="16379"/>
        </table:table-row>
        <table:table-row table:style-name="ro1">
          <table:table-cell office:value-type="float" office:value="180301547" calcext:value-type="float">
            <text:p>180301547</text:p>
          </table:table-cell>
          <table:table-cell table:style-name="ce3" office:value-type="date" office:date-value="2023-05-25" calcext:value-type="date">
            <text:p>25/05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9F276CC059E9BBD86753CD02DB41A7</text:p>
          </table:table-cell>
          <table:table-cell table:style-name="ce2" table:number-columns-repeated="16379"/>
        </table:table-row>
        <table:table-row table:style-name="ro1">
          <table:table-cell office:value-type="float" office:value="180177407" calcext:value-type="float">
            <text:p>180177407</text:p>
          </table:table-cell>
          <table:table-cell table:style-name="ce3" office:value-type="date" office:date-value="2023-05-24" calcext:value-type="date">
            <text:p>24/05/2023</text:p>
          </table:table-cell>
          <table:table-cell office:value-type="string" calcext:value-type="string">
            <text:p>D</text:p>
          </table:table-cell>
          <table:table-cell office:value-type="float" office:value="112357.91" calcext:value-type="float">
            <text:p>112357.91</text:p>
          </table:table-cell>
          <table:table-cell office:value-type="string" calcext:value-type="string">
            <text:p>9D776D2EBCC2BB9BDDA828601810AF64</text:p>
          </table:table-cell>
          <table:table-cell table:style-name="ce2" table:number-columns-repeated="16379"/>
        </table:table-row>
        <table:table-row table:style-name="ro1">
          <table:table-cell office:value-type="float" office:value="180058767" calcext:value-type="float">
            <text:p>180058767</text:p>
          </table:table-cell>
          <table:table-cell table:style-name="ce3" office:value-type="date" office:date-value="2023-05-23" calcext:value-type="date">
            <text:p>23/05/2023</text:p>
          </table:table-cell>
          <table:table-cell office:value-type="string" calcext:value-type="string">
            <text:p>D</text:p>
          </table:table-cell>
          <table:table-cell office:value-type="float" office:value="15100" calcext:value-type="float">
            <text:p>15100</text:p>
          </table:table-cell>
          <table:table-cell office:value-type="string" calcext:value-type="string">
            <text:p>0558C379C5965BE44C403A3136A1AF35</text:p>
          </table:table-cell>
          <table:table-cell table:style-name="ce2" table:number-columns-repeated="16379"/>
        </table:table-row>
        <table:table-row table:style-name="ro1">
          <table:table-cell office:value-type="float" office:value="179925461" calcext:value-type="float">
            <text:p>179925461</text:p>
          </table:table-cell>
          <table:table-cell table:style-name="ce3" office:value-type="date" office:date-value="2023-05-21" calcext:value-type="date">
            <text:p>21/05/2023</text:p>
          </table:table-cell>
          <table:table-cell office:value-type="string" calcext:value-type="string">
            <text:p>D</text:p>
          </table:table-cell>
          <table:table-cell office:value-type="float" office:value="114222.45" calcext:value-type="float">
            <text:p>114222.45</text:p>
          </table:table-cell>
          <table:table-cell office:value-type="string" calcext:value-type="string">
            <text:p>05211F45E6ABA87D8A96BAB9836A76C8</text:p>
          </table:table-cell>
          <table:table-cell table:style-name="ce2" table:number-columns-repeated="16379"/>
        </table:table-row>
        <table:table-row table:style-name="ro1">
          <table:table-cell office:value-type="float" office:value="179811504" calcext:value-type="float">
            <text:p>179811504</text:p>
          </table:table-cell>
          <table:table-cell table:style-name="ce3" office:value-type="date" office:date-value="2023-05-20" calcext:value-type="date">
            <text:p>20/05/2023</text:p>
          </table:table-cell>
          <table:table-cell office:value-type="string" calcext:value-type="string">
            <text:p>D</text:p>
          </table:table-cell>
          <table:table-cell office:value-type="float" office:value="68.39" calcext:value-type="float">
            <text:p>68.39</text:p>
          </table:table-cell>
          <table:table-cell office:value-type="string" calcext:value-type="string">
            <text:p>794D242F1CBDE490E88FBBD9DD3274BD</text:p>
          </table:table-cell>
          <table:table-cell table:style-name="ce2" table:number-columns-repeated="16379"/>
        </table:table-row>
        <table:table-row table:style-name="ro1">
          <table:table-cell office:value-type="float" office:value="179731310" calcext:value-type="float">
            <text:p>179731310</text:p>
          </table:table-cell>
          <table:table-cell table:style-name="ce3" office:value-type="date" office:date-value="2023-05-19" calcext:value-type="date">
            <text:p>19/05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A914356DEFC0DA3509E649B5DD4BF1</text:p>
          </table:table-cell>
          <table:table-cell table:style-name="ce2" table:number-columns-repeated="16379"/>
        </table:table-row>
        <table:table-row table:style-name="ro1">
          <table:table-cell office:value-type="float" office:value="179552269" calcext:value-type="float">
            <text:p>179552269</text:p>
          </table:table-cell>
          <table:table-cell table:style-name="ce3" office:value-type="date" office:date-value="2023-05-18" calcext:value-type="date">
            <text:p>18/05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B7983083DADE7343470D610BBCA4E6F</text:p>
          </table:table-cell>
          <table:table-cell table:style-name="ce2" table:number-columns-repeated="16379"/>
        </table:table-row>
        <table:table-row table:style-name="ro1">
          <table:table-cell office:value-type="float" office:value="179485656" calcext:value-type="float">
            <text:p>179485656</text:p>
          </table:table-cell>
          <table:table-cell table:style-name="ce3" office:value-type="date" office:date-value="2023-05-17" calcext:value-type="date">
            <text:p>17/05/2023</text:p>
          </table:table-cell>
          <table:table-cell office:value-type="string" calcext:value-type="string">
            <text:p>D</text:p>
          </table:table-cell>
          <table:table-cell office:value-type="float" office:value="46308.83" calcext:value-type="float">
            <text:p>46308.83</text:p>
          </table:table-cell>
          <table:table-cell office:value-type="string" calcext:value-type="string">
            <text:p>B16B65611C3ED7AEB115A499B82FCBE0</text:p>
          </table:table-cell>
          <table:table-cell table:style-name="ce2" table:number-columns-repeated="16379"/>
        </table:table-row>
        <table:table-row table:style-name="ro1">
          <table:table-cell office:value-type="float" office:value="179309151" calcext:value-type="float">
            <text:p>179309151</text:p>
          </table:table-cell>
          <table:table-cell table:style-name="ce3" office:value-type="date" office:date-value="2023-05-16" calcext:value-type="date">
            <text:p>16/05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B3A9CF2A78A55C1DB1EADB966BF196</text:p>
          </table:table-cell>
          <table:table-cell table:style-name="ce2" table:number-columns-repeated="16379"/>
        </table:table-row>
        <table:table-row table:style-name="ro1">
          <table:table-cell office:value-type="float" office:value="179161541" calcext:value-type="float">
            <text:p>179161541</text:p>
          </table:table-cell>
          <table:table-cell table:style-name="ce3" office:value-type="date" office:date-value="2023-05-15" calcext:value-type="date">
            <text:p>15/05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DDA3592B21577BD95288D124AEAA1CD</text:p>
          </table:table-cell>
          <table:table-cell table:style-name="ce2" table:number-columns-repeated="16379"/>
        </table:table-row>
        <table:table-row table:style-name="ro1">
          <table:table-cell office:value-type="float" office:value="179063978" calcext:value-type="float">
            <text:p>179063978</text:p>
          </table:table-cell>
          <table:table-cell table:style-name="ce3" office:value-type="date" office:date-value="2023-05-13" calcext:value-type="date">
            <text:p>13/05/2023</text:p>
          </table:table-cell>
          <table:table-cell office:value-type="string" calcext:value-type="string">
            <text:p>D</text:p>
          </table:table-cell>
          <table:table-cell office:value-type="float" office:value="9486.85" calcext:value-type="float">
            <text:p>9486.85</text:p>
          </table:table-cell>
          <table:table-cell office:value-type="string" calcext:value-type="string">
            <text:p>C8436569AF5C63566D11314A3C945832</text:p>
          </table:table-cell>
          <table:table-cell table:style-name="ce2" table:number-columns-repeated="16379"/>
        </table:table-row>
        <table:table-row table:style-name="ro1">
          <table:table-cell office:value-type="float" office:value="178931052" calcext:value-type="float">
            <text:p>178931052</text:p>
          </table:table-cell>
          <table:table-cell table:style-name="ce3" office:value-type="date" office:date-value="2023-05-12" calcext:value-type="date">
            <text:p>12/05/2023</text:p>
          </table:table-cell>
          <table:table-cell office:value-type="string" calcext:value-type="string">
            <text:p>D</text:p>
          </table:table-cell>
          <table:table-cell office:value-type="float" office:value="111303.9" calcext:value-type="float">
            <text:p>111303.9</text:p>
          </table:table-cell>
          <table:table-cell office:value-type="string" calcext:value-type="string">
            <text:p>43713542F7765F26A35DDBBCED8751CC</text:p>
          </table:table-cell>
          <table:table-cell table:style-name="ce2" table:number-columns-repeated="16379"/>
        </table:table-row>
        <table:table-row table:style-name="ro1">
          <table:table-cell office:value-type="float" office:value="178803920" calcext:value-type="float">
            <text:p>178803920</text:p>
          </table:table-cell>
          <table:table-cell table:style-name="ce3" office:value-type="date" office:date-value="2023-05-11" calcext:value-type="date">
            <text:p>11/05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D60016462E5AD991A009ED947DF25E</text:p>
          </table:table-cell>
          <table:table-cell table:style-name="ce2" table:number-columns-repeated="16379"/>
        </table:table-row>
        <table:table-row table:style-name="ro1">
          <table:table-cell office:value-type="float" office:value="178738129" calcext:value-type="float">
            <text:p>178738129</text:p>
          </table:table-cell>
          <table:table-cell table:style-name="ce3" office:value-type="date" office:date-value="2023-05-10" calcext:value-type="date">
            <text:p>10/05/2023</text:p>
          </table:table-cell>
          <table:table-cell office:value-type="string" calcext:value-type="string">
            <text:p>D</text:p>
          </table:table-cell>
          <table:table-cell office:value-type="float" office:value="17363.31" calcext:value-type="float">
            <text:p>17363.31</text:p>
          </table:table-cell>
          <table:table-cell office:value-type="string" calcext:value-type="string">
            <text:p>7BFB420B5FB152EDB37351F40FF33440</text:p>
          </table:table-cell>
          <table:table-cell table:style-name="ce2" table:number-columns-repeated="16379"/>
        </table:table-row>
        <table:table-row table:style-name="ro1">
          <table:table-cell office:value-type="float" office:value="178632638" calcext:value-type="float">
            <text:p>178632638</text:p>
          </table:table-cell>
          <table:table-cell table:style-name="ce3" office:value-type="date" office:date-value="2023-05-09" calcext:value-type="date">
            <text:p>09/05/2023</text:p>
          </table:table-cell>
          <table:table-cell office:value-type="string" calcext:value-type="string">
            <text:p>D</text:p>
          </table:table-cell>
          <table:table-cell office:value-type="float" office:value="6991.8" calcext:value-type="float">
            <text:p>6991.8</text:p>
          </table:table-cell>
          <table:table-cell office:value-type="string" calcext:value-type="string">
            <text:p>547AE03428F68B946EEB8DB00C8C5B21</text:p>
          </table:table-cell>
          <table:table-cell table:style-name="ce2" table:number-columns-repeated="16379"/>
        </table:table-row>
        <table:table-row table:style-name="ro1">
          <table:table-cell office:value-type="float" office:value="178421379" calcext:value-type="float">
            <text:p>178421379</text:p>
          </table:table-cell>
          <table:table-cell table:style-name="ce3" office:value-type="date" office:date-value="2023-05-08" calcext:value-type="date">
            <text:p>08/05/2023</text:p>
          </table:table-cell>
          <table:table-cell office:value-type="string" calcext:value-type="string">
            <text:p>D</text:p>
          </table:table-cell>
          <table:table-cell office:value-type="float" office:value="64992.06" calcext:value-type="float">
            <text:p>64992.06</text:p>
          </table:table-cell>
          <table:table-cell office:value-type="string" calcext:value-type="string">
            <text:p>6A95CBA53D16DD84780A1B701D3C278B</text:p>
          </table:table-cell>
          <table:table-cell table:style-name="ce2" table:number-columns-repeated="16379"/>
        </table:table-row>
        <table:table-row table:style-name="ro1">
          <table:table-cell office:value-type="float" office:value="178281176" calcext:value-type="float">
            <text:p>178281176</text:p>
          </table:table-cell>
          <table:table-cell table:style-name="ce3" office:value-type="date" office:date-value="2023-05-06" calcext:value-type="date">
            <text:p>06/05/2023</text:p>
          </table:table-cell>
          <table:table-cell office:value-type="string" calcext:value-type="string">
            <text:p>D</text:p>
          </table:table-cell>
          <table:table-cell office:value-type="float" office:value="31800.57" calcext:value-type="float">
            <text:p>31800.57</text:p>
          </table:table-cell>
          <table:table-cell office:value-type="string" calcext:value-type="string">
            <text:p>545A92BB68DD4E734C74BEC297C5421B</text:p>
          </table:table-cell>
          <table:table-cell table:style-name="ce2" table:number-columns-repeated="16379"/>
        </table:table-row>
        <table:table-row table:style-name="ro1">
          <table:table-cell office:value-type="float" office:value="178191209" calcext:value-type="float">
            <text:p>178191209</text:p>
          </table:table-cell>
          <table:table-cell table:style-name="ce3" office:value-type="date" office:date-value="2023-05-05" calcext:value-type="date">
            <text:p>05/05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B28C02CFD5E3767BB7509E8EB096E1A</text:p>
          </table:table-cell>
          <table:table-cell table:style-name="ce2" table:number-columns-repeated="16379"/>
        </table:table-row>
        <table:table-row table:style-name="ro1">
          <table:table-cell office:value-type="float" office:value="178043624" calcext:value-type="float">
            <text:p>178043624</text:p>
          </table:table-cell>
          <table:table-cell table:style-name="ce3" office:value-type="date" office:date-value="2023-05-04" calcext:value-type="date">
            <text:p>04/05/2023</text:p>
          </table:table-cell>
          <table:table-cell office:value-type="string" calcext:value-type="string">
            <text:p>D</text:p>
          </table:table-cell>
          <table:table-cell office:value-type="float" office:value="93340.67" calcext:value-type="float">
            <text:p>93340.67</text:p>
          </table:table-cell>
          <table:table-cell office:value-type="string" calcext:value-type="string">
            <text:p>633C42860AB2E1CAFB7A8AC8AE30D97D</text:p>
          </table:table-cell>
          <table:table-cell table:style-name="ce2" table:number-columns-repeated="16379"/>
        </table:table-row>
        <table:table-row table:style-name="ro1">
          <table:table-cell office:value-type="float" office:value="177899801" calcext:value-type="float">
            <text:p>177899801</text:p>
          </table:table-cell>
          <table:table-cell table:style-name="ce3" office:value-type="date" office:date-value="2023-05-03" calcext:value-type="date">
            <text:p>03/05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EBD89DA9808F5CFC4E39DBE860E0C29</text:p>
          </table:table-cell>
          <table:table-cell table:style-name="ce2" table:number-columns-repeated="16379"/>
        </table:table-row>
        <table:table-row table:style-name="ro1">
          <table:table-cell office:value-type="float" office:value="177719301" calcext:value-type="float">
            <text:p>177719301</text:p>
          </table:table-cell>
          <table:table-cell table:style-name="ce3" office:value-type="date" office:date-value="2023-04-30" calcext:value-type="date">
            <text:p>30/04/2023</text:p>
          </table:table-cell>
          <table:table-cell office:value-type="string" calcext:value-type="string">
            <text:p>D</text:p>
          </table:table-cell>
          <table:table-cell office:value-type="float" office:value="53144.75" calcext:value-type="float">
            <text:p>53144.75</text:p>
          </table:table-cell>
          <table:table-cell office:value-type="string" calcext:value-type="string">
            <text:p>CD738B1177870429BCEC3494D91E051E</text:p>
          </table:table-cell>
          <table:table-cell table:style-name="ce2" table:number-columns-repeated="16379"/>
        </table:table-row>
        <table:table-row table:style-name="ro1">
          <table:table-cell office:value-type="float" office:value="177584713" calcext:value-type="float">
            <text:p>177584713</text:p>
          </table:table-cell>
          <table:table-cell table:style-name="ce3" office:value-type="date" office:date-value="2023-04-29" calcext:value-type="date">
            <text:p>29/04/2023</text:p>
          </table:table-cell>
          <table:table-cell office:value-type="string" calcext:value-type="string">
            <text:p>D</text:p>
          </table:table-cell>
          <table:table-cell office:value-type="float" office:value="15660.24" calcext:value-type="float">
            <text:p>15660.24</text:p>
          </table:table-cell>
          <table:table-cell office:value-type="string" calcext:value-type="string">
            <text:p>3A41C504F1DD58E403E7CE1661F6EE50</text:p>
          </table:table-cell>
          <table:table-cell table:style-name="ce2" table:number-columns-repeated="16379"/>
        </table:table-row>
        <table:table-row table:style-name="ro1">
          <table:table-cell office:value-type="float" office:value="177445565" calcext:value-type="float">
            <text:p>177445565</text:p>
          </table:table-cell>
          <table:table-cell table:style-name="ce3" office:value-type="date" office:date-value="2023-04-28" calcext:value-type="date">
            <text:p>28/04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0A57FF79A3D6FBCF216ACB3ADD01ED</text:p>
          </table:table-cell>
          <table:table-cell table:style-name="ce2" table:number-columns-repeated="16379"/>
        </table:table-row>
        <table:table-row table:style-name="ro1">
          <table:table-cell office:value-type="float" office:value="177330326" calcext:value-type="float">
            <text:p>177330326</text:p>
          </table:table-cell>
          <table:table-cell table:style-name="ce3" office:value-type="date" office:date-value="2023-04-27" calcext:value-type="date">
            <text:p>27/04/2023</text:p>
          </table:table-cell>
          <table:table-cell office:value-type="string" calcext:value-type="string">
            <text:p>D</text:p>
          </table:table-cell>
          <table:table-cell office:value-type="float" office:value="18955.61" calcext:value-type="float">
            <text:p>18955.61</text:p>
          </table:table-cell>
          <table:table-cell office:value-type="string" calcext:value-type="string">
            <text:p>CAA712E73AC9B841C4BF46103D52B964</text:p>
          </table:table-cell>
          <table:table-cell table:style-name="ce2" table:number-columns-repeated="16379"/>
        </table:table-row>
        <table:table-row table:style-name="ro1">
          <table:table-cell office:value-type="float" office:value="177189798" calcext:value-type="float">
            <text:p>177189798</text:p>
          </table:table-cell>
          <table:table-cell table:style-name="ce3" office:value-type="date" office:date-value="2023-04-26" calcext:value-type="date">
            <text:p>26/04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57B632A0D40B4B6F4132D0DB24233E</text:p>
          </table:table-cell>
          <table:table-cell table:style-name="ce2" table:number-columns-repeated="16379"/>
        </table:table-row>
        <table:table-row table:style-name="ro1">
          <table:table-cell office:value-type="float" office:value="177068186" calcext:value-type="float">
            <text:p>177068186</text:p>
          </table:table-cell>
          <table:table-cell table:style-name="ce3" office:value-type="date" office:date-value="2023-04-25" calcext:value-type="date">
            <text:p>25/04/2023</text:p>
          </table:table-cell>
          <table:table-cell office:value-type="string" calcext:value-type="string">
            <text:p>D</text:p>
          </table:table-cell>
          <table:table-cell office:value-type="float" office:value="108164.97" calcext:value-type="float">
            <text:p>108164.97</text:p>
          </table:table-cell>
          <table:table-cell office:value-type="string" calcext:value-type="string">
            <text:p>F9207A03CE14F5BCB78B1FA0EC89066F</text:p>
          </table:table-cell>
          <table:table-cell table:style-name="ce2" table:number-columns-repeated="16379"/>
        </table:table-row>
        <table:table-row table:style-name="ro1">
          <table:table-cell office:value-type="float" office:value="176940400" calcext:value-type="float">
            <text:p>176940400</text:p>
          </table:table-cell>
          <table:table-cell table:style-name="ce3" office:value-type="date" office:date-value="2023-04-23" calcext:value-type="date">
            <text:p>23/04/2023</text:p>
          </table:table-cell>
          <table:table-cell office:value-type="string" calcext:value-type="string">
            <text:p>D</text:p>
          </table:table-cell>
          <table:table-cell office:value-type="float" office:value="19560.17" calcext:value-type="float">
            <text:p>19560.17</text:p>
          </table:table-cell>
          <table:table-cell office:value-type="string" calcext:value-type="string">
            <text:p>D97009A3EABF324DB80B9F8E1D09EC9F</text:p>
          </table:table-cell>
          <table:table-cell table:style-name="ce2" table:number-columns-repeated="16379"/>
        </table:table-row>
        <table:table-row table:style-name="ro1">
          <table:table-cell office:value-type="float" office:value="176869792" calcext:value-type="float">
            <text:p>176869792</text:p>
          </table:table-cell>
          <table:table-cell table:style-name="ce3" office:value-type="date" office:date-value="2023-04-22" calcext:value-type="date">
            <text:p>22/04/2023</text:p>
          </table:table-cell>
          <table:table-cell office:value-type="string" calcext:value-type="string">
            <text:p>D</text:p>
          </table:table-cell>
          <table:table-cell office:value-type="float" office:value="17624.13" calcext:value-type="float">
            <text:p>17624.13</text:p>
          </table:table-cell>
          <table:table-cell office:value-type="string" calcext:value-type="string">
            <text:p>7BFB420B5FB152EDB37351F40FF33440</text:p>
          </table:table-cell>
          <table:table-cell table:style-name="ce2" table:number-columns-repeated="16379"/>
        </table:table-row>
        <table:table-row table:style-name="ro1">
          <table:table-cell office:value-type="float" office:value="176754308" calcext:value-type="float">
            <text:p>176754308</text:p>
          </table:table-cell>
          <table:table-cell table:style-name="ce3" office:value-type="date" office:date-value="2023-04-21" calcext:value-type="date">
            <text:p>21/04/2023</text:p>
          </table:table-cell>
          <table:table-cell office:value-type="string" calcext:value-type="string">
            <text:p>D</text:p>
          </table:table-cell>
          <table:table-cell office:value-type="float" office:value="61570.28" calcext:value-type="float">
            <text:p>61570.28</text:p>
          </table:table-cell>
          <table:table-cell office:value-type="string" calcext:value-type="string">
            <text:p>E530B478DDE7E2965186A16437F905D2</text:p>
          </table:table-cell>
          <table:table-cell table:style-name="ce2" table:number-columns-repeated="16379"/>
        </table:table-row>
        <table:table-row table:style-name="ro1">
          <table:table-cell office:value-type="float" office:value="176588511" calcext:value-type="float">
            <text:p>176588511</text:p>
          </table:table-cell>
          <table:table-cell table:style-name="ce3" office:value-type="date" office:date-value="2023-04-20" calcext:value-type="date">
            <text:p>20/04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BC9BEA3602AA26512757823C7D1E0F</text:p>
          </table:table-cell>
          <table:table-cell table:style-name="ce2" table:number-columns-repeated="16379"/>
        </table:table-row>
        <table:table-row table:style-name="ro1">
          <table:table-cell office:value-type="float" office:value="176470738" calcext:value-type="float">
            <text:p>176470738</text:p>
          </table:table-cell>
          <table:table-cell table:style-name="ce3" office:value-type="date" office:date-value="2023-04-19" calcext:value-type="date">
            <text:p>19/04/2023</text:p>
          </table:table-cell>
          <table:table-cell office:value-type="string" calcext:value-type="string">
            <text:p>D</text:p>
          </table:table-cell>
          <table:table-cell office:value-type="float" office:value="97250.34" calcext:value-type="float">
            <text:p>97250.34</text:p>
          </table:table-cell>
          <table:table-cell office:value-type="string" calcext:value-type="string">
            <text:p>37C67C921B1F6DFE9DAB9FE46A27C0B1</text:p>
          </table:table-cell>
          <table:table-cell table:style-name="ce2" table:number-columns-repeated="16379"/>
        </table:table-row>
        <table:table-row table:style-name="ro1">
          <table:table-cell office:value-type="float" office:value="176338894" calcext:value-type="float">
            <text:p>176338894</text:p>
          </table:table-cell>
          <table:table-cell table:style-name="ce3" office:value-type="date" office:date-value="2023-04-18" calcext:value-type="date">
            <text:p>18/04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D248C128B67A76A3920D70885A89A2E</text:p>
          </table:table-cell>
          <table:table-cell table:style-name="ce2" table:number-columns-repeated="16379"/>
        </table:table-row>
        <table:table-row table:style-name="ro1">
          <table:table-cell office:value-type="float" office:value="176194703" calcext:value-type="float">
            <text:p>176194703</text:p>
          </table:table-cell>
          <table:table-cell table:style-name="ce3" office:value-type="date" office:date-value="2023-04-17" calcext:value-type="date">
            <text:p>17/04/2023</text:p>
          </table:table-cell>
          <table:table-cell office:value-type="string" calcext:value-type="string">
            <text:p>D</text:p>
          </table:table-cell>
          <table:table-cell office:value-type="float" office:value="258646.32" calcext:value-type="float">
            <text:p>258646.32</text:p>
          </table:table-cell>
          <table:table-cell office:value-type="string" calcext:value-type="string">
            <text:p>EEE3965A6341693D83522DF7B6D212D9</text:p>
          </table:table-cell>
          <table:table-cell table:style-name="ce2" table:number-columns-repeated="16379"/>
        </table:table-row>
        <table:table-row table:style-name="ro1">
          <table:table-cell office:value-type="float" office:value="176085053" calcext:value-type="float">
            <text:p>176085053</text:p>
          </table:table-cell>
          <table:table-cell table:style-name="ce3" office:value-type="date" office:date-value="2023-04-15" calcext:value-type="date">
            <text:p>15/04/2023</text:p>
          </table:table-cell>
          <table:table-cell office:value-type="string" calcext:value-type="string">
            <text:p>D</text:p>
          </table:table-cell>
          <table:table-cell office:value-type="float" office:value="41325.95" calcext:value-type="float">
            <text:p>41325.95</text:p>
          </table:table-cell>
          <table:table-cell office:value-type="string" calcext:value-type="string">
            <text:p>AED12E72876AE851C67C5D605E899F3A</text:p>
          </table:table-cell>
          <table:table-cell table:style-name="ce2" table:number-columns-repeated="16379"/>
        </table:table-row>
        <table:table-row table:style-name="ro1">
          <table:table-cell office:value-type="float" office:value="176025487" calcext:value-type="float">
            <text:p>176025487</text:p>
          </table:table-cell>
          <table:table-cell table:style-name="ce3" office:value-type="date" office:date-value="2023-04-14" calcext:value-type="date">
            <text:p>14/04/2023</text:p>
          </table:table-cell>
          <table:table-cell office:value-type="string" calcext:value-type="string">
            <text:p>D</text:p>
          </table:table-cell>
          <table:table-cell office:value-type="float" office:value="17632.13" calcext:value-type="float">
            <text:p>17632.13</text:p>
          </table:table-cell>
          <table:table-cell office:value-type="string" calcext:value-type="string">
            <text:p>7BFB420B5FB152EDB37351F40FF33440</text:p>
          </table:table-cell>
          <table:table-cell table:style-name="ce2" table:number-columns-repeated="16379"/>
        </table:table-row>
        <table:table-row table:style-name="ro1">
          <table:table-cell office:value-type="float" office:value="175843390" calcext:value-type="float">
            <text:p>175843390</text:p>
          </table:table-cell>
          <table:table-cell table:style-name="ce3" office:value-type="date" office:date-value="2023-04-13" calcext:value-type="date">
            <text:p>13/04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8E3EED17200C0890E9B35E161389DCD</text:p>
          </table:table-cell>
          <table:table-cell table:style-name="ce2" table:number-columns-repeated="16379"/>
        </table:table-row>
        <table:table-row table:style-name="ro1">
          <table:table-cell office:value-type="float" office:value="175719120" calcext:value-type="float">
            <text:p>175719120</text:p>
          </table:table-cell>
          <table:table-cell table:style-name="ce3" office:value-type="date" office:date-value="2023-04-12" calcext:value-type="date">
            <text:p>12/04/2023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table:style-name="ce4" office:value-type="string" calcext:value-type="string">
            <text:p>7E878962FE59A6D0D45A5CF8E7F8686C</text:p>
          </table:table-cell>
          <table:table-cell table:style-name="ce2" table:number-columns-repeated="16379"/>
        </table:table-row>
        <table:table-row table:style-name="ro1">
          <table:table-cell office:value-type="float" office:value="175734974" calcext:value-type="float">
            <text:p>175734974</text:p>
          </table:table-cell>
          <table:table-cell table:style-name="ce3" office:value-type="date" office:date-value="2023-04-11" calcext:value-type="date">
            <text:p>11/04/2023</text:p>
          </table:table-cell>
          <table:table-cell office:value-type="string" calcext:value-type="string">
            <text:p>D</text:p>
          </table:table-cell>
          <table:table-cell office:value-type="float" office:value="77695.22" calcext:value-type="float">
            <text:p>77695.22</text:p>
          </table:table-cell>
          <table:table-cell office:value-type="string" calcext:value-type="string">
            <text:p>68C4BF851DF4B69D2E2FC9BACFE36AE5</text:p>
          </table:table-cell>
          <table:table-cell table:style-name="ce2" table:number-columns-repeated="16379"/>
        </table:table-row>
        <table:table-row table:style-name="ro1">
          <table:table-cell office:value-type="float" office:value="175571176" calcext:value-type="float">
            <text:p>175571176</text:p>
          </table:table-cell>
          <table:table-cell table:style-name="ce3" office:value-type="date" office:date-value="2023-04-10" calcext:value-type="date">
            <text:p>10/04/2023</text:p>
          </table:table-cell>
          <table:table-cell office:value-type="string" calcext:value-type="string">
            <text:p>D</text:p>
          </table:table-cell>
          <table:table-cell office:value-type="float" office:value="490.35" calcext:value-type="float">
            <text:p>490.35</text:p>
          </table:table-cell>
          <table:table-cell office:value-type="string" calcext:value-type="string">
            <text:p>9B85B531C4A040ED20BC89126BDC0ACB</text:p>
          </table:table-cell>
          <table:table-cell table:style-name="ce2" table:number-columns-repeated="16379"/>
        </table:table-row>
        <table:table-row table:style-name="ro1">
          <table:table-cell office:value-type="float" office:value="175420597" calcext:value-type="float">
            <text:p>175420597</text:p>
          </table:table-cell>
          <table:table-cell table:style-name="ce3" office:value-type="date" office:date-value="2023-04-08" calcext:value-type="date">
            <text:p>08/04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CA32DB62A28121BF2A1979D4AF15D71</text:p>
          </table:table-cell>
          <table:table-cell table:style-name="ce2" table:number-columns-repeated="16379"/>
        </table:table-row>
        <table:table-row table:style-name="ro1">
          <table:table-cell office:value-type="float" office:value="175312118" calcext:value-type="float">
            <text:p>175312118</text:p>
          </table:table-cell>
          <table:table-cell table:style-name="ce3" office:value-type="date" office:date-value="2023-04-06" calcext:value-type="date">
            <text:p>06/04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D9AF5AA2F3A16943601EF389872534</text:p>
          </table:table-cell>
          <table:table-cell table:style-name="ce2" table:number-columns-repeated="16379"/>
        </table:table-row>
        <table:table-row table:style-name="ro1">
          <table:table-cell office:value-type="float" office:value="175166206" calcext:value-type="float">
            <text:p>175166206</text:p>
          </table:table-cell>
          <table:table-cell table:style-name="ce3" office:value-type="date" office:date-value="2023-04-05" calcext:value-type="date">
            <text:p>05/04/2023</text:p>
          </table:table-cell>
          <table:table-cell office:value-type="string" calcext:value-type="string">
            <text:p>D</text:p>
          </table:table-cell>
          <table:table-cell office:value-type="float" office:value="19570.47" calcext:value-type="float">
            <text:p>19570.47</text:p>
          </table:table-cell>
          <table:table-cell office:value-type="string" calcext:value-type="string">
            <text:p>789D29A4B4DC4EE77362F816E80A1F9D</text:p>
          </table:table-cell>
          <table:table-cell table:style-name="ce2" table:number-columns-repeated="16379"/>
        </table:table-row>
        <table:table-row table:style-name="ro1">
          <table:table-cell office:value-type="float" office:value="175040763" calcext:value-type="float">
            <text:p>175040763</text:p>
          </table:table-cell>
          <table:table-cell table:style-name="ce3" office:value-type="date" office:date-value="2023-04-04" calcext:value-type="date">
            <text:p>04/04/2023</text:p>
          </table:table-cell>
          <table:table-cell office:value-type="string" calcext:value-type="string">
            <text:p>D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E5E081CDFB7598C60EDACC8C117B060</text:p>
          </table:table-cell>
          <table:table-cell table:style-name="ce2" table:number-columns-repeated="16379"/>
        </table:table-row>
        <table:table-row table:style-name="ro1">
          <table:table-cell office:value-type="float" office:value="174875570" calcext:value-type="float">
            <text:p>174875570</text:p>
          </table:table-cell>
          <table:table-cell table:style-name="ce3" office:value-type="date" office:date-value="2023-04-03" calcext:value-type="date">
            <text:p>03/04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8697896B82F1AC146165FE5F54D22B</text:p>
          </table:table-cell>
          <table:table-cell table:style-name="ce2" table:number-columns-repeated="16379"/>
        </table:table-row>
        <table:table-row table:style-name="ro1">
          <table:table-cell office:value-type="float" office:value="174713083" calcext:value-type="float">
            <text:p>174713083</text:p>
          </table:table-cell>
          <table:table-cell table:style-name="ce3" office:value-type="date" office:date-value="2023-04-01" calcext:value-type="date">
            <text:p>01/04/2023</text:p>
          </table:table-cell>
          <table:table-cell office:value-type="string" calcext:value-type="string">
            <text:p>D</text:p>
          </table:table-cell>
          <table:table-cell office:value-type="float" office:value="297.16" calcext:value-type="float">
            <text:p>297.16</text:p>
          </table:table-cell>
          <table:table-cell office:value-type="string" calcext:value-type="string">
            <text:p>97A9CC3350FBD588765E618E7C446D21</text:p>
          </table:table-cell>
          <table:table-cell table:style-name="ce2" table:number-columns-repeated="16379"/>
        </table:table-row>
        <table:table-row table:style-name="ro1">
          <table:table-cell office:value-type="float" office:value="174572928" calcext:value-type="float">
            <text:p>174572928</text:p>
          </table:table-cell>
          <table:table-cell table:style-name="ce3" office:value-type="date" office:date-value="2023-03-30" calcext:value-type="date">
            <text:p>30/03/2023</text:p>
          </table:table-cell>
          <table:table-cell office:value-type="string" calcext:value-type="string">
            <text:p>D</text:p>
          </table:table-cell>
          <table:table-cell office:value-type="float" office:value="64832.09" calcext:value-type="float">
            <text:p>64832.09</text:p>
          </table:table-cell>
          <table:table-cell office:value-type="string" calcext:value-type="string">
            <text:p>B1A4B6AB96515EB520883A5AF5AED38E</text:p>
          </table:table-cell>
          <table:table-cell table:style-name="ce2" table:number-columns-repeated="16379"/>
        </table:table-row>
        <table:table-row table:style-name="ro1">
          <table:table-cell office:value-type="float" office:value="174436800" calcext:value-type="float">
            <text:p>174436800</text:p>
          </table:table-cell>
          <table:table-cell table:style-name="ce3" office:value-type="date" office:date-value="2023-03-29" calcext:value-type="date">
            <text:p>29/03/2023</text:p>
          </table:table-cell>
          <table:table-cell office:value-type="string" calcext:value-type="string">
            <text:p>D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B7B53C0797ED1522839413C2C90C3405</text:p>
          </table:table-cell>
          <table:table-cell table:style-name="ce2" table:number-columns-repeated="16379"/>
        </table:table-row>
        <table:table-row table:style-name="ro1">
          <table:table-cell office:value-type="float" office:value="174345784" calcext:value-type="float">
            <text:p>174345784</text:p>
          </table:table-cell>
          <table:table-cell table:style-name="ce3" office:value-type="date" office:date-value="2023-03-28" calcext:value-type="date">
            <text:p>28/03/2023</text:p>
          </table:table-cell>
          <table:table-cell office:value-type="string" calcext:value-type="string">
            <text:p>D</text:p>
          </table:table-cell>
          <table:table-cell office:value-type="float" office:value="4057.31" calcext:value-type="float">
            <text:p>4057.31</text:p>
          </table:table-cell>
          <table:table-cell office:value-type="string" calcext:value-type="string">
            <text:p>BE0CA5FC474BA7335AA168B17C5773E5</text:p>
          </table:table-cell>
          <table:table-cell table:style-name="ce2" table:number-columns-repeated="16379"/>
        </table:table-row>
        <table:table-row table:style-name="ro1">
          <table:table-cell office:value-type="float" office:value="174184829" calcext:value-type="float">
            <text:p>174184829</text:p>
          </table:table-cell>
          <table:table-cell table:style-name="ce3" office:value-type="date" office:date-value="2023-03-26" calcext:value-type="date">
            <text:p>26/03/2023</text:p>
          </table:table-cell>
          <table:table-cell office:value-type="string" calcext:value-type="string">
            <text:p>D</text:p>
          </table:table-cell>
          <table:table-cell office:value-type="float" office:value="30999.49" calcext:value-type="float">
            <text:p>30999.49</text:p>
          </table:table-cell>
          <table:table-cell office:value-type="string" calcext:value-type="string">
            <text:p>DF2D375FB009AE73A3FD509F541BDC45</text:p>
          </table:table-cell>
          <table:table-cell table:style-name="ce2" table:number-columns-repeated="16379"/>
        </table:table-row>
        <table:table-row table:style-name="ro1">
          <table:table-cell office:value-type="float" office:value="174060836" calcext:value-type="float">
            <text:p>174060836</text:p>
          </table:table-cell>
          <table:table-cell table:style-name="ce3" office:value-type="date" office:date-value="2023-03-25" calcext:value-type="date">
            <text:p>25/03/2023</text:p>
          </table:table-cell>
          <table:table-cell office:value-type="string" calcext:value-type="string">
            <text:p>D</text:p>
          </table:table-cell>
          <table:table-cell office:value-type="float" office:value="32319.99" calcext:value-type="float">
            <text:p>32319.99</text:p>
          </table:table-cell>
          <table:table-cell office:value-type="string" calcext:value-type="string">
            <text:p>545A92BB68DD4E734C74BEC297C5421B</text:p>
          </table:table-cell>
          <table:table-cell table:style-name="ce2" table:number-columns-repeated="16379"/>
        </table:table-row>
        <table:table-row table:style-name="ro1">
          <table:table-cell office:value-type="float" office:value="173944268" calcext:value-type="float">
            <text:p>173944268</text:p>
          </table:table-cell>
          <table:table-cell table:style-name="ce3" office:value-type="date" office:date-value="2023-03-24" calcext:value-type="date">
            <text:p>24/03/202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F986FE25FB34288763103939569F09A</text:p>
          </table:table-cell>
          <table:table-cell table:style-name="ce2" table:number-columns-repeated="16379"/>
        </table:table-row>
        <table:table-row table:style-name="ro1">
          <table:table-cell office:value-type="float" office:value="173820639" calcext:value-type="float">
            <text:p>173820639</text:p>
          </table:table-cell>
          <table:table-cell table:style-name="ce3" office:value-type="date" office:date-value="2023-03-23" calcext:value-type="date">
            <text:p>23/03/2023</text:p>
          </table:table-cell>
          <table:table-cell office:value-type="string" calcext:value-type="string">
            <text:p>D</text:p>
          </table:table-cell>
          <table:table-cell office:value-type="float" office:value="72821.78" calcext:value-type="float">
            <text:p>72821.78</text:p>
          </table:table-cell>
          <table:table-cell office:value-type="string" calcext:value-type="string">
            <text:p>447383EBEA7781CF8E1CA33378A1AF2A</text:p>
          </table:table-cell>
          <table:table-cell table:style-name="ce2" table:number-columns-repeated="16379"/>
        </table:table-row>
        <table:table-row table:style-name="ro1">
          <table:table-cell office:value-type="float" office:value="173756615" calcext:value-type="float">
            <text:p>173756615</text:p>
          </table:table-cell>
          <table:table-cell table:style-name="ce3" office:value-type="date" office:date-value="2023-03-22" calcext:value-type="date">
            <text:p>22/03/2023</text:p>
          </table:table-cell>
          <table:table-cell office:value-type="string" calcext:value-type="string">
            <text:p>D</text:p>
          </table:table-cell>
          <table:table-cell office:value-type="float" office:value="130859.51" calcext:value-type="float">
            <text:p>130859.51</text:p>
          </table:table-cell>
          <table:table-cell office:value-type="string" calcext:value-type="string">
            <text:p>9F753CC89029DA2F55DA3709050421D7</text:p>
          </table:table-cell>
          <table:table-cell table:style-name="ce2" table:number-columns-repeated="16379"/>
        </table:table-row>
        <table:table-row table:style-name="ro1">
          <table:table-cell office:value-type="float" office:value="173653974" calcext:value-type="float">
            <text:p>173653974</text:p>
          </table:table-cell>
          <table:table-cell table:style-name="ce3" office:value-type="date" office:date-value="2023-03-21" calcext:value-type="date">
            <text:p>21/03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0EBEC0DA0995D7E6122E222B04EE03</text:p>
          </table:table-cell>
          <table:table-cell table:style-name="ce2" table:number-columns-repeated="16379"/>
        </table:table-row>
        <table:table-row table:style-name="ro1">
          <table:table-cell office:value-type="float" office:value="173469157" calcext:value-type="float">
            <text:p>173469157</text:p>
          </table:table-cell>
          <table:table-cell table:style-name="ce3" office:value-type="date" office:date-value="2023-03-19" calcext:value-type="date">
            <text:p>19/03/2023</text:p>
          </table:table-cell>
          <table:table-cell office:value-type="string" calcext:value-type="string">
            <text:p>D</text:p>
          </table:table-cell>
          <table:table-cell office:value-type="float" office:value="11295.32" calcext:value-type="float">
            <text:p>11295.32</text:p>
          </table:table-cell>
          <table:table-cell office:value-type="string" calcext:value-type="string">
            <text:p>0232DC75F95C04A3FBD5F34B1858DEB3</text:p>
          </table:table-cell>
          <table:table-cell table:style-name="ce2" table:number-columns-repeated="16379"/>
        </table:table-row>
        <table:table-row table:style-name="ro1">
          <table:table-cell office:value-type="float" office:value="173402781" calcext:value-type="float">
            <text:p>173402781</text:p>
          </table:table-cell>
          <table:table-cell table:style-name="ce3" office:value-type="date" office:date-value="2023-03-18" calcext:value-type="date">
            <text:p>18/03/2023</text:p>
          </table:table-cell>
          <table:table-cell office:value-type="string" calcext:value-type="string">
            <text:p>D</text:p>
          </table:table-cell>
          <table:table-cell office:value-type="float" office:value="17907.99" calcext:value-type="float">
            <text:p>17907.99</text:p>
          </table:table-cell>
          <table:table-cell office:value-type="string" calcext:value-type="string">
            <text:p>7BFB420B5FB152EDB37351F40FF33440</text:p>
          </table:table-cell>
          <table:table-cell table:style-name="ce2" table:number-columns-repeated="16379"/>
        </table:table-row>
        <table:table-row table:style-name="ro1">
          <table:table-cell office:value-type="float" office:value="173237638" calcext:value-type="float">
            <text:p>173237638</text:p>
          </table:table-cell>
          <table:table-cell table:style-name="ce3" office:value-type="date" office:date-value="2023-03-17" calcext:value-type="date">
            <text:p>17/03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FBBEE402833775F1431C01153F046B</text:p>
          </table:table-cell>
          <table:table-cell table:style-name="ce2" table:number-columns-repeated="16379"/>
        </table:table-row>
        <table:table-row table:style-name="ro1">
          <table:table-cell office:value-type="float" office:value="173176777" calcext:value-type="float">
            <text:p>173176777</text:p>
          </table:table-cell>
          <table:table-cell table:style-name="ce3" office:value-type="date" office:date-value="2023-03-16" calcext:value-type="date">
            <text:p>16/03/2023</text:p>
          </table:table-cell>
          <table:table-cell office:value-type="string" calcext:value-type="string">
            <text:p>D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1A0FE6857CBC7BD444E2C62B4299A032</text:p>
          </table:table-cell>
          <table:table-cell table:style-name="ce2" table:number-columns-repeated="16379"/>
        </table:table-row>
        <table:table-row table:style-name="ro1">
          <table:table-cell office:value-type="float" office:value="173056297" calcext:value-type="float">
            <text:p>173056297</text:p>
          </table:table-cell>
          <table:table-cell table:style-name="ce3" office:value-type="date" office:date-value="2023-03-15" calcext:value-type="date">
            <text:p>15/03/2023</text:p>
          </table:table-cell>
          <table:table-cell office:value-type="string" calcext:value-type="string">
            <text:p>D</text:p>
          </table:table-cell>
          <table:table-cell office:value-type="float" office:value="2508739.8" calcext:value-type="float">
            <text:p>2508739.8</text:p>
          </table:table-cell>
          <table:table-cell office:value-type="string" calcext:value-type="string">
            <text:p>EC4756A3FF78DED2BC1741FA8543648D</text:p>
          </table:table-cell>
          <table:table-cell table:style-name="ce2" table:number-columns-repeated="16379"/>
        </table:table-row>
        <table:table-row table:style-name="ro1">
          <table:table-cell office:value-type="float" office:value="172889767" calcext:value-type="float">
            <text:p>172889767</text:p>
          </table:table-cell>
          <table:table-cell table:style-name="ce3" office:value-type="date" office:date-value="2023-03-14" calcext:value-type="date">
            <text:p>14/03/2023</text:p>
          </table:table-cell>
          <table:table-cell office:value-type="string" calcext:value-type="string">
            <text:p>D</text:p>
          </table:table-cell>
          <table:table-cell office:value-type="float" office:value="39927.5" calcext:value-type="float">
            <text:p>39927.5</text:p>
          </table:table-cell>
          <table:table-cell office:value-type="string" calcext:value-type="string">
            <text:p>1228A0777B23EC5D8D2C0312F41A9509</text:p>
          </table:table-cell>
          <table:table-cell table:style-name="ce2" table:number-columns-repeated="16379"/>
        </table:table-row>
        <table:table-row table:style-name="ro1">
          <table:table-cell office:value-type="float" office:value="172752159" calcext:value-type="float">
            <text:p>172752159</text:p>
          </table:table-cell>
          <table:table-cell table:style-name="ce3" office:value-type="date" office:date-value="2023-03-13" calcext:value-type="date">
            <text:p>13/03/2023</text:p>
          </table:table-cell>
          <table:table-cell office:value-type="string" calcext:value-type="string">
            <text:p>D</text:p>
          </table:table-cell>
          <table:table-cell office:value-type="float" office:value="190760.98" calcext:value-type="float">
            <text:p>190760.98</text:p>
          </table:table-cell>
          <table:table-cell office:value-type="string" calcext:value-type="string">
            <text:p>40EC4E628648A5508B83B34CC9A2D7D5</text:p>
          </table:table-cell>
          <table:table-cell table:style-name="ce2" table:number-columns-repeated="16379"/>
        </table:table-row>
        <table:table-row table:style-name="ro1">
          <table:table-cell office:value-type="float" office:value="172659592" calcext:value-type="float">
            <text:p>172659592</text:p>
          </table:table-cell>
          <table:table-cell table:style-name="ce3" office:value-type="date" office:date-value="2023-03-11" calcext:value-type="date">
            <text:p>11/03/2023</text:p>
          </table:table-cell>
          <table:table-cell office:value-type="string" calcext:value-type="string">
            <text:p>D</text:p>
          </table:table-cell>
          <table:table-cell office:value-type="float" office:value="111704.09" calcext:value-type="float">
            <text:p>111704.09</text:p>
          </table:table-cell>
          <table:table-cell office:value-type="string" calcext:value-type="string">
            <text:p>43713542F7765F26A35DDBBCED8751CC</text:p>
          </table:table-cell>
          <table:table-cell table:style-name="ce2" table:number-columns-repeated="16379"/>
        </table:table-row>
        <table:table-row table:style-name="ro1">
          <table:table-cell office:value-type="float" office:value="172547274" calcext:value-type="float">
            <text:p>172547274</text:p>
          </table:table-cell>
          <table:table-cell table:style-name="ce3" office:value-type="date" office:date-value="2023-03-10" calcext:value-type="date">
            <text:p>10/03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B9CD4A5F6F6146BBB15BE8DD62CA00</text:p>
          </table:table-cell>
          <table:table-cell table:style-name="ce2" table:number-columns-repeated="16379"/>
        </table:table-row>
        <table:table-row table:style-name="ro1">
          <table:table-cell office:value-type="float" office:value="172416891" calcext:value-type="float">
            <text:p>172416891</text:p>
          </table:table-cell>
          <table:table-cell table:style-name="ce3" office:value-type="date" office:date-value="2023-03-09" calcext:value-type="date">
            <text:p>09/03/2023</text:p>
          </table:table-cell>
          <table:table-cell office:value-type="string" calcext:value-type="string">
            <text:p>D</text:p>
          </table:table-cell>
          <table:table-cell office:value-type="float" office:value="135372.35" calcext:value-type="float">
            <text:p>135372.35</text:p>
          </table:table-cell>
          <table:table-cell office:value-type="string" calcext:value-type="string">
            <text:p>28CACA267E1CD9160624662D60C2009E</text:p>
          </table:table-cell>
          <table:table-cell table:style-name="ce2" table:number-columns-repeated="16379"/>
        </table:table-row>
        <table:table-row table:style-name="ro1">
          <table:table-cell office:value-type="float" office:value="172354871" calcext:value-type="float">
            <text:p>172354871</text:p>
          </table:table-cell>
          <table:table-cell table:style-name="ce3" office:value-type="date" office:date-value="2023-03-08" calcext:value-type="date">
            <text:p>08/03/2023</text:p>
          </table:table-cell>
          <table:table-cell office:value-type="string" calcext:value-type="string">
            <text:p>D</text:p>
          </table:table-cell>
          <table:table-cell office:value-type="float" office:value="241518.92" calcext:value-type="float">
            <text:p>241518.92</text:p>
          </table:table-cell>
          <table:table-cell office:value-type="string" calcext:value-type="string">
            <text:p>84F26A24BB94797D58A189EF624F1AD2</text:p>
          </table:table-cell>
          <table:table-cell table:style-name="ce2" table:number-columns-repeated="16379"/>
        </table:table-row>
        <table:table-row table:style-name="ro1">
          <table:table-cell office:value-type="float" office:value="172179986" calcext:value-type="float">
            <text:p>172179986</text:p>
          </table:table-cell>
          <table:table-cell table:style-name="ce3" office:value-type="date" office:date-value="2023-03-07" calcext:value-type="date">
            <text:p>07/03/2023</text:p>
          </table:table-cell>
          <table:table-cell office:value-type="string" calcext:value-type="string">
            <text:p>D</text:p>
          </table:table-cell>
          <table:table-cell office:value-type="float" office:value="116110.14" calcext:value-type="float">
            <text:p>116110.14</text:p>
          </table:table-cell>
          <table:table-cell office:value-type="string" calcext:value-type="string">
            <text:p>95AABF3305977BCA6774DC7BFB26A8E5</text:p>
          </table:table-cell>
          <table:table-cell table:style-name="ce2" table:number-columns-repeated="16379"/>
        </table:table-row>
        <table:table-row table:style-name="ro1">
          <table:table-cell office:value-type="float" office:value="172046624" calcext:value-type="float">
            <text:p>172046624</text:p>
          </table:table-cell>
          <table:table-cell table:style-name="ce3" office:value-type="date" office:date-value="2023-03-05" calcext:value-type="date">
            <text:p>05/03/2023</text:p>
          </table:table-cell>
          <table:table-cell office:value-type="string" calcext:value-type="string">
            <text:p>D</text:p>
          </table:table-cell>
          <table:table-cell office:value-type="float" office:value="66726.94" calcext:value-type="float">
            <text:p>66726.94</text:p>
          </table:table-cell>
          <table:table-cell office:value-type="string" calcext:value-type="string">
            <text:p>5D9D02EE2256311FB4F9ACC978DA7A36</text:p>
          </table:table-cell>
          <table:table-cell table:style-name="ce2" table:number-columns-repeated="16379"/>
        </table:table-row>
        <table:table-row table:style-name="ro1">
          <table:table-cell office:value-type="float" office:value="171937551" calcext:value-type="float">
            <text:p>171937551</text:p>
          </table:table-cell>
          <table:table-cell table:style-name="ce3" office:value-type="date" office:date-value="2023-03-04" calcext:value-type="date">
            <text:p>04/03/2023</text:p>
          </table:table-cell>
          <table:table-cell office:value-type="string" calcext:value-type="string">
            <text:p>D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78FBBE99E4CB00373611DCB14B04C8EE</text:p>
          </table:table-cell>
          <table:table-cell table:style-name="ce2" table:number-columns-repeated="16379"/>
        </table:table-row>
        <table:table-row table:style-name="ro1">
          <table:table-cell office:value-type="float" office:value="171818668" calcext:value-type="float">
            <text:p>171818668</text:p>
          </table:table-cell>
          <table:table-cell table:style-name="ce3" office:value-type="date" office:date-value="2023-03-03" calcext:value-type="date">
            <text:p>03/03/2023</text:p>
          </table:table-cell>
          <table:table-cell office:value-type="string" calcext:value-type="string">
            <text:p>D</text:p>
          </table:table-cell>
          <table:table-cell office:value-type="float" office:value="82398.03" calcext:value-type="float">
            <text:p>82398.03</text:p>
          </table:table-cell>
          <table:table-cell office:value-type="string" calcext:value-type="string">
            <text:p>FB7FE110C06F2C119399DDC2C69C840E</text:p>
          </table:table-cell>
          <table:table-cell table:style-name="ce2" table:number-columns-repeated="16379"/>
        </table:table-row>
        <table:table-row table:style-name="ro1">
          <table:table-cell office:value-type="float" office:value="171670185" calcext:value-type="float">
            <text:p>171670185</text:p>
          </table:table-cell>
          <table:table-cell table:style-name="ce3" office:value-type="date" office:date-value="2023-03-02" calcext:value-type="date">
            <text:p>02/03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C41474316A5073593FFA296878813CA</text:p>
          </table:table-cell>
          <table:table-cell table:style-name="ce2" table:number-columns-repeated="16379"/>
        </table:table-row>
        <table:table-row table:style-name="ro1">
          <table:table-cell office:value-type="float" office:value="171523533" calcext:value-type="float">
            <text:p>171523533</text:p>
          </table:table-cell>
          <table:table-cell table:style-name="ce3" office:value-type="date" office:date-value="2023-03-01" calcext:value-type="date">
            <text:p>01/03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66AF33F429CF34F2ABDCA545A0E1AA</text:p>
          </table:table-cell>
          <table:table-cell table:style-name="ce2" table:number-columns-repeated="16379"/>
        </table:table-row>
        <table:table-row table:style-name="ro1">
          <table:table-cell office:value-type="float" office:value="171399371" calcext:value-type="float">
            <text:p>171399371</text:p>
          </table:table-cell>
          <table:table-cell table:style-name="ce3" office:value-type="date" office:date-value="2023-02-28" calcext:value-type="date">
            <text:p>28/02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77C6DDDFDDEA7004272E1C74D0EAA8</text:p>
          </table:table-cell>
          <table:table-cell table:style-name="ce2" table:number-columns-repeated="16379"/>
        </table:table-row>
        <table:table-row table:style-name="ro1">
          <table:table-cell office:value-type="float" office:value="171235365" calcext:value-type="float">
            <text:p>171235365</text:p>
          </table:table-cell>
          <table:table-cell table:style-name="ce3" office:value-type="date" office:date-value="2023-02-27" calcext:value-type="date">
            <text:p>27/02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DCF1BB157550725B484B318FF27C7B</text:p>
          </table:table-cell>
          <table:table-cell table:style-name="ce2" table:number-columns-repeated="16379"/>
        </table:table-row>
        <table:table-row table:style-name="ro1">
          <table:table-cell office:value-type="float" office:value="171127779" calcext:value-type="float">
            <text:p>171127779</text:p>
          </table:table-cell>
          <table:table-cell table:style-name="ce3" office:value-type="date" office:date-value="2023-02-25" calcext:value-type="date">
            <text:p>25/02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8251373AA74D4553A67775B8381F6C</text:p>
          </table:table-cell>
          <table:table-cell table:style-name="ce2" table:number-columns-repeated="16379"/>
        </table:table-row>
        <table:table-row table:style-name="ro1">
          <table:table-cell office:value-type="float" office:value="171037150" calcext:value-type="float">
            <text:p>171037150</text:p>
          </table:table-cell>
          <table:table-cell table:style-name="ce3" office:value-type="date" office:date-value="2023-02-24" calcext:value-type="date">
            <text:p>24/02/2023</text:p>
          </table:table-cell>
          <table:table-cell office:value-type="string" calcext:value-type="string">
            <text:p>D</text:p>
          </table:table-cell>
          <table:table-cell office:value-type="float" office:value="125540.88" calcext:value-type="float">
            <text:p>125540.88</text:p>
          </table:table-cell>
          <table:table-cell office:value-type="string" calcext:value-type="string">
            <text:p>30902067743F1EF1E242F943E1A64DA5</text:p>
          </table:table-cell>
          <table:table-cell table:style-name="ce2" table:number-columns-repeated="16379"/>
        </table:table-row>
        <table:table-row table:style-name="ro1">
          <table:table-cell office:value-type="float" office:value="170885746" calcext:value-type="float">
            <text:p>170885746</text:p>
          </table:table-cell>
          <table:table-cell table:style-name="ce3" office:value-type="date" office:date-value="2023-02-23" calcext:value-type="date">
            <text:p>23/02/2023</text:p>
          </table:table-cell>
          <table:table-cell office:value-type="string" calcext:value-type="string">
            <text:p>D</text:p>
          </table:table-cell>
          <table:table-cell office:value-type="float" office:value="8303.51" calcext:value-type="float">
            <text:p>8303.51</text:p>
          </table:table-cell>
          <table:table-cell office:value-type="string" calcext:value-type="string">
            <text:p>9C2401470A19BFF8592ACA808F898491</text:p>
          </table:table-cell>
          <table:table-cell table:style-name="ce2" table:number-columns-repeated="16379"/>
        </table:table-row>
        <table:table-row table:style-name="ro1">
          <table:table-cell office:value-type="float" office:value="170824953" calcext:value-type="float">
            <text:p>170824953</text:p>
          </table:table-cell>
          <table:table-cell table:style-name="ce3" office:value-type="date" office:date-value="2023-02-22" calcext:value-type="date">
            <text:p>22/02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247C81C39063E3E1F6AB459F6893E3</text:p>
          </table:table-cell>
          <table:table-cell table:style-name="ce2" table:number-columns-repeated="16379"/>
        </table:table-row>
        <table:table-row table:style-name="ro1">
          <table:table-cell office:value-type="float" office:value="170659408" calcext:value-type="float">
            <text:p>170659408</text:p>
          </table:table-cell>
          <table:table-cell table:style-name="ce3" office:value-type="date" office:date-value="2023-02-21" calcext:value-type="date">
            <text:p>21/02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A735C856EF9A08D5165F214022C306</text:p>
          </table:table-cell>
          <table:table-cell table:style-name="ce2" table:number-columns-repeated="16379"/>
        </table:table-row>
        <table:table-row table:style-name="ro1">
          <table:table-cell office:value-type="float" office:value="170540747" calcext:value-type="float">
            <text:p>170540747</text:p>
          </table:table-cell>
          <table:table-cell table:style-name="ce3" office:value-type="date" office:date-value="2023-02-19" calcext:value-type="date">
            <text:p>19/02/2023</text:p>
          </table:table-cell>
          <table:table-cell office:value-type="string" calcext:value-type="string">
            <text:p>D</text:p>
          </table:table-cell>
          <table:table-cell office:value-type="float" office:value="11378.51" calcext:value-type="float">
            <text:p>11378.51</text:p>
          </table:table-cell>
          <table:table-cell office:value-type="string" calcext:value-type="string">
            <text:p>0232DC75F95C04A3FBD5F34B1858DEB3</text:p>
          </table:table-cell>
          <table:table-cell table:style-name="ce2" table:number-columns-repeated="16379"/>
        </table:table-row>
        <table:table-row table:style-name="ro1">
          <table:table-cell office:value-type="float" office:value="170424262" calcext:value-type="float">
            <text:p>170424262</text:p>
          </table:table-cell>
          <table:table-cell table:style-name="ce3" office:value-type="date" office:date-value="2023-02-18" calcext:value-type="date">
            <text:p>18/02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81B7597A75DCF572F5456CFA1F0299</text:p>
          </table:table-cell>
          <table:table-cell table:style-name="ce2" table:number-columns-repeated="16379"/>
        </table:table-row>
        <table:table-row table:style-name="ro1">
          <table:table-cell office:value-type="float" office:value="170311230" calcext:value-type="float">
            <text:p>170311230</text:p>
          </table:table-cell>
          <table:table-cell table:style-name="ce3" office:value-type="date" office:date-value="2023-02-17" calcext:value-type="date">
            <text:p>17/02/2023</text:p>
          </table:table-cell>
          <table:table-cell office:value-type="string" calcext:value-type="string">
            <text:p>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CFC34BFFF81B32CFEFEABF2DF68C486</text:p>
          </table:table-cell>
          <table:table-cell table:style-name="ce2" table:number-columns-repeated="16379"/>
        </table:table-row>
        <table:table-row table:style-name="ro1">
          <table:table-cell office:value-type="float" office:value="170062175" calcext:value-type="float">
            <text:p>170062175</text:p>
          </table:table-cell>
          <table:table-cell table:style-name="ce3" office:value-type="date" office:date-value="2023-02-16" calcext:value-type="date">
            <text:p>16/02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2E15748CF5D31556FE37C4104BD4A1</text:p>
          </table:table-cell>
          <table:table-cell table:style-name="ce2" table:number-columns-repeated="16379"/>
        </table:table-row>
        <table:table-row table:style-name="ro1">
          <table:table-cell office:value-type="float" office:value="169875527" calcext:value-type="float">
            <text:p>169875527</text:p>
          </table:table-cell>
          <table:table-cell table:style-name="ce3" office:value-type="date" office:date-value="2023-02-15" calcext:value-type="date">
            <text:p>15/02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0084831E89C2F9858CCAA6B8FBD4064</text:p>
          </table:table-cell>
          <table:table-cell table:style-name="ce2" table:number-columns-repeated="16379"/>
        </table:table-row>
        <table:table-row table:style-name="ro1">
          <table:table-cell office:value-type="float" office:value="169742302" calcext:value-type="float">
            <text:p>169742302</text:p>
          </table:table-cell>
          <table:table-cell table:style-name="ce3" office:value-type="date" office:date-value="2023-02-14" calcext:value-type="date">
            <text:p>14/02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5A7DA8AC1F130F1B9BC298909A2576</text:p>
          </table:table-cell>
          <table:table-cell table:style-name="ce2" table:number-columns-repeated="16379"/>
        </table:table-row>
        <table:table-row table:style-name="ro1">
          <table:table-cell office:value-type="float" office:value="169570852" calcext:value-type="float">
            <text:p>169570852</text:p>
          </table:table-cell>
          <table:table-cell table:style-name="ce3" office:value-type="date" office:date-value="2023-02-12" calcext:value-type="date">
            <text:p>12/02/2023</text:p>
          </table:table-cell>
          <table:table-cell office:value-type="string" calcext:value-type="string">
            <text:p>D</text:p>
          </table:table-cell>
          <table:table-cell office:value-type="float" office:value="9789.96" calcext:value-type="float">
            <text:p>9789.96</text:p>
          </table:table-cell>
          <table:table-cell office:value-type="string" calcext:value-type="string">
            <text:p>91BFBAC6A5653A2BFF7A0686B0294E41</text:p>
          </table:table-cell>
          <table:table-cell table:style-name="ce2" table:number-columns-repeated="16379"/>
        </table:table-row>
        <table:table-row table:style-name="ro1">
          <table:table-cell office:value-type="float" office:value="169432573" calcext:value-type="float">
            <text:p>169432573</text:p>
          </table:table-cell>
          <table:table-cell table:style-name="ce3" office:value-type="date" office:date-value="2023-02-11" calcext:value-type="date">
            <text:p>11/02/2023</text:p>
          </table:table-cell>
          <table:table-cell office:value-type="string" calcext:value-type="string">
            <text:p>D</text:p>
          </table:table-cell>
          <table:table-cell office:value-type="float" office:value="125605.03" calcext:value-type="float">
            <text:p>125605.03</text:p>
          </table:table-cell>
          <table:table-cell office:value-type="string" calcext:value-type="string">
            <text:p>12C78EBD003BD4C90D5ECE3D54CB7C90</text:p>
          </table:table-cell>
          <table:table-cell table:style-name="ce2" table:number-columns-repeated="16379"/>
        </table:table-row>
        <table:table-row table:style-name="ro1">
          <table:table-cell office:value-type="float" office:value="169321335" calcext:value-type="float">
            <text:p>169321335</text:p>
          </table:table-cell>
          <table:table-cell table:style-name="ce3" office:value-type="date" office:date-value="2023-02-09" calcext:value-type="date">
            <text:p>09/02/2023</text:p>
          </table:table-cell>
          <table:table-cell office:value-type="string" calcext:value-type="string">
            <text:p>D</text:p>
          </table:table-cell>
          <table:table-cell office:value-type="float" office:value="31600" calcext:value-type="float">
            <text:p>31600</text:p>
          </table:table-cell>
          <table:table-cell office:value-type="string" calcext:value-type="string">
            <text:p>CF2F18207BE0B4616E6E42D946F6A683</text:p>
          </table:table-cell>
          <table:table-cell table:style-name="ce2" table:number-columns-repeated="16379"/>
        </table:table-row>
        <table:table-row table:style-name="ro1">
          <table:table-cell office:value-type="float" office:value="169260262" calcext:value-type="float">
            <text:p>169260262</text:p>
          </table:table-cell>
          <table:table-cell table:style-name="ce3" office:value-type="date" office:date-value="2023-02-08" calcext:value-type="date">
            <text:p>08/02/2023</text:p>
          </table:table-cell>
          <table:table-cell office:value-type="string" calcext:value-type="string">
            <text:p>D</text:p>
          </table:table-cell>
          <table:table-cell office:value-type="float" office:value="242370.18" calcext:value-type="float">
            <text:p>242370.18</text:p>
          </table:table-cell>
          <table:table-cell office:value-type="string" calcext:value-type="string">
            <text:p>84F26A24BB94797D58A189EF624F1AD2</text:p>
          </table:table-cell>
          <table:table-cell table:style-name="ce2" table:number-columns-repeated="16379"/>
        </table:table-row>
        <table:table-row table:style-name="ro1">
          <table:table-cell office:value-type="float" office:value="169083662" calcext:value-type="float">
            <text:p>169083662</text:p>
          </table:table-cell>
          <table:table-cell table:style-name="ce3" office:value-type="date" office:date-value="2023-02-07" calcext:value-type="date">
            <text:p>07/02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E3A899D607D7AF6ED66992CEA201B7</text:p>
          </table:table-cell>
          <table:table-cell table:style-name="ce2" table:number-columns-repeated="16379"/>
        </table:table-row>
        <table:table-row table:style-name="ro1">
          <table:table-cell office:value-type="float" office:value="168953154" calcext:value-type="float">
            <text:p>168953154</text:p>
          </table:table-cell>
          <table:table-cell table:style-name="ce3" office:value-type="date" office:date-value="2023-02-05" calcext:value-type="date">
            <text:p>05/02/2023</text:p>
          </table:table-cell>
          <table:table-cell office:value-type="string" calcext:value-type="string">
            <text:p>D</text:p>
          </table:table-cell>
          <table:table-cell office:value-type="float" office:value="66998" calcext:value-type="float">
            <text:p>66998</text:p>
          </table:table-cell>
          <table:table-cell office:value-type="string" calcext:value-type="string">
            <text:p>5D9D02EE2256311FB4F9ACC978DA7A36</text:p>
          </table:table-cell>
          <table:table-cell table:style-name="ce2" table:number-columns-repeated="16379"/>
        </table:table-row>
        <table:table-row table:style-name="ro1">
          <table:table-cell office:value-type="float" office:value="168843102" calcext:value-type="float">
            <text:p>168843102</text:p>
          </table:table-cell>
          <table:table-cell table:style-name="ce3" office:value-type="date" office:date-value="2023-02-04" calcext:value-type="date">
            <text:p>04/02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472B79945CEA34037A3FDC5C6CD173</text:p>
          </table:table-cell>
          <table:table-cell table:style-name="ce2" table:number-columns-repeated="16379"/>
        </table:table-row>
        <table:table-row table:style-name="ro1">
          <table:table-cell office:value-type="float" office:value="168709186" calcext:value-type="float">
            <text:p>168709186</text:p>
          </table:table-cell>
          <table:table-cell table:style-name="ce3" office:value-type="date" office:date-value="2023-02-03" calcext:value-type="date">
            <text:p>03/02/2023</text:p>
          </table:table-cell>
          <table:table-cell office:value-type="string" calcext:value-type="string">
            <text:p>D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AF78EF9DF80D7B570627AF8022B8A5B7</text:p>
          </table:table-cell>
          <table:table-cell table:style-name="ce2" table:number-columns-repeated="16379"/>
        </table:table-row>
        <table:table-row table:style-name="ro1">
          <table:table-cell office:value-type="float" office:value="168605155" calcext:value-type="float">
            <text:p>168605155</text:p>
          </table:table-cell>
          <table:table-cell table:style-name="ce3" office:value-type="date" office:date-value="2023-02-02" calcext:value-type="date">
            <text:p>02/02/2023</text:p>
          </table:table-cell>
          <table:table-cell office:value-type="string" calcext:value-type="string">
            <text:p>D</text:p>
          </table:table-cell>
          <table:table-cell office:value-type="float" office:value="11979" calcext:value-type="float">
            <text:p>11979</text:p>
          </table:table-cell>
          <table:table-cell office:value-type="string" calcext:value-type="string">
            <text:p>282C1CEAC4A9118879FE3419FA0196D6</text:p>
          </table:table-cell>
          <table:table-cell table:style-name="ce2" table:number-columns-repeated="16379"/>
        </table:table-row>
        <table:table-row table:style-name="ro1">
          <table:table-cell office:value-type="float" office:value="168442650" calcext:value-type="float">
            <text:p>168442650</text:p>
          </table:table-cell>
          <table:table-cell table:style-name="ce3" office:value-type="date" office:date-value="2023-02-01" calcext:value-type="date">
            <text:p>01/02/2023</text:p>
          </table:table-cell>
          <table:table-cell office:value-type="string" calcext:value-type="string">
            <text:p>D</text:p>
          </table:table-cell>
          <table:table-cell office:value-type="float" office:value="15810.18" calcext:value-type="float">
            <text:p>15810.18</text:p>
          </table:table-cell>
          <table:table-cell office:value-type="string" calcext:value-type="string">
            <text:p>3428F418A33A392FCB8B352DE39819B6</text:p>
          </table:table-cell>
          <table:table-cell table:style-name="ce2" table:number-columns-repeated="16379"/>
        </table:table-row>
        <table:table-row table:style-name="ro1">
          <table:table-cell office:value-type="float" office:value="168406081" calcext:value-type="float">
            <text:p>168406081</text:p>
          </table:table-cell>
          <table:table-cell table:style-name="ce3" office:value-type="date" office:date-value="2023-01-31" calcext:value-type="date">
            <text:p>31/0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00B7C244FDD35075744451AF7403EF</text:p>
          </table:table-cell>
          <table:table-cell table:style-name="ce2" table:number-columns-repeated="16379"/>
        </table:table-row>
        <table:table-row table:style-name="ro1">
          <table:table-cell office:value-type="float" office:value="168200868" calcext:value-type="float">
            <text:p>168200868</text:p>
          </table:table-cell>
          <table:table-cell table:style-name="ce3" office:value-type="date" office:date-value="2023-01-29" calcext:value-type="date">
            <text:p>29/01/2023</text:p>
          </table:table-cell>
          <table:table-cell office:value-type="string" calcext:value-type="string">
            <text:p>D</text:p>
          </table:table-cell>
          <table:table-cell office:value-type="float" office:value="59605.14" calcext:value-type="float">
            <text:p>59605.14</text:p>
          </table:table-cell>
          <table:table-cell office:value-type="string" calcext:value-type="string">
            <text:p>6CF90CACA909F757F1E12C3D688A406E</text:p>
          </table:table-cell>
          <table:table-cell table:style-name="ce2" table:number-columns-repeated="16379"/>
        </table:table-row>
        <table:table-row table:style-name="ro1">
          <table:table-cell office:value-type="float" office:value="168131932" calcext:value-type="float">
            <text:p>168131932</text:p>
          </table:table-cell>
          <table:table-cell table:style-name="ce3" office:value-type="date" office:date-value="2023-01-28" calcext:value-type="date">
            <text:p>28/01/2023</text:p>
          </table:table-cell>
          <table:table-cell office:value-type="string" calcext:value-type="string">
            <text:p>D</text:p>
          </table:table-cell>
          <table:table-cell office:value-type="float" office:value="39999.27" calcext:value-type="float">
            <text:p>39999.27</text:p>
          </table:table-cell>
          <table:table-cell office:value-type="string" calcext:value-type="string">
            <text:p>CA998ED38C90EFAA9509B040999F9E71</text:p>
          </table:table-cell>
          <table:table-cell table:style-name="ce2" table:number-columns-repeated="16379"/>
        </table:table-row>
        <table:table-row table:style-name="ro1">
          <table:table-cell office:value-type="float" office:value="167956088" calcext:value-type="float">
            <text:p>167956088</text:p>
          </table:table-cell>
          <table:table-cell table:style-name="ce3" office:value-type="date" office:date-value="2023-01-27" calcext:value-type="date">
            <text:p>27/0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ECF7346C068050009E5CED9A229302</text:p>
          </table:table-cell>
          <table:table-cell table:style-name="ce2" table:number-columns-repeated="16379"/>
        </table:table-row>
        <table:table-row table:style-name="ro1">
          <table:table-cell office:value-type="float" office:value="167887115" calcext:value-type="float">
            <text:p>167887115</text:p>
          </table:table-cell>
          <table:table-cell table:style-name="ce3" office:value-type="date" office:date-value="2023-01-26" calcext:value-type="date">
            <text:p>26/01/2023</text:p>
          </table:table-cell>
          <table:table-cell office:value-type="string" calcext:value-type="string">
            <text:p>D</text:p>
          </table:table-cell>
          <table:table-cell office:value-type="float" office:value="56109.8" calcext:value-type="float">
            <text:p>56109.8</text:p>
          </table:table-cell>
          <table:table-cell office:value-type="string" calcext:value-type="string">
            <text:p>C37E66CD4CEBCFFD397A5A56878772EB</text:p>
          </table:table-cell>
          <table:table-cell table:style-name="ce2" table:number-columns-repeated="16379"/>
        </table:table-row>
        <table:table-row table:style-name="ro1">
          <table:table-cell office:value-type="float" office:value="167771204" calcext:value-type="float">
            <text:p>167771204</text:p>
          </table:table-cell>
          <table:table-cell table:style-name="ce3" office:value-type="date" office:date-value="2023-01-25" calcext:value-type="date">
            <text:p>25/01/2023</text:p>
          </table:table-cell>
          <table:table-cell office:value-type="string" calcext:value-type="string">
            <text:p>D</text:p>
          </table:table-cell>
          <table:table-cell office:value-type="float" office:value="68500" calcext:value-type="float">
            <text:p>68500</text:p>
          </table:table-cell>
          <table:table-cell office:value-type="string" calcext:value-type="string">
            <text:p>240B256AE25165866998727A91A18ED2</text:p>
          </table:table-cell>
          <table:table-cell table:style-name="ce2" table:number-columns-repeated="16379"/>
        </table:table-row>
        <table:table-row table:style-name="ro1">
          <table:table-cell office:value-type="float" office:value="167608819" calcext:value-type="float">
            <text:p>167608819</text:p>
          </table:table-cell>
          <table:table-cell table:style-name="ce3" office:value-type="date" office:date-value="2023-01-24" calcext:value-type="date">
            <text:p>24/0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C030A4A6D815A30874A23098CF1E6AF</text:p>
          </table:table-cell>
          <table:table-cell table:style-name="ce2" table:number-columns-repeated="16379"/>
        </table:table-row>
        <table:table-row table:style-name="ro1">
          <table:table-cell office:value-type="float" office:value="167491086" calcext:value-type="float">
            <text:p>167491086</text:p>
          </table:table-cell>
          <table:table-cell table:style-name="ce3" office:value-type="date" office:date-value="2023-01-22" calcext:value-type="date">
            <text:p>22/01/2023</text:p>
          </table:table-cell>
          <table:table-cell office:value-type="string" calcext:value-type="string">
            <text:p>D</text:p>
          </table:table-cell>
          <table:table-cell office:value-type="float" office:value="71403.39" calcext:value-type="float">
            <text:p>71403.39</text:p>
          </table:table-cell>
          <table:table-cell office:value-type="string" calcext:value-type="string">
            <text:p>DF174AEDAAFEB0D4B1B2582592D6A98D</text:p>
          </table:table-cell>
          <table:table-cell table:style-name="ce2" table:number-columns-repeated="16379"/>
        </table:table-row>
        <table:table-row table:style-name="ro1">
          <table:table-cell office:value-type="float" office:value="167427351" calcext:value-type="float">
            <text:p>167427351</text:p>
          </table:table-cell>
          <table:table-cell table:style-name="ce3" office:value-type="date" office:date-value="2023-01-21" calcext:value-type="date">
            <text:p>21/01/2023</text:p>
          </table:table-cell>
          <table:table-cell office:value-type="string" calcext:value-type="string">
            <text:p>D</text:p>
          </table:table-cell>
          <table:table-cell office:value-type="float" office:value="62543.42" calcext:value-type="float">
            <text:p>62543.42</text:p>
          </table:table-cell>
          <table:table-cell office:value-type="string" calcext:value-type="string">
            <text:p>E530B478DDE7E2965186A16437F905D2</text:p>
          </table:table-cell>
          <table:table-cell table:style-name="ce2" table:number-columns-repeated="16379"/>
        </table:table-row>
        <table:table-row table:style-name="ro1">
          <table:table-cell office:value-type="float" office:value="167304524" calcext:value-type="float">
            <text:p>167304524</text:p>
          </table:table-cell>
          <table:table-cell table:style-name="ce3" office:value-type="date" office:date-value="2023-01-20" calcext:value-type="date">
            <text:p>20/0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0D7BE5A58A353D4053454A989412BF</text:p>
          </table:table-cell>
          <table:table-cell table:style-name="ce2" table:number-columns-repeated="16379"/>
        </table:table-row>
        <table:table-row table:style-name="ro1">
          <table:table-cell office:value-type="float" office:value="167157378" calcext:value-type="float">
            <text:p>167157378</text:p>
          </table:table-cell>
          <table:table-cell table:style-name="ce3" office:value-type="date" office:date-value="2023-01-19" calcext:value-type="date">
            <text:p>19/0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E2E7620805385B233C87D2B2B323EF</text:p>
          </table:table-cell>
          <table:table-cell table:style-name="ce2" table:number-columns-repeated="16379"/>
        </table:table-row>
        <table:table-row table:style-name="ro1">
          <table:table-cell office:value-type="float" office:value="167084586" calcext:value-type="float">
            <text:p>167084586</text:p>
          </table:table-cell>
          <table:table-cell table:style-name="ce3" office:value-type="date" office:date-value="2023-01-18" calcext:value-type="date">
            <text:p>18/01/2023</text:p>
          </table:table-cell>
          <table:table-cell office:value-type="string" calcext:value-type="string">
            <text:p>D</text:p>
          </table:table-cell>
          <table:table-cell office:value-type="float" office:value="109871.42" calcext:value-type="float">
            <text:p>109871.42</text:p>
          </table:table-cell>
          <table:table-cell office:value-type="string" calcext:value-type="string">
            <text:p>2609B51779EF953AADFB9E9A658BFDB4</text:p>
          </table:table-cell>
          <table:table-cell table:style-name="ce2" table:number-columns-repeated="16379"/>
        </table:table-row>
        <table:table-row table:style-name="ro1">
          <table:table-cell office:value-type="float" office:value="166932375" calcext:value-type="float">
            <text:p>166932375</text:p>
          </table:table-cell>
          <table:table-cell table:style-name="ce3" office:value-type="date" office:date-value="2023-01-17" calcext:value-type="date">
            <text:p>17/0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BC2AC0093430FC099C6A2ABC17B486</text:p>
          </table:table-cell>
          <table:table-cell table:style-name="ce2" table:number-columns-repeated="16379"/>
        </table:table-row>
        <table:table-row table:style-name="ro1">
          <table:table-cell office:value-type="float" office:value="166798138" calcext:value-type="float">
            <text:p>166798138</text:p>
          </table:table-cell>
          <table:table-cell table:style-name="ce3" office:value-type="date" office:date-value="2023-01-16" calcext:value-type="date">
            <text:p>16/01/2023</text:p>
          </table:table-cell>
          <table:table-cell office:value-type="string" calcext:value-type="string">
            <text:p>D</text:p>
          </table:table-cell>
          <table:table-cell office:value-type="float" office:value="4602.98" calcext:value-type="float">
            <text:p>4602.98</text:p>
          </table:table-cell>
          <table:table-cell office:value-type="string" calcext:value-type="string">
            <text:p>2D599EB316C6026469ED7D011276E964</text:p>
          </table:table-cell>
          <table:table-cell table:style-name="ce2" table:number-columns-repeated="16379"/>
        </table:table-row>
        <table:table-row table:style-name="ro1">
          <table:table-cell office:value-type="float" office:value="166729114" calcext:value-type="float">
            <text:p>166729114</text:p>
          </table:table-cell>
          <table:table-cell table:style-name="ce3" office:value-type="date" office:date-value="2023-01-14" calcext:value-type="date">
            <text:p>14/01/2023</text:p>
          </table:table-cell>
          <table:table-cell office:value-type="string" calcext:value-type="string">
            <text:p>D</text:p>
          </table:table-cell>
          <table:table-cell office:value-type="float" office:value="9100.66" calcext:value-type="float">
            <text:p>9100.66</text:p>
          </table:table-cell>
          <table:table-cell office:value-type="string" calcext:value-type="string">
            <text:p>4D6555A36BEBECD81129DF1D8EEBB87E</text:p>
          </table:table-cell>
          <table:table-cell table:style-name="ce2" table:number-columns-repeated="16379"/>
        </table:table-row>
        <table:table-row table:style-name="ro1">
          <table:table-cell office:value-type="float" office:value="166600811" calcext:value-type="float">
            <text:p>166600811</text:p>
          </table:table-cell>
          <table:table-cell table:style-name="ce3" office:value-type="date" office:date-value="2023-01-13" calcext:value-type="date">
            <text:p>13/0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43D154CB2E89A687E65DC92592577D</text:p>
          </table:table-cell>
          <table:table-cell table:style-name="ce2" table:number-columns-repeated="16379"/>
        </table:table-row>
        <table:table-row table:style-name="ro1">
          <table:table-cell office:value-type="float" office:value="166477582" calcext:value-type="float">
            <text:p>166477582</text:p>
          </table:table-cell>
          <table:table-cell table:style-name="ce3" office:value-type="date" office:date-value="2023-01-12" calcext:value-type="date">
            <text:p>12/0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516C3E8125C208DC1AF00D6D62BD8D</text:p>
          </table:table-cell>
          <table:table-cell table:style-name="ce2" table:number-columns-repeated="16379"/>
        </table:table-row>
        <table:table-row table:style-name="ro1">
          <table:table-cell office:value-type="float" office:value="166366119" calcext:value-type="float">
            <text:p>166366119</text:p>
          </table:table-cell>
          <table:table-cell table:style-name="ce3" office:value-type="date" office:date-value="2023-01-11" calcext:value-type="date">
            <text:p>11/0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2A441585593C53C2354E393441EB</text:p>
          </table:table-cell>
          <table:table-cell table:style-name="ce2" table:number-columns-repeated="16379"/>
        </table:table-row>
        <table:table-row table:style-name="ro1">
          <table:table-cell office:value-type="float" office:value="166312792" calcext:value-type="float">
            <text:p>166312792</text:p>
          </table:table-cell>
          <table:table-cell table:style-name="ce3" office:value-type="date" office:date-value="2023-01-10" calcext:value-type="date">
            <text:p>10/0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AEBF08EA1EA7FA2F7B4E00ADBD81E2</text:p>
          </table:table-cell>
          <table:table-cell table:style-name="ce2" table:number-columns-repeated="16379"/>
        </table:table-row>
        <table:table-row table:style-name="ro1">
          <table:table-cell office:value-type="float" office:value="166117652" calcext:value-type="float">
            <text:p>166117652</text:p>
          </table:table-cell>
          <table:table-cell table:style-name="ce3" office:value-type="date" office:date-value="2023-01-09" calcext:value-type="date">
            <text:p>09/01/2023</text:p>
          </table:table-cell>
          <table:table-cell office:value-type="string" calcext:value-type="string">
            <text:p>D</text:p>
          </table:table-cell>
          <table:table-cell office:value-type="float" office:value="19350.01" calcext:value-type="float">
            <text:p>19350.01</text:p>
          </table:table-cell>
          <table:table-cell office:value-type="string" calcext:value-type="string">
            <text:p>DAD546C2C5F7B1CD4AF84269BA378403</text:p>
          </table:table-cell>
          <table:table-cell table:style-name="ce2" table:number-columns-repeated="16379"/>
        </table:table-row>
        <table:table-row table:style-name="ro1">
          <table:table-cell office:value-type="float" office:value="166066453" calcext:value-type="float">
            <text:p>166066453</text:p>
          </table:table-cell>
          <table:table-cell table:style-name="ce3" office:value-type="date" office:date-value="2023-01-07" calcext:value-type="date">
            <text:p>07/01/2023</text:p>
          </table:table-cell>
          <table:table-cell office:value-type="string" calcext:value-type="string">
            <text:p>D</text:p>
          </table:table-cell>
          <table:table-cell office:value-type="float" office:value="78948.14" calcext:value-type="float">
            <text:p>78948.14</text:p>
          </table:table-cell>
          <table:table-cell office:value-type="string" calcext:value-type="string">
            <text:p>D95E118BD67C4F2E3D4722C5A306A43E</text:p>
          </table:table-cell>
          <table:table-cell table:style-name="ce2" table:number-columns-repeated="16379"/>
        </table:table-row>
        <table:table-row table:style-name="ro1">
          <table:table-cell office:value-type="float" office:value="165892750" calcext:value-type="float">
            <text:p>165892750</text:p>
          </table:table-cell>
          <table:table-cell table:style-name="ce3" office:value-type="date" office:date-value="2023-01-06" calcext:value-type="date">
            <text:p>06/01/20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D5866BA1BA76E064E4D534F7AB5BFB1</text:p>
          </table:table-cell>
          <table:table-cell table:style-name="ce2" table:number-columns-repeated="16379"/>
        </table:table-row>
        <table:table-row table:style-name="ro1">
          <table:table-cell office:value-type="float" office:value="165777579" calcext:value-type="float">
            <text:p>165777579</text:p>
          </table:table-cell>
          <table:table-cell table:style-name="ce3" office:value-type="date" office:date-value="2023-01-05" calcext:value-type="date">
            <text:p>05/01/202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5CE1E832B6F71FFFF0BE0D4B6175AE</text:p>
          </table:table-cell>
          <table:table-cell table:style-name="ce2" table:number-columns-repeated="16379"/>
        </table:table-row>
        <table:table-row table:style-name="ro1">
          <table:table-cell office:value-type="float" office:value="165662744" calcext:value-type="float">
            <text:p>165662744</text:p>
          </table:table-cell>
          <table:table-cell table:style-name="ce3" office:value-type="date" office:date-value="2023-01-04" calcext:value-type="date">
            <text:p>04/01/2023</text:p>
          </table:table-cell>
          <table:table-cell office:value-type="string" calcext:value-type="string">
            <text:p>D</text:p>
          </table:table-cell>
          <table:table-cell office:value-type="float" office:value="76000" calcext:value-type="float">
            <text:p>76000</text:p>
          </table:table-cell>
          <table:table-cell office:value-type="string" calcext:value-type="string">
            <text:p>870706C48754D19C3823DBD8F3EF64EB</text:p>
          </table:table-cell>
          <table:table-cell table:style-name="ce2" table:number-columns-repeated="16379"/>
        </table:table-row>
        <table:table-row table:style-name="ro1">
          <table:table-cell office:value-type="float" office:value="165537748" calcext:value-type="float">
            <text:p>165537748</text:p>
          </table:table-cell>
          <table:table-cell table:style-name="ce3" office:value-type="date" office:date-value="2023-01-03" calcext:value-type="date">
            <text:p>03/01/2023</text:p>
          </table:table-cell>
          <table:table-cell office:value-type="string" calcext:value-type="string">
            <text:p>D</text:p>
          </table:table-cell>
          <table:table-cell office:value-type="float" office:value="1108.4" calcext:value-type="float">
            <text:p>1108.4</text:p>
          </table:table-cell>
          <table:table-cell office:value-type="string" calcext:value-type="string">
            <text:p>524E5B8C7D3B2E54803B114C8B6E1034</text:p>
          </table:table-cell>
          <table:table-cell table:style-name="ce2" table:number-columns-repeated="16379"/>
        </table:table-row>
        <table:table-row table:style-name="ro1">
          <table:table-cell office:value-type="float" office:value="165442419" calcext:value-type="float">
            <text:p>165442419</text:p>
          </table:table-cell>
          <table:table-cell table:style-name="ce3" office:value-type="date" office:date-value="2023-01-02" calcext:value-type="date">
            <text:p>02/01/2023</text:p>
          </table:table-cell>
          <table:table-cell office:value-type="string" calcext:value-type="string">
            <text:p>D</text:p>
          </table:table-cell>
          <table:table-cell office:value-type="float" office:value="13587.45" calcext:value-type="float">
            <text:p>13587.45</text:p>
          </table:table-cell>
          <table:table-cell office:value-type="string" calcext:value-type="string">
            <text:p>C2A2FF6BEAD5C50066FAA2D3B2B333D4</text:p>
          </table:table-cell>
          <table:table-cell table:style-name="ce2" table:number-columns-repeated="16379"/>
        </table:table-row>
        <table:table-row table:style-name="ro1" table:number-rows-repeated="1048272">
          <table:table-cell table:number-columns-repeated="5"/>
          <table:table-cell table:style-name="ce2" table:number-columns-repeated="16379"/>
        </table:table-row>
        <table:table-row table:style-name="ro1">
          <table:table-cell table:number-columns-repeated="5"/>
          <table:table-cell table:style-name="ce2" table:number-columns-repeated="16379"/>
        </table:table-row>
      </table:table>
      <table:table table:name="ACCOUNTS" table:style-name="ta2">
        <office:forms form:automatic-focus="false" form:apply-design-mode="false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number-columns-repeated="16380"/>
        <table:table-row table:style-name="ro1">
          <table:table-cell table:style-name="ce1" office:value-type="string" calcext:value-type="string">
            <text:p>ACCOUNT_NUMBER</text:p>
          </table:table-cell>
          <table:table-cell table:style-name="ce1" office:value-type="string" calcext:value-type="string">
            <text:p>CUSTOMER_GROUP_ID</text:p>
          </table:table-cell>
          <table:table-cell table:style-name="ce1" office:value-type="string" calcext:value-type="string">
            <text:p>PRODUCT_CODE</text:p>
          </table:table-cell>
          <table:table-cell table:style-name="ce1" office:value-type="string" calcext:value-type="string">
            <text:p>ACCOUNT_DESIGNATION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9F5994A296CFD34269F518888751FEB6</text:p>
          </table:table-cell>
          <table:table-cell office:value-type="float" office:value="356277" calcext:value-type="float">
            <text:p>3562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537B09219ADA2ADF540A4CA79A4F09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80EAD4116B3F9CB3DBC26B0EA4D1372C</text:p>
          </table:table-cell>
          <table:table-cell office:value-type="float" office:value="364256" calcext:value-type="float">
            <text:p>36425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556BF2EBC6CC3C35185FAFE8D94989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40EBEC0DA0995D7E6122E222B04EE03</text:p>
          </table:table-cell>
          <table:table-cell office:value-type="float" office:value="367901" calcext:value-type="float">
            <text:p>367901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711372E67284780E0C0F95467D14D67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0558C379C5965BE44C403A3136A1AF35</text:p>
          </table:table-cell>
          <table:table-cell office:value-type="float" office:value="371940" calcext:value-type="float">
            <text:p>37194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7167C6DD4CE7172E9DDF758E5709908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5D9D02EE2256311FB4F9ACC978DA7A36</text:p>
          </table:table-cell>
          <table:table-cell office:value-type="float" office:value="370483" calcext:value-type="float">
            <text:p>37048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3A4DC9F9AF8B523CA57A305B452C4D0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545A92BB68DD4E734C74BEC297C5421B</text:p>
          </table:table-cell>
          <table:table-cell office:value-type="float" office:value="375742" calcext:value-type="float">
            <text:p>37574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48584012F48A43815F78B8FBB4147F5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51C438D1D40FEBEF9771AD4F5479AB7</text:p>
          </table:table-cell>
          <table:table-cell office:value-type="float" office:value="376128" calcext:value-type="float">
            <text:p>37612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1EF91F61177C52148F95E381773E01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0232DC75F95C04A3FBD5F34B1858DEB3</text:p>
          </table:table-cell>
          <table:table-cell office:value-type="float" office:value="376637" calcext:value-type="float">
            <text:p>37663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71809B05AC35F0887BDF0B8F1A8940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5BFAA6D1D6C4E588260C65ACB9DBA2C</text:p>
          </table:table-cell>
          <table:table-cell office:value-type="float" office:value="371273" calcext:value-type="float">
            <text:p>37127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FEC4B97FA23B5E54E7A7D160AD6B808F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CF90CACA909F757F1E12C3D688A406E</text:p>
          </table:table-cell>
          <table:table-cell office:value-type="float" office:value="379760" calcext:value-type="float">
            <text:p>37976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9BD9FA83606231487F23F9B7ACE302C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2D599EB316C6026469ED7D011276E964</text:p>
          </table:table-cell>
          <table:table-cell office:value-type="float" office:value="366057" calcext:value-type="float">
            <text:p>36605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29B70C0B3A7B820690E34C4DCC617AC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C9FF8FD6B4E2F02D1E369E568BE22A7</text:p>
          </table:table-cell>
          <table:table-cell office:value-type="float" office:value="378665" calcext:value-type="float">
            <text:p>37866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67CEAF0C9FA58F47CEE835D8A025ED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DF2D375FB009AE73A3FD509F541BDC45</text:p>
          </table:table-cell>
          <table:table-cell office:value-type="float" office:value="380372" calcext:value-type="float">
            <text:p>38037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71171888C98F48FDCCD4B5C82845D2F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2A2FF6BEAD5C50066FAA2D3B2B333D4</text:p>
          </table:table-cell>
          <table:table-cell office:value-type="float" office:value="367627" calcext:value-type="float">
            <text:p>36762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6BB451D12E73393443FFE3559CB7DA5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1BFBAC6A5653A2BFF7A0686B0294E41</text:p>
          </table:table-cell>
          <table:table-cell office:value-type="float" office:value="362558" calcext:value-type="float">
            <text:p>36255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8AB857249FEDBE4675500156C8F22BF5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5C53FB8042CC15D1F6F25323EA32E323</text:p>
          </table:table-cell>
          <table:table-cell office:value-type="float" office:value="383779" calcext:value-type="float">
            <text:p>38377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B3BF81CE09152AE6D1E400DFB0C22E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C565124C590A114AB29E7F98C2DAE89</text:p>
          </table:table-cell>
          <table:table-cell office:value-type="float" office:value="366008" calcext:value-type="float">
            <text:p>36600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49E48FB0CC5E12B80F172BDEDBED579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90F4E8FE99D709FA0019CC1B14FFD38</text:p>
          </table:table-cell>
          <table:table-cell office:value-type="float" office:value="384335" calcext:value-type="float">
            <text:p>38433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675D93184AFE26DC5B92283974C86F78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8C4BF851DF4B69D2E2FC9BACFE36AE5</text:p>
          </table:table-cell>
          <table:table-cell office:value-type="float" office:value="378949" calcext:value-type="float">
            <text:p>37894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F70ED41524A34A69719E1D402002527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560C1BEE2D636DF210E8E7F4F246578C</text:p>
          </table:table-cell>
          <table:table-cell office:value-type="float" office:value="385485" calcext:value-type="float">
            <text:p>38548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640C70D32261AFBBD13031512BDA674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4DE9FA20A37F1D0AD76DA441DBFAB0E</text:p>
          </table:table-cell>
          <table:table-cell office:value-type="float" office:value="386749" calcext:value-type="float">
            <text:p>386749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7AA0E0EC372FD4315BEE880708F33DE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428F418A33A392FCB8B352DE39819B6</text:p>
          </table:table-cell>
          <table:table-cell office:value-type="float" office:value="382009" calcext:value-type="float">
            <text:p>38200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8085FEEAF55A8540863644F24792DBBB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EB2ECFCD92B837467138E58CB55CC426</text:p>
          </table:table-cell>
          <table:table-cell office:value-type="float" office:value="379659" calcext:value-type="float">
            <text:p>37965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4FF5118AEF80027D67E5395BBAEBF05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AC238DD1CCA81B0EC136BA2949600064</text:p>
          </table:table-cell>
          <table:table-cell office:value-type="float" office:value="383074" calcext:value-type="float">
            <text:p>38307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76B1DFB8AB13B34617F0B5EFFD890C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D97009A3EABF324DB80B9F8E1D09EC9F</text:p>
          </table:table-cell>
          <table:table-cell office:value-type="float" office:value="365433" calcext:value-type="float">
            <text:p>36543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20EDCC5E475DAEE0409212C084FFA0E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DF174AEDAAFEB0D4B1B2582592D6A98D</text:p>
          </table:table-cell>
          <table:table-cell office:value-type="float" office:value="370685" calcext:value-type="float">
            <text:p>37068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9ED2D733397CA2CFDADAC01E69A8663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EE613B51CF6799D53FF7A39947A895F</text:p>
          </table:table-cell>
          <table:table-cell office:value-type="float" office:value="384367" calcext:value-type="float">
            <text:p>38436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598CC11587D4A5BADAFBE23AE30472EF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B14E447FAE3195A7E7627DC2E052B148</text:p>
          </table:table-cell>
          <table:table-cell office:value-type="float" office:value="391333" calcext:value-type="float">
            <text:p>39133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E29A1A2151E990CEA860FE248952492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89DC4F7EEDD0D640B928999C16653391</text:p>
          </table:table-cell>
          <table:table-cell office:value-type="float" office:value="393069" calcext:value-type="float">
            <text:p>39306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76D1EA9A7912DAE3FB4EC2C15FEB85E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228A0777B23EC5D8D2C0312F41A9509</text:p>
          </table:table-cell>
          <table:table-cell office:value-type="float" office:value="383671" calcext:value-type="float">
            <text:p>38367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79C877751FEC636D5FA44638D828EE5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BC247C81C39063E3E1F6AB459F6893E3</text:p>
          </table:table-cell>
          <table:table-cell office:value-type="float" office:value="394857" calcext:value-type="float">
            <text:p>394857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965E698A987C70FC22499A162F37B32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AECB91534C6C7B14DEE1CDB6E5C0AAC</text:p>
          </table:table-cell>
          <table:table-cell office:value-type="float" office:value="373569" calcext:value-type="float">
            <text:p>37356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7AD0878FAD774B1EFCADAE6C82F3A80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5AABF3305977BCA6774DC7BFB26A8E5</text:p>
          </table:table-cell>
          <table:table-cell office:value-type="float" office:value="395458" calcext:value-type="float">
            <text:p>39545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7038F7E7098EB6F148C694430077CB0C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05211F45E6ABA87D8A96BAB9836A76C8</text:p>
          </table:table-cell>
          <table:table-cell office:value-type="float" office:value="392641" calcext:value-type="float">
            <text:p>39264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172150DDB3D315EF5B3979DD515EF1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FB7FE110C06F2C119399DDC2C69C840E</text:p>
          </table:table-cell>
          <table:table-cell office:value-type="float" office:value="396221" calcext:value-type="float">
            <text:p>39622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9217AFC4027F0D3FE5E1DC1970A5724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40EC4E628648A5508B83B34CC9A2D7D5</text:p>
          </table:table-cell>
          <table:table-cell office:value-type="float" office:value="395792" calcext:value-type="float">
            <text:p>39579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5293A9BC22A1A9F83290B1F737C6EF0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B16B65611C3ED7AEB115A499B82FCBE0</text:p>
          </table:table-cell>
          <table:table-cell office:value-type="float" office:value="396840" calcext:value-type="float">
            <text:p>39684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72532F081D7C02A93A615B4176FC24B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2D4EAB3CEF868DDBE5C34FC3C7D12286</text:p>
          </table:table-cell>
          <table:table-cell office:value-type="float" office:value="395786" calcext:value-type="float">
            <text:p>39578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752C39713E2847B29FCA1B335EA3148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E79A9D71F0406F1E707528100748EF5B</text:p>
          </table:table-cell>
          <table:table-cell office:value-type="float" office:value="365451" calcext:value-type="float">
            <text:p>36545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E53795A6C833627FE391E9D7F306AE9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AF78EF9DF80D7B570627AF8022B8A5B7</text:p>
          </table:table-cell>
          <table:table-cell office:value-type="float" office:value="397786" calcext:value-type="float">
            <text:p>39778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FD2DFEF2E58DBC89A29A503F5081CC7F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43713542F7765F26A35DDBBCED8751CC</text:p>
          </table:table-cell>
          <table:table-cell office:value-type="float" office:value="396641" calcext:value-type="float">
            <text:p>39664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98FBF7385B4FAB7F6DBF011BBAAA321F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447383EBEA7781CF8E1CA33378A1AF2A</text:p>
          </table:table-cell>
          <table:table-cell office:value-type="float" office:value="398072" calcext:value-type="float">
            <text:p>39807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EF28638205C3BB6CBB90C919CF5172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C92F96BA782E2F03720D867A3C3DF8F</text:p>
          </table:table-cell>
          <table:table-cell office:value-type="float" office:value="398002" calcext:value-type="float">
            <text:p>39800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8B1656F9889DA647190375324787356C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DD315219E7A6A3D7AF618C5AF9C9850</text:p>
          </table:table-cell>
          <table:table-cell office:value-type="float" office:value="377533" calcext:value-type="float">
            <text:p>37753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65A880ABE4E4CD5A7B90B1E2C670EF25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6B04375F2BDCF6C722C3FD172C6DBB3</text:p>
          </table:table-cell>
          <table:table-cell office:value-type="float" office:value="371505" calcext:value-type="float">
            <text:p>37150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225E1BEFADD724BEDE153974AA28E13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D776D2EBCC2BB9BDDA828601810AF64</text:p>
          </table:table-cell>
          <table:table-cell office:value-type="float" office:value="399632" calcext:value-type="float">
            <text:p>39963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B26D045A348ED0A0A10F3D429DEB9BF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0FF8A53AF6FF39F416819A5616562EF</text:p>
          </table:table-cell>
          <table:table-cell office:value-type="float" office:value="401040" calcext:value-type="float">
            <text:p>40104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49F8FF2D38A0F02B8D714DFFA6DC941C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B85B531C4A040ED20BC89126BDC0ACB</text:p>
          </table:table-cell>
          <table:table-cell office:value-type="float" office:value="364974" calcext:value-type="float">
            <text:p>36497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96BECAB49D329AFF9FE247B19FF1772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F8F8E4D4D10DBAB1EDD6FE65FB79A31</text:p>
          </table:table-cell>
          <table:table-cell office:value-type="float" office:value="367393" calcext:value-type="float">
            <text:p>36739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85DEECB64790E8F6FFB1278577BDCCFF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EA30FB42C85F7BC5804DA0998212463</text:p>
          </table:table-cell>
          <table:table-cell office:value-type="float" office:value="387235" calcext:value-type="float">
            <text:p>38723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35036D29DF9820213A5DB75B4BA5630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8487A83BFF8A19099323EE7FBEBA43C</text:p>
          </table:table-cell>
          <table:table-cell office:value-type="float" office:value="398411" calcext:value-type="float">
            <text:p>39841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63C7509F9147E858E01BEB2B37A871B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D738B1177870429BCEC3494D91E051E</text:p>
          </table:table-cell>
          <table:table-cell office:value-type="float" office:value="365116" calcext:value-type="float">
            <text:p>36511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CF21CA7E1A4F62F651F1C28691A73AF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179433F26E824667EAA9E60E710D5CB</text:p>
          </table:table-cell>
          <table:table-cell office:value-type="float" office:value="401217" calcext:value-type="float">
            <text:p>40121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487C66116985A0057FDE2BF6223B2B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77967EB434F66CD4AFA31C23311DD56</text:p>
          </table:table-cell>
          <table:table-cell office:value-type="float" office:value="365977" calcext:value-type="float">
            <text:p>36597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782BDE57B8C936AFCAEAEF84F8704B9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A998ED38C90EFAA9509B040999F9E71</text:p>
          </table:table-cell>
          <table:table-cell office:value-type="float" office:value="379814" calcext:value-type="float">
            <text:p>37981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63297F804CA278E4C909ACF42550C30C</text:p>
          </table:table-cell>
          <table:table-cell table:style-name="ce2" table:number-columns-repeated="16380"/>
        </table:table-row>
        <table:table-row table:style-name="ro1">
          <table:table-cell table:style-name="ce4" office:value-type="string" calcext:value-type="string">
            <text:p>193E715CA5D705E89DD29CB78FF9C796</text:p>
          </table:table-cell>
          <table:table-cell office:value-type="float" office:value="401628" calcext:value-type="float">
            <text:p>40162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9DAAE78A2F394E784E8DC8F10383E2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0544709589632E65A84830FCA1E6EB78</text:p>
          </table:table-cell>
          <table:table-cell office:value-type="float" office:value="402430" calcext:value-type="float">
            <text:p>40243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DB90167CA821FC29736127888289D9B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F753CC89029DA2F55DA3709050421D7</text:p>
          </table:table-cell>
          <table:table-cell office:value-type="float" office:value="380437" calcext:value-type="float">
            <text:p>38043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2D8B0D55FFF40FD4E3A7D5254899EB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E21A450A7D0B419C0586772129F8E81</text:p>
          </table:table-cell>
          <table:table-cell office:value-type="float" office:value="300450" calcext:value-type="float">
            <text:p>30045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5C5589A22B2AEE63E928316C65751C08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590D7BE5A58A353D4053454A989412BF</text:p>
          </table:table-cell>
          <table:table-cell office:value-type="float" office:value="354355" calcext:value-type="float">
            <text:p>35435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831BCF0C095ADEC25639A669E2B8A28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5E8AFC97A1215731741512BE23177C27</text:p>
          </table:table-cell>
          <table:table-cell office:value-type="float" office:value="354691" calcext:value-type="float">
            <text:p>35469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67681496F236AE8F0C97210F4C31F97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86C27EE67C5EC4AD94E423F601D27830</text:p>
          </table:table-cell>
          <table:table-cell office:value-type="float" office:value="355811" calcext:value-type="float">
            <text:p>35581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4291A2C4C656465C9AD1C869F2A32D1C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342531C32C73E7CA3ADEFBBB9986E3B</text:p>
          </table:table-cell>
          <table:table-cell office:value-type="float" office:value="356197" calcext:value-type="float">
            <text:p>356197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64BE4E10485A316905E9450D56F03635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A282F78F3A2479DADC2B241DD475EF1A</text:p>
          </table:table-cell>
          <table:table-cell office:value-type="float" office:value="359330" calcext:value-type="float">
            <text:p>35933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3552964ACB7F314C63B9887017729DF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FBB67E7F998C0D6B467401DF54562E4D</text:p>
          </table:table-cell>
          <table:table-cell office:value-type="float" office:value="360979" calcext:value-type="float">
            <text:p>36097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DC92237F222A4F78004ED7A32427D3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89AEBF08EA1EA7FA2F7B4E00ADBD81E2</text:p>
          </table:table-cell>
          <table:table-cell office:value-type="float" office:value="360979" calcext:value-type="float">
            <text:p>3609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DC92237F222A4F78004ED7A32427D3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E74035A423DB656E5897C7E6DA811356</text:p>
          </table:table-cell>
          <table:table-cell office:value-type="float" office:value="363580" calcext:value-type="float">
            <text:p>3635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BDA97BD2D9086BA24315AEB56ABE44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484890EBDB08A4E03BCE995F0FB3E9C1</text:p>
          </table:table-cell>
          <table:table-cell office:value-type="float" office:value="363829" calcext:value-type="float">
            <text:p>363829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C01D250B2A7799DD5F2E66B3309C56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8486C39420C71C51A4CCEB9AFDB2DAB</text:p>
          </table:table-cell>
          <table:table-cell office:value-type="float" office:value="364367" calcext:value-type="float">
            <text:p>36436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F0708CAA5E9A19BB48489D163333BB8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D00B7C244FDD35075744451AF7403EF</text:p>
          </table:table-cell>
          <table:table-cell office:value-type="float" office:value="364959" calcext:value-type="float">
            <text:p>36495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DC61774AB51A23680A64015B6BD9BC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F9EA880CA8A6BBA710F96BC9C95F091C</text:p>
          </table:table-cell>
          <table:table-cell office:value-type="float" office:value="366343" calcext:value-type="float">
            <text:p>36634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EFA060D7C6AC608166F6D3A58D4B128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D0084831E89C2F9858CCAA6B8FBD4064</text:p>
          </table:table-cell>
          <table:table-cell office:value-type="float" office:value="366437" calcext:value-type="float">
            <text:p>36643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B73A175C7D455D5D4E866CBED8ABD3C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4B7983083DADE7343470D610BBCA4E6F</text:p>
          </table:table-cell>
          <table:table-cell office:value-type="float" office:value="366975" calcext:value-type="float">
            <text:p>36697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445A859F637ECADA0D39D3670A88429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9BC9BEA3602AA26512757823C7D1E0F</text:p>
          </table:table-cell>
          <table:table-cell office:value-type="float" office:value="367619" calcext:value-type="float">
            <text:p>36761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D5A60265D51D6C4752DE9B38B0452A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8FB2A14FA09BE7FC141FBA8E2FAAB29E</text:p>
          </table:table-cell>
          <table:table-cell office:value-type="float" office:value="367970" calcext:value-type="float">
            <text:p>36797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25B4C0EAC12BCE48AC7F662FBD0D86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835E3D8D81768027CC3339A6AA6FF04B</text:p>
          </table:table-cell>
          <table:table-cell office:value-type="float" office:value="368453" calcext:value-type="float">
            <text:p>36845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654417FA24BFBB2F857D04D135531190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796B58C9EB8A54F2169B01FA21F11DB</text:p>
          </table:table-cell>
          <table:table-cell office:value-type="float" office:value="368585" calcext:value-type="float">
            <text:p>36858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A4C1C4B050562C4C77937D6454BF865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9681C1DBB53A587EC977B4EC1570F18</text:p>
          </table:table-cell>
          <table:table-cell office:value-type="float" office:value="369639" calcext:value-type="float">
            <text:p>36963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52F7007CC124EF62F4A1F47705C13B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F9207A03CE14F5BCB78B1FA0EC89066F</text:p>
          </table:table-cell>
          <table:table-cell office:value-type="float" office:value="369664" calcext:value-type="float">
            <text:p>36966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7C0BB0A800683F750294EE8583815410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DA9F276CC059E9BBD86753CD02DB41A7</text:p>
          </table:table-cell>
          <table:table-cell office:value-type="float" office:value="369841" calcext:value-type="float">
            <text:p>36984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82DA0B005D3B2951422F50C18051E3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79B1BA6FD069ABF81ED45210C1AFAC2</text:p>
          </table:table-cell>
          <table:table-cell office:value-type="float" office:value="369868" calcext:value-type="float">
            <text:p>369868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E4EE8948E933BCABD51651B40267453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7A735C856EF9A08D5165F214022C306</text:p>
          </table:table-cell>
          <table:table-cell office:value-type="float" office:value="372807" calcext:value-type="float">
            <text:p>37280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8FB4564542016C2CDE0A6C7CDDD3BB7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D95E118BD67C4F2E3D4722C5A306A43E</text:p>
          </table:table-cell>
          <table:table-cell office:value-type="float" office:value="376075" calcext:value-type="float">
            <text:p>37607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3B65400A6CD73FA8EF4B59FD55CE751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A95CBA53D16DD84780A1B701D3C278B</text:p>
          </table:table-cell>
          <table:table-cell office:value-type="float" office:value="376459" calcext:value-type="float">
            <text:p>376459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3FA0E13FC16958EA87912A7836D70CF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E4DA95F3C0D559617D46514C15A3662</text:p>
          </table:table-cell>
          <table:table-cell office:value-type="float" office:value="376843" calcext:value-type="float">
            <text:p>37684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7F275C79DF399CC9B5F976AB348652EC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240B256AE25165866998727A91A18ED2</text:p>
          </table:table-cell>
          <table:table-cell office:value-type="float" office:value="378924" calcext:value-type="float">
            <text:p>37892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696125B14000640F3A4966819D35B38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A9525C578B7A011AC2C1A33AD5744DAF</text:p>
          </table:table-cell>
          <table:table-cell office:value-type="float" office:value="379606" calcext:value-type="float">
            <text:p>379606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E21764034B1B5BFD35027E09A36C94C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B1E9AE881DFC960D695C57D1EA8C5316</text:p>
          </table:table-cell>
          <table:table-cell office:value-type="float" office:value="379676" calcext:value-type="float">
            <text:p>37967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ECE9A4A76972934AE7603F4E9B789B9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282C1CEAC4A9118879FE3419FA0196D6</text:p>
          </table:table-cell>
          <table:table-cell office:value-type="float" office:value="380085" calcext:value-type="float">
            <text:p>38008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143DB844FB845DA289A316485F2F25C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547AE03428F68B946EEB8DB00C8C5B21</text:p>
          </table:table-cell>
          <table:table-cell office:value-type="float" office:value="380839" calcext:value-type="float">
            <text:p>38083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FA6335375EB0F0EE008479B491F0EE79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BE36867B1DC4F68B5D5F91B3FAB34A6C</text:p>
          </table:table-cell>
          <table:table-cell office:value-type="float" office:value="381047" calcext:value-type="float">
            <text:p>38104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276A3B9FC9012E05D874B722B6D864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635DBF2B4CBD275A7D74E3864661054</text:p>
          </table:table-cell>
          <table:table-cell office:value-type="float" office:value="381663" calcext:value-type="float">
            <text:p>38166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6F54CFD439769BF283186EB7B817757F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DE40BAA1931A1A90056A0DBC065B5836</text:p>
          </table:table-cell>
          <table:table-cell office:value-type="float" office:value="381751" calcext:value-type="float">
            <text:p>38175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C62BD159C8769C9FC4CA25A0306CF32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33C42860AB2E1CAFB7A8AC8AE30D97D</text:p>
          </table:table-cell>
          <table:table-cell office:value-type="float" office:value="382357" calcext:value-type="float">
            <text:p>38235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0B484D3BB0521C89038C34CE19A277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B1A4B6AB96515EB520883A5AF5AED38E</text:p>
          </table:table-cell>
          <table:table-cell office:value-type="float" office:value="383179" calcext:value-type="float">
            <text:p>383179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3801E2752C5768551C3435DEDB07F4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BF0B43CE065476AAF6BA7C2583034AF</text:p>
          </table:table-cell>
          <table:table-cell office:value-type="float" office:value="383623" calcext:value-type="float">
            <text:p>38362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5BE2E44028C7B7F977F41CBB12953D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420190EC8489EDB3D6EED45DA832260</text:p>
          </table:table-cell>
          <table:table-cell office:value-type="float" office:value="383669" calcext:value-type="float">
            <text:p>38366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C488A19BF3FA7919C46953AC1A03993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F8FD685EC53C66E69AFE3968BC2A77B</text:p>
          </table:table-cell>
          <table:table-cell office:value-type="float" office:value="383681" calcext:value-type="float">
            <text:p>38368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A27CE2FBED9F8B22F06E19CEDE5F6AB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DE70EEAB69F70E77247685E804931C2A</text:p>
          </table:table-cell>
          <table:table-cell office:value-type="float" office:value="384329" calcext:value-type="float">
            <text:p>38432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8BB0A953D38BFB7D3CEE0FFB7A8240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D599575385CDE2011575827BA3ADDB3</text:p>
          </table:table-cell>
          <table:table-cell office:value-type="float" office:value="384801" calcext:value-type="float">
            <text:p>38480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5AA76524925B1EE10D56D86C4D0E377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DE3A899D607D7AF6ED66992CEA201B7</text:p>
          </table:table-cell>
          <table:table-cell office:value-type="float" office:value="386903" calcext:value-type="float">
            <text:p>38690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3F306F4F0F6302693986EC067B5CA2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8436569AF5C63566D11314A3C945832</text:p>
          </table:table-cell>
          <table:table-cell office:value-type="float" office:value="388267" calcext:value-type="float">
            <text:p>388267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C28C75114B8C41B010B65E416C583A39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7A9CC3350FBD588765E618E7C446D21</text:p>
          </table:table-cell>
          <table:table-cell office:value-type="float" office:value="388579" calcext:value-type="float">
            <text:p>38857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940ECC07533AA578BB2820E5A2D15C9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0866AF33F429CF34F2ABDCA545A0E1AA</text:p>
          </table:table-cell>
          <table:table-cell office:value-type="float" office:value="388605" calcext:value-type="float">
            <text:p>38860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D1C71697CAA4388C7FC4E8AC03DDBF0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468251373AA74D4553A67775B8381F6C</text:p>
          </table:table-cell>
          <table:table-cell office:value-type="float" office:value="388724" calcext:value-type="float">
            <text:p>38872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90EAF3AB1C94A6E2EEF5ED8636A3D268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D0656001C7A608CEEB57FE62D18710BF</text:p>
          </table:table-cell>
          <table:table-cell office:value-type="float" office:value="389049" calcext:value-type="float">
            <text:p>38904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C3037CF3B2FD1CADE93DFE2ECD2794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A1F9C629B86AC650C9F33733D0337FD4</text:p>
          </table:table-cell>
          <table:table-cell office:value-type="float" office:value="389461" calcext:value-type="float">
            <text:p>38946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8F4741B1180774DCA886EDA5030888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287E6F4ACADCE59FA476B3F8E2BA9006</text:p>
          </table:table-cell>
          <table:table-cell office:value-type="float" office:value="390445" calcext:value-type="float">
            <text:p>39044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0B3D21A3A2539FC2318447190823493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4D6555A36BEBECD81129DF1D8EEBB87E</text:p>
          </table:table-cell>
          <table:table-cell office:value-type="float" office:value="391193" calcext:value-type="float">
            <text:p>39119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001BB67DF1EF9C491976F51155D849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5474ECAE94A2C52F8FF6C36E6FC0EEEF</text:p>
          </table:table-cell>
          <table:table-cell office:value-type="float" office:value="391656" calcext:value-type="float">
            <text:p>391656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E3BD06B8C1370A901819F2A78C736E6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94D242F1CBDE490E88FBBD9DD3274BD</text:p>
          </table:table-cell>
          <table:table-cell office:value-type="float" office:value="391934" calcext:value-type="float">
            <text:p>39193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52C2D529D8E55E23287ADCD3F2EDF09F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0D67826EE1AF2F906FC1F9683F1C63A</text:p>
          </table:table-cell>
          <table:table-cell office:value-type="float" office:value="392669" calcext:value-type="float">
            <text:p>39266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6EEC04F650B8DB817F8C1DB386EC01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8655C9314F39211B16DDEF5FF683E118</text:p>
          </table:table-cell>
          <table:table-cell office:value-type="float" office:value="392916" calcext:value-type="float">
            <text:p>39291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93974BFA61F14F22D1DA0789B2ECD8C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A13BBE9E5BFDE9A87B25F0124AED7466</text:p>
          </table:table-cell>
          <table:table-cell office:value-type="float" office:value="393019" calcext:value-type="float">
            <text:p>393019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93C7B395F4C8BA597BCC73D202CD4D1B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4153343AA3CB4935930DCDD619EA93E</text:p>
          </table:table-cell>
          <table:table-cell office:value-type="float" office:value="394584" calcext:value-type="float">
            <text:p>39458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6AA35D617BBEE25369B1E4D78605B308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DC70DE1057533A0B35C97533206EEA60</text:p>
          </table:table-cell>
          <table:table-cell office:value-type="float" office:value="396949" calcext:value-type="float">
            <text:p>39694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19B342E287DC1AA8C47BF5310C28E3F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BFB420B5FB152EDB37351F40FF33440</text:p>
          </table:table-cell>
          <table:table-cell office:value-type="float" office:value="397121" calcext:value-type="float">
            <text:p>39712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EF091506530686CE5C2E791F781D511F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881B7597A75DCF572F5456CFA1F0299</text:p>
          </table:table-cell>
          <table:table-cell office:value-type="float" office:value="397237" calcext:value-type="float">
            <text:p>39723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973C53363B1FEC3836B2427DA2DE37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21FF474B37BCD66F796827E07C56B349</text:p>
          </table:table-cell>
          <table:table-cell office:value-type="float" office:value="397524" calcext:value-type="float">
            <text:p>39752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7A99E1313D5A2DB1D5B4B347811C5AB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1516C3E8125C208DC1AF00D6D62BD8D</text:p>
          </table:table-cell>
          <table:table-cell office:value-type="float" office:value="397898" calcext:value-type="float">
            <text:p>39789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8527E7FE199A197E401FB98163FCCB20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8D9AF5AA2F3A16943601EF389872534</text:p>
          </table:table-cell>
          <table:table-cell office:value-type="float" office:value="398567" calcext:value-type="float">
            <text:p>3985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7917AF469786A50B3297FFE7ED0913B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8E8EB190FEB1FF5941141D2EF24AEC61</text:p>
          </table:table-cell>
          <table:table-cell office:value-type="float" office:value="399066" calcext:value-type="float">
            <text:p>399066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DE43BC814BCF85DB0B12B8AA327FE715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2B8B98B4C5062394FF2F702282BD558C</text:p>
          </table:table-cell>
          <table:table-cell office:value-type="float" office:value="400622" calcext:value-type="float">
            <text:p>4006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353230271AA21358274161F28A7A0B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2A005C7582108E674921FB71C8C2E841</text:p>
          </table:table-cell>
          <table:table-cell office:value-type="float" office:value="400628" calcext:value-type="float">
            <text:p>40062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182C50F2C2E5275177F757B36B3FC5E3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8FBBE99E4CB00373611DCB14B04C8EE</text:p>
          </table:table-cell>
          <table:table-cell office:value-type="float" office:value="401586" calcext:value-type="float">
            <text:p>40158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93438F61B27F31A98123903D812D6B2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4D5866BA1BA76E064E4D534F7AB5BFB1</text:p>
          </table:table-cell>
          <table:table-cell office:value-type="float" office:value="401981" calcext:value-type="float">
            <text:p>40198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190D5856BE4912DD1DAAEB5CC4439D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AB0A57FF79A3D6FBCF216ACB3ADD01ED</text:p>
          </table:table-cell>
          <table:table-cell office:value-type="float" office:value="402233" calcext:value-type="float">
            <text:p>40223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723832AB9CCEBA05A6D5B42F78D97DE5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E7BF71DED9F59E55628202867442736</text:p>
          </table:table-cell>
          <table:table-cell office:value-type="float" office:value="402903" calcext:value-type="float">
            <text:p>40290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DFB5F5867EDB28B3E23619C31D9063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870706C48754D19C3823DBD8F3EF64EB</text:p>
          </table:table-cell>
          <table:table-cell office:value-type="float" office:value="402958" calcext:value-type="float">
            <text:p>40295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B714662D65511969A5DE8A755DDE183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7F728D46FE292C58062C3F62DB451BE</text:p>
          </table:table-cell>
          <table:table-cell office:value-type="float" office:value="403205" calcext:value-type="float">
            <text:p>40320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940DDBCC0C8FEE2C25AEA4CD8806B8A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BAAD3983BBDC40D33C6EA29F7B3C5028</text:p>
          </table:table-cell>
          <table:table-cell office:value-type="float" office:value="403218" calcext:value-type="float">
            <text:p>40321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B08522D849A4351816E468F994C740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0AB9EDF709177A80AE134143B9E9793A</text:p>
          </table:table-cell>
          <table:table-cell office:value-type="float" office:value="403356" calcext:value-type="float">
            <text:p>403356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32942C58D244535C032B3E9F37A01D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7C67C921B1F6DFE9DAB9FE46A27C0B1</text:p>
          </table:table-cell>
          <table:table-cell office:value-type="float" office:value="403562" calcext:value-type="float">
            <text:p>40356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6D7F53C6D4C556E3EDBDB76281C389C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DDA3592B21577BD95288D124AEAA1CD</text:p>
          </table:table-cell>
          <table:table-cell office:value-type="float" office:value="403604" calcext:value-type="float">
            <text:p>40360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B514BEACAE25F22A597D75A79977EF8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F2F18207BE0B4616E6E42D946F6A683</text:p>
          </table:table-cell>
          <table:table-cell office:value-type="float" office:value="403837" calcext:value-type="float">
            <text:p>40383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CC18B5608E237D9760F00A1DE6AD7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FD270636F9B4E795A41AEA8BB7FA2FF</text:p>
          </table:table-cell>
          <table:table-cell office:value-type="float" office:value="404643" calcext:value-type="float">
            <text:p>40464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4DF0E2875FA14172718D62209BE560D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C2401470A19BFF8592ACA808F898491</text:p>
          </table:table-cell>
          <table:table-cell office:value-type="float" office:value="404835" calcext:value-type="float">
            <text:p>40483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E0C9B8960A2FEE7E403173E3FE2A980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DAD546C2C5F7B1CD4AF84269BA378403</text:p>
          </table:table-cell>
          <table:table-cell office:value-type="float" office:value="405165" calcext:value-type="float">
            <text:p>40516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168F5E0DC65C87BC3E1DF793F1E8BEB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25599DF9BAEBED3CBD9A1D8914E951DE</text:p>
          </table:table-cell>
          <table:table-cell office:value-type="float" office:value="405242" calcext:value-type="float">
            <text:p>40524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7AC672BE968E8B37BFF0C59486B4FC6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D51A966454D1C12F8B15D99DA59D4D1E</text:p>
          </table:table-cell>
          <table:table-cell office:value-type="float" office:value="405674" calcext:value-type="float">
            <text:p>40567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25C64CEE3E3E9CC0155F40AA28D2FA9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70170B7C5DAE57A833D65DDEF17AF2F</text:p>
          </table:table-cell>
          <table:table-cell office:value-type="float" office:value="406396" calcext:value-type="float">
            <text:p>40639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4223B202101C91C4400861018CA0CD9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A7F176C40CA1D7E4C1A3635643505591</text:p>
          </table:table-cell>
          <table:table-cell office:value-type="float" office:value="406653" calcext:value-type="float">
            <text:p>40665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4A277F421E12B42BD0B9E9C6C40BDF0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27DEFD35912BC5F72EB7FB757E7DB93</text:p>
          </table:table-cell>
          <table:table-cell office:value-type="float" office:value="406800" calcext:value-type="float">
            <text:p>40680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8D8A63F794F73AEDAFD66D77F8EC7333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BEDCF1BB157550725B484B318FF27C7B</text:p>
          </table:table-cell>
          <table:table-cell office:value-type="float" office:value="406826" calcext:value-type="float">
            <text:p>40682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5D7DD2A72E13DF7EF5B273DED64266CC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FFADCE73241A40BDFB5F92B800163632</text:p>
          </table:table-cell>
          <table:table-cell office:value-type="float" office:value="407053" calcext:value-type="float">
            <text:p>40705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6FDF4A8B9237DE8FE567293336BC0F2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89D29A4B4DC4EE77362F816E80A1F9D</text:p>
          </table:table-cell>
          <table:table-cell office:value-type="float" office:value="407301" calcext:value-type="float">
            <text:p>40730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68B51811B113137B5F8E2C21926EC910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4F9CF04AC74FDD8053ECC3D815EC6373</text:p>
          </table:table-cell>
          <table:table-cell office:value-type="float" office:value="407395" calcext:value-type="float">
            <text:p>407395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E366C1B961324D90949239169FBA3E5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A1191BE4CE9D14206C1277035491B0F</text:p>
          </table:table-cell>
          <table:table-cell office:value-type="float" office:value="407622" calcext:value-type="float">
            <text:p>4076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05CB304E09581FBDF3227D2BCE99715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E530B478DDE7E2965186A16437F905D2</text:p>
          </table:table-cell>
          <table:table-cell office:value-type="float" office:value="408551" calcext:value-type="float">
            <text:p>40855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4DEAF5CF60BDA1C37EF164A04C58704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A0FE6857CBC7BD444E2C62B4299A032</text:p>
          </table:table-cell>
          <table:table-cell office:value-type="float" office:value="408608" calcext:value-type="float">
            <text:p>40860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F41A4ACBF4526B28F3EA2E6F6C7AAAF3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08AF97CD000C742B31F2D72F874839A</text:p>
          </table:table-cell>
          <table:table-cell office:value-type="float" office:value="408664" calcext:value-type="float">
            <text:p>40866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4CA8DACA71FC89D8070576687498A860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A41C504F1DD58E403E7CE1661F6EE50</text:p>
          </table:table-cell>
          <table:table-cell office:value-type="float" office:value="409149" calcext:value-type="float">
            <text:p>409149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920F365E19F037DE68C4659140E3340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0902067743F1EF1E242F943E1A64DA5</text:p>
          </table:table-cell>
          <table:table-cell office:value-type="float" office:value="410165" calcext:value-type="float">
            <text:p>41016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9AAA1AA3218EC91656C8C1978EF48855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0A7EB1B208DC1EE8BA053F75D3DC48C</text:p>
          </table:table-cell>
          <table:table-cell office:value-type="float" office:value="410178" calcext:value-type="float">
            <text:p>41017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D994E39865AE0F228BBD2FFCBFA1BD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ECFC34BFFF81B32CFEFEABF2DF68C486</text:p>
          </table:table-cell>
          <table:table-cell office:value-type="float" office:value="410744" calcext:value-type="float">
            <text:p>41074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5BB38AA1A40444CE6639B3BA27413D7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06D82E6671A1370421CACBA22C4F0A1B</text:p>
          </table:table-cell>
          <table:table-cell office:value-type="float" office:value="410801" calcext:value-type="float">
            <text:p>41080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4A70E0CE20B36F83B52484266252946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462F26F81B6BF51740411BAEF884C26B</text:p>
          </table:table-cell>
          <table:table-cell office:value-type="float" office:value="411097" calcext:value-type="float">
            <text:p>41109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F8FC4623B73216199EEF29CCE2DD334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5302674EB266B967EC77AC147252B3BA</text:p>
          </table:table-cell>
          <table:table-cell office:value-type="float" office:value="411176" calcext:value-type="float">
            <text:p>41117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769850739E3B7D177B2547C967A764B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AFB9CD4A5F6F6146BBB15BE8DD62CA00</text:p>
          </table:table-cell>
          <table:table-cell office:value-type="float" office:value="411830" calcext:value-type="float">
            <text:p>4118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2699A994E043C159B1F81E439B1400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27A23418D3A5B9246D6E266D74353A7</text:p>
          </table:table-cell>
          <table:table-cell office:value-type="float" office:value="411926" calcext:value-type="float">
            <text:p>41192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7B1DEE169EAE2E287DC562D7F28AB1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05F67BDA4E8207104CAA9E5D2272F1B0</text:p>
          </table:table-cell>
          <table:table-cell office:value-type="float" office:value="412022" calcext:value-type="float">
            <text:p>41202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3A9773406D618A9A050EE11E1FCDCBB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E5E081CDFB7598C60EDACC8C117B060</text:p>
          </table:table-cell>
          <table:table-cell office:value-type="float" office:value="414718" calcext:value-type="float">
            <text:p>41471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8EFCCFE243438E89C839949828743A8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28CACA267E1CD9160624662D60C2009E</text:p>
          </table:table-cell>
          <table:table-cell office:value-type="float" office:value="414778" calcext:value-type="float">
            <text:p>41477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E2030FC7DEFA26BD349155E0B241DD15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F63AF4A875D76FCA16AB494EE747DD8A</text:p>
          </table:table-cell>
          <table:table-cell office:value-type="float" office:value="414861" calcext:value-type="float">
            <text:p>41486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9645579F4888C681A114BBE4E41FAD1B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1BC4F0629691DEA14CFC780B13D8C5E</text:p>
          </table:table-cell>
          <table:table-cell office:value-type="float" office:value="415344" calcext:value-type="float">
            <text:p>41534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93ADCC62024F12154FD81F7721A8513</text:p>
          </table:table-cell>
          <table:table-cell table:style-name="ce2" table:number-columns-repeated="16380"/>
        </table:table-row>
        <table:table-row table:style-name="ro1">
          <table:table-cell table:style-name="ce4" office:value-type="string" calcext:value-type="string">
            <text:p>7E878962FE59A6D0D45A5CF8E7F8686C</text:p>
          </table:table-cell>
          <table:table-cell office:value-type="float" office:value="416454" calcext:value-type="float">
            <text:p>416454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0C29E088CBF826782F92192086B047C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9A7BCBFD003FC2E7147F32561511ADE</text:p>
          </table:table-cell>
          <table:table-cell office:value-type="float" office:value="417100" calcext:value-type="float">
            <text:p>41710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85BA563DB17BBC07633C50DEE5E37CB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5D248C128B67A76A3920D70885A89A2E</text:p>
          </table:table-cell>
          <table:table-cell office:value-type="float" office:value="417269" calcext:value-type="float">
            <text:p>41726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64FF544E3FE454412D3036B04AE60FA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BE0E6BEDB209FF4ABA459665EAE9BD0</text:p>
          </table:table-cell>
          <table:table-cell office:value-type="float" office:value="417383" calcext:value-type="float">
            <text:p>41738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64B185987828D39B6D2FEBADADB927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EEE3965A6341693D83522DF7B6D212D9</text:p>
          </table:table-cell>
          <table:table-cell office:value-type="float" office:value="417899" calcext:value-type="float">
            <text:p>41789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DE3C95382DDDA18C2FAF7AC016C2928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D65C1C0B11BE6382120F7AB7B7A4A5E</text:p>
          </table:table-cell>
          <table:table-cell office:value-type="float" office:value="418332" calcext:value-type="float">
            <text:p>41833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F011AA6729EFB83FF9FAA756CC47ABF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2C78EBD003BD4C90D5ECE3D54CB7C90</text:p>
          </table:table-cell>
          <table:table-cell office:value-type="float" office:value="418490" calcext:value-type="float">
            <text:p>41849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ABBD1DB8C4C1F7160949BD0A6637F0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AFB9DDA5C077AB20CC4164C12442119</text:p>
          </table:table-cell>
          <table:table-cell office:value-type="float" office:value="419217" calcext:value-type="float">
            <text:p>41921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DB0074038A460B754534A9D6EACBC9C3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D3FEACC4B303F8730BF83ECA2F7B39A</text:p>
          </table:table-cell>
          <table:table-cell office:value-type="float" office:value="419280" calcext:value-type="float">
            <text:p>41928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36B3AF8F73E44C6BE196F08CC26519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A6D984DCEB949F6936B9ABFE24AC784</text:p>
          </table:table-cell>
          <table:table-cell office:value-type="float" office:value="420127" calcext:value-type="float">
            <text:p>42012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151B79A707EC11D99284EA01E39340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EF85CCC5C665E360E043CBD70E3C6621</text:p>
          </table:table-cell>
          <table:table-cell office:value-type="float" office:value="420160" calcext:value-type="float">
            <text:p>42016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98F6ED5A06CA20A66351CC801AF450A8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F8E3EED17200C0890E9B35E161389DCD</text:p>
          </table:table-cell>
          <table:table-cell office:value-type="float" office:value="420215" calcext:value-type="float">
            <text:p>42021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478A77EDCA0C42F74A7E65FAB1FEB1A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1622720375753A730EADF3111615665</text:p>
          </table:table-cell>
          <table:table-cell office:value-type="float" office:value="420583" calcext:value-type="float">
            <text:p>42058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00C95A8F15A921B3A170D4292640A38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AED12E72876AE851C67C5D605E899F3A</text:p>
          </table:table-cell>
          <table:table-cell office:value-type="float" office:value="421085" calcext:value-type="float">
            <text:p>42108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7CC0C80AEE6D8324DFD0CE7CB72D22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524E5B8C7D3B2E54803B114C8B6E1034</text:p>
          </table:table-cell>
          <table:table-cell office:value-type="float" office:value="422748" calcext:value-type="float">
            <text:p>42274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91EF7415EB5D90043E29FFB7C02A29C9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5F17DFBEDDDDFF31D083F976FABA6382</text:p>
          </table:table-cell>
          <table:table-cell office:value-type="float" office:value="423090" calcext:value-type="float">
            <text:p>42309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BFF7707742C37ECD1171C5660D24BE6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339A6FA63F527C79CB6D29DC4A62240</text:p>
          </table:table-cell>
          <table:table-cell office:value-type="float" office:value="425183" calcext:value-type="float">
            <text:p>42518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19685EA0B04FBBC8748336891610CADF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84F26A24BB94797D58A189EF624F1AD2</text:p>
          </table:table-cell>
          <table:table-cell office:value-type="float" office:value="425327" calcext:value-type="float">
            <text:p>42532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9767411BAC54861E712DBBB3471AD13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471AAC4DDD1B4C393361CD3F8FACFB78</text:p>
          </table:table-cell>
          <table:table-cell office:value-type="float" office:value="425416" calcext:value-type="float">
            <text:p>42541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79C23AD4EDBC087DDC408927CE57A195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2ECADE2A6EECDDB4BFF37B71BAC4C61</text:p>
          </table:table-cell>
          <table:table-cell office:value-type="float" office:value="425431" calcext:value-type="float">
            <text:p>4254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62ED0AC4709AC74217BE2EBD9B0EBC8F</text:p>
          </table:table-cell>
          <table:table-cell table:style-name="ce2" table:number-columns-repeated="16380"/>
        </table:table-row>
        <table:table-row table:style-name="ro1">
          <table:table-cell table:style-name="ce4" office:value-type="string" calcext:value-type="string">
            <text:p>29E4793F9DD086ADF5427A24FB336C03</text:p>
          </table:table-cell>
          <table:table-cell office:value-type="float" office:value="425696" calcext:value-type="float">
            <text:p>42569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86C712A835D007F6CD61A81818B07C4B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B5E40A92CEBF59D8F84AFEA15CB86F2</text:p>
          </table:table-cell>
          <table:table-cell office:value-type="float" office:value="426572" calcext:value-type="float">
            <text:p>426572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E879740430BBA27093BF9D5DE10589C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EC4756A3FF78DED2BC1741FA8543648D</text:p>
          </table:table-cell>
          <table:table-cell office:value-type="float" office:value="427724" calcext:value-type="float">
            <text:p>427724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72C8E288EE41D1A7F8A4950D8B2067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A0EE3231624A0D4DA826173544D02486</text:p>
          </table:table-cell>
          <table:table-cell office:value-type="float" office:value="427891" calcext:value-type="float">
            <text:p>42789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DEAA0151D8DB82269C65A68D3E7E6E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2C4A712599A73E15F7A6564D8F45CB35</text:p>
          </table:table-cell>
          <table:table-cell office:value-type="float" office:value="428175" calcext:value-type="float">
            <text:p>42817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DD61F85F5CD8BD0AD1AC221A66CE9FB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FCE5A8F5B4F573EE809C9CA4596AE4D</text:p>
          </table:table-cell>
          <table:table-cell office:value-type="float" office:value="428889" calcext:value-type="float">
            <text:p>42888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F02A19F1E1B86248652C87988C8BDD69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7472B79945CEA34037A3FDC5C6CD173</text:p>
          </table:table-cell>
          <table:table-cell office:value-type="float" office:value="429301" calcext:value-type="float">
            <text:p>429301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0E3402E64F3E5E1BCE6A96810BCE5709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574D0A7CF41CC516B51F625DCBA7762C</text:p>
          </table:table-cell>
          <table:table-cell office:value-type="float" office:value="429562" calcext:value-type="float">
            <text:p>42956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552013646CE8CB449748E87B5B32E8F3</text:p>
          </table:table-cell>
          <table:table-cell table:style-name="ce2" table:number-columns-repeated="16380"/>
        </table:table-row>
        <table:table-row table:style-name="ro1">
          <table:table-cell table:style-name="ce4" office:value-type="string" calcext:value-type="string">
            <text:p>3E8091CC261B9AD157A7B06A2C3023F8</text:p>
          </table:table-cell>
          <table:table-cell office:value-type="float" office:value="429716" calcext:value-type="float">
            <text:p>42971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B7C1BDDFB22D67E27C19E0CD8BA8BA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FD5A7DA8AC1F130F1B9BC298909A2576</text:p>
          </table:table-cell>
          <table:table-cell office:value-type="float" office:value="429847" calcext:value-type="float">
            <text:p>42984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B195474CBC5B9D43B31DB4E028F77B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D38EBBCB7863747C1CCC64D098D20279</text:p>
          </table:table-cell>
          <table:table-cell office:value-type="float" office:value="429968" calcext:value-type="float">
            <text:p>42996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98436AE73B6EBF7690E7191DFEB23CE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A61E5163C1F3367E9B4892144CC830BA</text:p>
          </table:table-cell>
          <table:table-cell office:value-type="float" office:value="430397" calcext:value-type="float">
            <text:p>4303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0F16D808C269851CD1FA21E00B3CB7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A6AD5077F789011C019B1D6FF495828</text:p>
          </table:table-cell>
          <table:table-cell office:value-type="float" office:value="430540" calcext:value-type="float">
            <text:p>4305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CC7D2A9B7D8AC89A61E03DEB1E6546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A08D190AF6D2569C5AA55A90A61EA5C0</text:p>
          </table:table-cell>
          <table:table-cell office:value-type="float" office:value="431640" calcext:value-type="float">
            <text:p>43164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2C509E021FE311E974FD3F99ADFE4758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45ECF7346C068050009E5CED9A229302</text:p>
          </table:table-cell>
          <table:table-cell office:value-type="float" office:value="431707" calcext:value-type="float">
            <text:p>43170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6C65E5C59E1D1491C5960735EE4425F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889D97226840474609FE3399322AB41</text:p>
          </table:table-cell>
          <table:table-cell office:value-type="float" office:value="434252" calcext:value-type="float">
            <text:p>43425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D7230CE8EC30FE31E956F879807521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EA52A72291AEB88BEDDEAFFEFB417289</text:p>
          </table:table-cell>
          <table:table-cell office:value-type="float" office:value="434295" calcext:value-type="float">
            <text:p>43429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8CD66F423313D829F002EB35AB5B204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2750DE7DC4CB606DD4C83EE9667D063F</text:p>
          </table:table-cell>
          <table:table-cell office:value-type="float" office:value="434905" calcext:value-type="float">
            <text:p>43490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9B12AC485E4C5E6E27905D6AD7DD00E3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2609B51779EF953AADFB9E9A658BFDB4</text:p>
          </table:table-cell>
          <table:table-cell office:value-type="float" office:value="435306" calcext:value-type="float">
            <text:p>43530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31CEC6CF49C588F144A6F3B1689B750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AA712E73AC9B841C4BF46103D52B964</text:p>
          </table:table-cell>
          <table:table-cell office:value-type="float" office:value="436070" calcext:value-type="float">
            <text:p>43607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362D470DD71646A79A88A58AA195805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37E66CD4CEBCFFD397A5A56878772EB</text:p>
          </table:table-cell>
          <table:table-cell office:value-type="float" office:value="436822" calcext:value-type="float">
            <text:p>43682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9EC25FF32795FBA788E44677D5EC59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5E2E7620805385B233C87D2B2B323EF</text:p>
          </table:table-cell>
          <table:table-cell office:value-type="float" office:value="437265" calcext:value-type="float">
            <text:p>4372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5698568A6555F9A755CFD92D2C76E10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05322A441585593C53C2354E393441EB</text:p>
          </table:table-cell>
          <table:table-cell office:value-type="float" office:value="438652" calcext:value-type="float">
            <text:p>43865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70A5EB1365F6FAF849EB3E8D238A60F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513ECA7A4D641588CECF1F8AAB5C939</text:p>
          </table:table-cell>
          <table:table-cell office:value-type="float" office:value="440287" calcext:value-type="float">
            <text:p>44028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B97BC15E60069D524B26786DEB021AB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EBD89DA9808F5CFC4E39DBE860E0C29</text:p>
          </table:table-cell>
          <table:table-cell office:value-type="float" office:value="440611" calcext:value-type="float">
            <text:p>4406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222F920DA3864482C24C820221E409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F21B905909019F0D616067EB4BE9EE71</text:p>
          </table:table-cell>
          <table:table-cell office:value-type="float" office:value="441218" calcext:value-type="float">
            <text:p>44121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AEC9C1143F52E67DD0CD1EE34B7401C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B7B53C0797ED1522839413C2C90C3405</text:p>
          </table:table-cell>
          <table:table-cell office:value-type="float" office:value="441434" calcext:value-type="float">
            <text:p>44143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28BA8A92159C28724BE45C97B6D244B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F22E15748CF5D31556FE37C4104BD4A1</text:p>
          </table:table-cell>
          <table:table-cell office:value-type="float" office:value="441482" calcext:value-type="float">
            <text:p>4414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E9B5C71694FD8613D470ED62E8B59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B043D154CB2E89A687E65DC92592577D</text:p>
          </table:table-cell>
          <table:table-cell office:value-type="float" office:value="442423" calcext:value-type="float">
            <text:p>44242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9215118F070863127A21FA1BB4C020C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F7EF1849251B237CB2254AC8D16C5DC7</text:p>
          </table:table-cell>
          <table:table-cell office:value-type="float" office:value="442571" calcext:value-type="float">
            <text:p>44257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719D40FAFDCB44C04558512A43E51FF9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312649A5D53F03632950D71A4DC24D4</text:p>
          </table:table-cell>
          <table:table-cell office:value-type="float" office:value="442757" calcext:value-type="float">
            <text:p>44275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79E1E79C628492A94DCB00BC382C26B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B884464211F04400B86D97E0674EF04</text:p>
          </table:table-cell>
          <table:table-cell office:value-type="float" office:value="442757" calcext:value-type="float">
            <text:p>44275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79E1E79C628492A94DCB00BC382C26B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50FBBEE402833775F1431C01153F046B</text:p>
          </table:table-cell>
          <table:table-cell office:value-type="float" office:value="443113" calcext:value-type="float">
            <text:p>4431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9D03AB545590E3724DAFDE7B7376C48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B28C02CFD5E3767BB7509E8EB096E1A</text:p>
          </table:table-cell>
          <table:table-cell office:value-type="float" office:value="444377" calcext:value-type="float">
            <text:p>444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3FC13F2C10A6EFDF156012227D8932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09A914356DEFC0DA3509E649B5DD4BF1</text:p>
          </table:table-cell>
          <table:table-cell office:value-type="float" office:value="444664" calcext:value-type="float">
            <text:p>44466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60EC66F99F698F57BD48BBE72FAFB6F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2BA90296A4BA9FFD05A894DAA38AF6B8</text:p>
          </table:table-cell>
          <table:table-cell office:value-type="float" office:value="444970" calcext:value-type="float">
            <text:p>44497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52D159CFD7E821A2B5E2751F654203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2C030A4A6D815A30874A23098CF1E6AF</text:p>
          </table:table-cell>
          <table:table-cell office:value-type="float" office:value="444970" calcext:value-type="float">
            <text:p>44497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52D159CFD7E821A2B5E2751F654203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0CD69252A2D268BBADFD3F3618A0385F</text:p>
          </table:table-cell>
          <table:table-cell office:value-type="float" office:value="445398" calcext:value-type="float">
            <text:p>44539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8426A9D97EA57D06544AF61EBFE592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0B0B57A0D5642B8DAB84D81786889628</text:p>
          </table:table-cell>
          <table:table-cell office:value-type="float" office:value="445518" calcext:value-type="float">
            <text:p>44551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9F533EFC58B65683A783D638EACCC9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705973DE587BC1947445EFF77B5DDFB</text:p>
          </table:table-cell>
          <table:table-cell office:value-type="float" office:value="445553" calcext:value-type="float">
            <text:p>44555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4243226D80A5EB78B8228D62AE41369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41BA68C49A7A0D581EEE0F856E7CF58</text:p>
          </table:table-cell>
          <table:table-cell office:value-type="float" office:value="445559" calcext:value-type="float">
            <text:p>44555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F0FDFFDB2E5F9CE01049AA5C92714493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4F986FE25FB34288763103939569F09A</text:p>
          </table:table-cell>
          <table:table-cell office:value-type="float" office:value="445945" calcext:value-type="float">
            <text:p>44594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7E21152FFF725A8EB684844D35ED148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28FB576E8C1531BF9E8241E948618798</text:p>
          </table:table-cell>
          <table:table-cell office:value-type="float" office:value="446069" calcext:value-type="float">
            <text:p>44606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92C4D82926974C7F65CE6259D98C4D2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2E64CA7D0F51FAE3D3E7C267AB690198</text:p>
          </table:table-cell>
          <table:table-cell office:value-type="float" office:value="448247" calcext:value-type="float">
            <text:p>44824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78A0E3B64E40120439B54A54CD6F6C0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EBA26826E4A44A7D92941B63BBB53E38</text:p>
          </table:table-cell>
          <table:table-cell office:value-type="float" office:value="448692" calcext:value-type="float">
            <text:p>44869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BE57223980A37369B8F7D04C586874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BE0CA5FC474BA7335AA168B17C5773E5</text:p>
          </table:table-cell>
          <table:table-cell office:value-type="float" office:value="451681" calcext:value-type="float">
            <text:p>45168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1A5E626D7919487B93D2D463F191C809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401F5EA448D32C89CE4D7C55AA9353FE</text:p>
          </table:table-cell>
          <table:table-cell office:value-type="float" office:value="452519" calcext:value-type="float">
            <text:p>452519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DC40AAFB9AC23F23809AD283C127E3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CA32DB62A28121BF2A1979D4AF15D71</text:p>
          </table:table-cell>
          <table:table-cell office:value-type="float" office:value="453044" calcext:value-type="float">
            <text:p>45304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5FEC11CFB5EFA4680A53652E5DC20B8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332289C06539E4383635D5F3A2CCDD2</text:p>
          </table:table-cell>
          <table:table-cell office:value-type="float" office:value="453290" calcext:value-type="float">
            <text:p>4532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9BE48400DA2532DE943EC3A2C4E23FC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DBC08F4CF441263CA1CA4093CC0FA125</text:p>
          </table:table-cell>
          <table:table-cell office:value-type="float" office:value="454485" calcext:value-type="float">
            <text:p>45448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9436EB6EFD0CACFFCD6FACA6094C5C2F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E75AA510E39CE892F06E4F5847E8B35D</text:p>
          </table:table-cell>
          <table:table-cell office:value-type="float" office:value="455052" calcext:value-type="float">
            <text:p>4550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690148432B737CFA22BFFFB6E032E4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A10C80EEA5300615DFAC59751C207D5</text:p>
          </table:table-cell>
          <table:table-cell office:value-type="float" office:value="455397" calcext:value-type="float">
            <text:p>45539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2184E2B4ECA065C2F31F7912F907CA5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DBC2AC0093430FC099C6A2ABC17B486</text:p>
          </table:table-cell>
          <table:table-cell office:value-type="float" office:value="456132" calcext:value-type="float">
            <text:p>4561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C1989C9DFC1AFBB44720FABEE0CCA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82183311B2542D813C816F268643A23</text:p>
          </table:table-cell>
          <table:table-cell office:value-type="float" office:value="456177" calcext:value-type="float">
            <text:p>45617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6BE5BC8243713940AEC36537630EB07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338A9C42033FEC18242758F98407D118</text:p>
          </table:table-cell>
          <table:table-cell office:value-type="float" office:value="456934" calcext:value-type="float">
            <text:p>4569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1A785196DF4BEE868B80CBD18ABDC7E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5B3A9CF2A78A55C1DB1EADB966BF196</text:p>
          </table:table-cell>
          <table:table-cell office:value-type="float" office:value="457629" calcext:value-type="float">
            <text:p>45762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91B4D173428AF36A93C4803FE789F6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95CE1E832B6F71FFFF0BE0D4B6175AE</text:p>
          </table:table-cell>
          <table:table-cell office:value-type="float" office:value="457689" calcext:value-type="float">
            <text:p>45768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366764F23D227C2E0073543C966709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D2D60016462E5AD991A009ED947DF25E</text:p>
          </table:table-cell>
          <table:table-cell office:value-type="float" office:value="458229" calcext:value-type="float">
            <text:p>45822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022D111BB13C74CDDDFC32D8BCDB5D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0BD539D0EE4025C42D14E87506933B42</text:p>
          </table:table-cell>
          <table:table-cell office:value-type="float" office:value="458351" calcext:value-type="float">
            <text:p>45835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FE9F60240B80241E9F8DEF9460F1DF8A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4877C6DDDFDDEA7004272E1C74D0EAA8</text:p>
          </table:table-cell>
          <table:table-cell office:value-type="float" office:value="458416" calcext:value-type="float">
            <text:p>45841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C19247A3649FB4448DA633E05B4C9D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543F4D6B9E81F2D701201EFB34F13C82</text:p>
          </table:table-cell>
          <table:table-cell office:value-type="float" office:value="458416" calcext:value-type="float">
            <text:p>458416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BC19247A3649FB4448DA633E05B4C9D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6C41474316A5073593FFA296878813CA</text:p>
          </table:table-cell>
          <table:table-cell office:value-type="float" office:value="458420" calcext:value-type="float">
            <text:p>4584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0D222D8B6D2ADB853467EEFEFAD8B94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E576D7A20EE213792634740CE318064E</text:p>
          </table:table-cell>
          <table:table-cell office:value-type="float" office:value="458964" calcext:value-type="float">
            <text:p>45896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9AC67A10DC5770724BA5BAAEA30040B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1A6CB2ED7CDD064560EC62D2C161AFF</text:p>
          </table:table-cell>
          <table:table-cell office:value-type="float" office:value="459382" calcext:value-type="float">
            <text:p>45938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7EECE05DDC55CFE9178BACD605D6B0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B38697896B82F1AC146165FE5F54D22B</text:p>
          </table:table-cell>
          <table:table-cell office:value-type="float" office:value="459914" calcext:value-type="float">
            <text:p>45991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54D7A29A3F8F7108DC8AF261D30492F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ACBDCC0AB86680B94B97C3274117F24</text:p>
          </table:table-cell>
          <table:table-cell office:value-type="float" office:value="460411" calcext:value-type="float">
            <text:p>4604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98D9A74BE8C779C516D2FCADE21686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C896B6DAD82A39189A77CB29DA3115A</text:p>
          </table:table-cell>
          <table:table-cell office:value-type="float" office:value="460646" calcext:value-type="float">
            <text:p>46064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9A098EFA26F0A7B6279239F7D30F4093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4657B632A0D40B4B6F4132D0DB24233E</text:p>
          </table:table-cell>
          <table:table-cell office:value-type="float" office:value="461603" calcext:value-type="float">
            <text:p>46160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5DD6290C725D9D74D4C3408EE5651A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5D30B8EF26F3F1D9984C824019F70C8</text:p>
          </table:table-cell>
          <table:table-cell office:value-type="float" office:value="461854" calcext:value-type="float">
            <text:p>46185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047B2D42208FE4A88ADDC69FC62A8A2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F4D58BEC71DE7BA1D54C73A434513467</text:p>
          </table:table-cell>
          <table:table-cell office:value-type="float" office:value="463131" calcext:value-type="float">
            <text:p>4631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3589DD4D275816D64348BBF3826AE86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94129CAC16E04C3585919A88FE1A1CAB</text:p>
          </table:table-cell>
          <table:table-cell office:value-type="float" office:value="463574" calcext:value-type="float">
            <text:p>46357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CFB04A6BB0A7439516632EA09D58E6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77989A60637F893EFDA3020CCCD404D1</text:p>
          </table:table-cell>
          <table:table-cell office:value-type="float" office:value="464447" calcext:value-type="float">
            <text:p>46444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46C4A3F2A6AA9BE76D3D7622E65306B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CB61E0C3D913515F5A405F7A46417F99</text:p>
          </table:table-cell>
          <table:table-cell office:value-type="float" office:value="464470" calcext:value-type="float">
            <text:p>46447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32C27B36FE65BA52966D9A1EA2B877C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54CCD93E0B1B70AE5D720EE5ACF03F6</text:p>
          </table:table-cell>
          <table:table-cell office:value-type="float" office:value="465338" calcext:value-type="float">
            <text:p>4653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02DC47B0811059E11BB2A71E0685A7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5CB2A17C54744B275D7A4A5D5B913D7A</text:p>
          </table:table-cell>
          <table:table-cell office:value-type="float" office:value="466952" calcext:value-type="float">
            <text:p>46695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92C4AF8C3A01022AF78996FADD15F32C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45DE0DF0B964F2A90DB0B6E26F2B0A77</text:p>
          </table:table-cell>
          <table:table-cell office:value-type="float" office:value="466984" calcext:value-type="float">
            <text:p>46698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FB820E02C14A6F5575FA44AE8D9472D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D52CA27A21FA814A912897DC1BDC049A</text:p>
          </table:table-cell>
          <table:table-cell office:value-type="float" office:value="470766" calcext:value-type="float">
            <text:p>47076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81076684ED87BD352632DF940009375B</text:p>
          </table:table-cell>
          <table:table-cell table:style-name="ce2" table:number-columns-repeated="16380"/>
        </table:table-row>
        <table:table-row table:style-name="ro1" table:number-rows-repeated="1048312">
          <table:table-cell table:number-columns-repeated="4"/>
          <table:table-cell table:style-name="ce2" table:number-columns-repeated="16380"/>
        </table:table-row>
        <table:table-row table:style-name="ro1">
          <table:table-cell table:number-columns-repeated="4"/>
          <table:table-cell table:style-name="ce2" table:number-columns-repeated="16380"/>
        </table:table-row>
      </table:table>
      <table:table table:name="PROFILE_GROUPS" table:style-name="ta3">
        <office:forms form:automatic-focus="false" form:apply-design-mode="false"/>
        <table:table-column table:style-name="co10" table:default-cell-style-name="ce2"/>
        <table:table-column table:style-name="co11" table:default-cell-style-name="ce2"/>
        <table:table-column table:style-name="co6" table:number-columns-repeated="16382"/>
        <table:table-row table:style-name="ro1">
          <table:table-cell table:style-name="ce1" office:value-type="string" calcext:value-type="string">
            <text:p>CUSTOMER_GROUP_ID</text:p>
          </table:table-cell>
          <table:table-cell table:style-name="ce1" office:value-type="string" calcext:value-type="string">
            <text:p>PROFILE_NUMBER</text:p>
          </table:table-cell>
          <table:table-cell table:style-name="ce1" table:number-columns-repeated="16382"/>
        </table:table-row>
        <table:table-row table:style-name="ro1">
          <table:table-cell office:value-type="float" office:value="300450" calcext:value-type="float">
            <text:p>300450</text:p>
          </table:table-cell>
          <table:table-cell office:value-type="float" office:value="1000426" calcext:value-type="float">
            <text:p>1000426</text:p>
          </table:table-cell>
          <table:table-cell table:style-name="ce2" table:number-columns-repeated="16382"/>
        </table:table-row>
        <table:table-row table:style-name="ro1">
          <table:table-cell office:value-type="float" office:value="356197" calcext:value-type="float">
            <text:p>356197</text:p>
          </table:table-cell>
          <table:table-cell office:value-type="float" office:value="48961" calcext:value-type="float">
            <text:p>48961</text:p>
          </table:table-cell>
          <table:table-cell table:style-name="ce2" table:number-columns-repeated="16382"/>
        </table:table-row>
        <table:table-row table:style-name="ro1">
          <table:table-cell office:value-type="float" office:value="364974" calcext:value-type="float">
            <text:p>364974</text:p>
          </table:table-cell>
          <table:table-cell office:value-type="float" office:value="29235" calcext:value-type="float">
            <text:p>29235</text:p>
          </table:table-cell>
          <table:table-cell table:style-name="ce2" table:number-columns-repeated="16382"/>
        </table:table-row>
        <table:table-row table:style-name="ro1">
          <table:table-cell office:value-type="float" office:value="364974" calcext:value-type="float">
            <text:p>364974</text:p>
          </table:table-cell>
          <table:table-cell office:value-type="float" office:value="29236" calcext:value-type="float">
            <text:p>29236</text:p>
          </table:table-cell>
          <table:table-cell table:style-name="ce2" table:number-columns-repeated="16382"/>
        </table:table-row>
        <table:table-row table:style-name="ro1">
          <table:table-cell office:value-type="float" office:value="366057" calcext:value-type="float">
            <text:p>366057</text:p>
          </table:table-cell>
          <table:table-cell office:value-type="float" office:value="56502" calcext:value-type="float">
            <text:p>56502</text:p>
          </table:table-cell>
          <table:table-cell table:style-name="ce2" table:number-columns-repeated="16382"/>
        </table:table-row>
        <table:table-row table:style-name="ro1">
          <table:table-cell office:value-type="float" office:value="368585" calcext:value-type="float">
            <text:p>368585</text:p>
          </table:table-cell>
          <table:table-cell office:value-type="float" office:value="36094" calcext:value-type="float">
            <text:p>36094</text:p>
          </table:table-cell>
          <table:table-cell table:style-name="ce2" table:number-columns-repeated="16382"/>
        </table:table-row>
        <table:table-row table:style-name="ro1">
          <table:table-cell office:value-type="float" office:value="369841" calcext:value-type="float">
            <text:p>369841</text:p>
          </table:table-cell>
          <table:table-cell office:value-type="float" office:value="38450" calcext:value-type="float">
            <text:p>38450</text:p>
          </table:table-cell>
          <table:table-cell table:style-name="ce2" table:number-columns-repeated="16382"/>
        </table:table-row>
        <table:table-row table:style-name="ro1">
          <table:table-cell office:value-type="float" office:value="371940" calcext:value-type="float">
            <text:p>371940</text:p>
          </table:table-cell>
          <table:table-cell office:value-type="float" office:value="42153" calcext:value-type="float">
            <text:p>42153</text:p>
          </table:table-cell>
          <table:table-cell table:style-name="ce2" table:number-columns-repeated="16382"/>
        </table:table-row>
        <table:table-row table:style-name="ro1">
          <table:table-cell office:value-type="float" office:value="372807" calcext:value-type="float">
            <text:p>372807</text:p>
          </table:table-cell>
          <table:table-cell office:value-type="float" office:value="43540" calcext:value-type="float">
            <text:p>43540</text:p>
          </table:table-cell>
          <table:table-cell table:style-name="ce2" table:number-columns-repeated="16382"/>
        </table:table-row>
        <table:table-row table:style-name="ro1">
          <table:table-cell office:value-type="float" office:value="376075" calcext:value-type="float">
            <text:p>376075</text:p>
          </table:table-cell>
          <table:table-cell office:value-type="float" office:value="48994" calcext:value-type="float">
            <text:p>48994</text:p>
          </table:table-cell>
          <table:table-cell table:style-name="ce2" table:number-columns-repeated="16382"/>
        </table:table-row>
        <table:table-row table:style-name="ro1">
          <table:table-cell office:value-type="float" office:value="376843" calcext:value-type="float">
            <text:p>376843</text:p>
          </table:table-cell>
          <table:table-cell office:value-type="float" office:value="50343" calcext:value-type="float">
            <text:p>50343</text:p>
          </table:table-cell>
          <table:table-cell table:style-name="ce2" table:number-columns-repeated="16382"/>
        </table:table-row>
        <table:table-row table:style-name="ro1">
          <table:table-cell office:value-type="float" office:value="379676" calcext:value-type="float">
            <text:p>379676</text:p>
          </table:table-cell>
          <table:table-cell office:value-type="float" office:value="55255" calcext:value-type="float">
            <text:p>55255</text:p>
          </table:table-cell>
          <table:table-cell table:style-name="ce2" table:number-columns-repeated="16382"/>
        </table:table-row>
        <table:table-row table:style-name="ro1">
          <table:table-cell office:value-type="float" office:value="382357" calcext:value-type="float">
            <text:p>382357</text:p>
          </table:table-cell>
          <table:table-cell office:value-type="float" office:value="59508" calcext:value-type="float">
            <text:p>59508</text:p>
          </table:table-cell>
          <table:table-cell table:style-name="ce2" table:number-columns-repeated="16382"/>
        </table:table-row>
        <table:table-row table:style-name="ro1">
          <table:table-cell office:value-type="float" office:value="391333" calcext:value-type="float">
            <text:p>391333</text:p>
          </table:table-cell>
          <table:table-cell office:value-type="float" office:value="72167" calcext:value-type="float">
            <text:p>72167</text:p>
          </table:table-cell>
          <table:table-cell table:style-name="ce2" table:number-columns-repeated="16382"/>
        </table:table-row>
        <table:table-row table:style-name="ro1">
          <table:table-cell office:value-type="float" office:value="391656" calcext:value-type="float">
            <text:p>391656</text:p>
          </table:table-cell>
          <table:table-cell office:value-type="float" office:value="72603" calcext:value-type="float">
            <text:p>72603</text:p>
          </table:table-cell>
          <table:table-cell table:style-name="ce2" table:number-columns-repeated="16382"/>
        </table:table-row>
        <table:table-row table:style-name="ro1">
          <table:table-cell office:value-type="float" office:value="391934" calcext:value-type="float">
            <text:p>391934</text:p>
          </table:table-cell>
          <table:table-cell office:value-type="float" office:value="72960" calcext:value-type="float">
            <text:p>72960</text:p>
          </table:table-cell>
          <table:table-cell table:style-name="ce2" table:number-columns-repeated="16382"/>
        </table:table-row>
        <table:table-row table:style-name="ro1">
          <table:table-cell office:value-type="float" office:value="393019" calcext:value-type="float">
            <text:p>393019</text:p>
          </table:table-cell>
          <table:table-cell office:value-type="float" office:value="74314" calcext:value-type="float">
            <text:p>74314</text:p>
          </table:table-cell>
          <table:table-cell table:style-name="ce2" table:number-columns-repeated="16382"/>
        </table:table-row>
        <table:table-row table:style-name="ro1">
          <table:table-cell office:value-type="float" office:value="395786" calcext:value-type="float">
            <text:p>395786</text:p>
          </table:table-cell>
          <table:table-cell office:value-type="float" office:value="77674" calcext:value-type="float">
            <text:p>77674</text:p>
          </table:table-cell>
          <table:table-cell table:style-name="ce2" table:number-columns-repeated="16382"/>
        </table:table-row>
        <table:table-row table:style-name="ro1">
          <table:table-cell office:value-type="float" office:value="403604" calcext:value-type="float">
            <text:p>403604</text:p>
          </table:table-cell>
          <table:table-cell office:value-type="float" office:value="87113" calcext:value-type="float">
            <text:p>87113</text:p>
          </table:table-cell>
          <table:table-cell table:style-name="ce2" table:number-columns-repeated="16382"/>
        </table:table-row>
        <table:table-row table:style-name="ro1">
          <table:table-cell office:value-type="float" office:value="404643" calcext:value-type="float">
            <text:p>404643</text:p>
          </table:table-cell>
          <table:table-cell office:value-type="float" office:value="88244" calcext:value-type="float">
            <text:p>88244</text:p>
          </table:table-cell>
          <table:table-cell table:style-name="ce2" table:number-columns-repeated="16382"/>
        </table:table-row>
        <table:table-row table:style-name="ro1">
          <table:table-cell office:value-type="float" office:value="405242" calcext:value-type="float">
            <text:p>405242</text:p>
          </table:table-cell>
          <table:table-cell office:value-type="float" office:value="53234" calcext:value-type="float">
            <text:p>53234</text:p>
          </table:table-cell>
          <table:table-cell table:style-name="ce2" table:number-columns-repeated="16382"/>
        </table:table-row>
        <table:table-row table:style-name="ro1">
          <table:table-cell office:value-type="float" office:value="409149" calcext:value-type="float">
            <text:p>409149</text:p>
          </table:table-cell>
          <table:table-cell office:value-type="float" office:value="92752" calcext:value-type="float">
            <text:p>92752</text:p>
          </table:table-cell>
          <table:table-cell table:style-name="ce2" table:number-columns-repeated="16382"/>
        </table:table-row>
        <table:table-row table:style-name="ro1">
          <table:table-cell office:value-type="float" office:value="411097" calcext:value-type="float">
            <text:p>411097</text:p>
          </table:table-cell>
          <table:table-cell office:value-type="float" office:value="94758" calcext:value-type="float">
            <text:p>94758</text:p>
          </table:table-cell>
          <table:table-cell table:style-name="ce2" table:number-columns-repeated="16382"/>
        </table:table-row>
        <table:table-row table:style-name="ro1">
          <table:table-cell office:value-type="float" office:value="414718" calcext:value-type="float">
            <text:p>414718</text:p>
          </table:table-cell>
          <table:table-cell office:value-type="float" office:value="98306" calcext:value-type="float">
            <text:p>98306</text:p>
          </table:table-cell>
          <table:table-cell table:style-name="ce2" table:number-columns-repeated="16382"/>
        </table:table-row>
        <table:table-row table:style-name="ro1">
          <table:table-cell office:value-type="float" office:value="414778" calcext:value-type="float">
            <text:p>414778</text:p>
          </table:table-cell>
          <table:table-cell office:value-type="float" office:value="96719" calcext:value-type="float">
            <text:p>96719</text:p>
          </table:table-cell>
          <table:table-cell table:style-name="ce2" table:number-columns-repeated="16382"/>
        </table:table-row>
        <table:table-row table:style-name="ro1">
          <table:table-cell office:value-type="float" office:value="419280" calcext:value-type="float">
            <text:p>419280</text:p>
          </table:table-cell>
          <table:table-cell office:value-type="float" office:value="102052" calcext:value-type="float">
            <text:p>102052</text:p>
          </table:table-cell>
          <table:table-cell table:style-name="ce2" table:number-columns-repeated="16382"/>
        </table:table-row>
        <table:table-row table:style-name="ro1">
          <table:table-cell office:value-type="float" office:value="429716" calcext:value-type="float">
            <text:p>429716</text:p>
          </table:table-cell>
          <table:table-cell office:value-type="float" office:value="108225" calcext:value-type="float">
            <text:p>108225</text:p>
          </table:table-cell>
          <table:table-cell table:style-name="ce2" table:number-columns-repeated="16382"/>
        </table:table-row>
        <table:table-row table:style-name="ro1">
          <table:table-cell office:value-type="float" office:value="434905" calcext:value-type="float">
            <text:p>434905</text:p>
          </table:table-cell>
          <table:table-cell office:value-type="float" office:value="112477" calcext:value-type="float">
            <text:p>112477</text:p>
          </table:table-cell>
          <table:table-cell table:style-name="ce2" table:number-columns-repeated="16382"/>
        </table:table-row>
        <table:table-row table:style-name="ro1">
          <table:table-cell office:value-type="float" office:value="435306" calcext:value-type="float">
            <text:p>435306</text:p>
          </table:table-cell>
          <table:table-cell office:value-type="float" office:value="112790" calcext:value-type="float">
            <text:p>112790</text:p>
          </table:table-cell>
          <table:table-cell table:style-name="ce2" table:number-columns-repeated="16382"/>
        </table:table-row>
        <table:table-row table:style-name="ro1">
          <table:table-cell office:value-type="float" office:value="441218" calcext:value-type="float">
            <text:p>441218</text:p>
          </table:table-cell>
          <table:table-cell office:value-type="float" office:value="117764" calcext:value-type="float">
            <text:p>117764</text:p>
          </table:table-cell>
          <table:table-cell table:style-name="ce2" table:number-columns-repeated="16382"/>
        </table:table-row>
        <table:table-row table:style-name="ro1">
          <table:table-cell office:value-type="float" office:value="442571" calcext:value-type="float">
            <text:p>442571</text:p>
          </table:table-cell>
          <table:table-cell office:value-type="float" office:value="118854" calcext:value-type="float">
            <text:p>118854</text:p>
          </table:table-cell>
          <table:table-cell table:style-name="ce2" table:number-columns-repeated="16382"/>
        </table:table-row>
        <table:table-row table:style-name="ro1">
          <table:table-cell office:value-type="float" office:value="444664" calcext:value-type="float">
            <text:p>444664</text:p>
          </table:table-cell>
          <table:table-cell office:value-type="float" office:value="120514" calcext:value-type="float">
            <text:p>120514</text:p>
          </table:table-cell>
          <table:table-cell table:style-name="ce2" table:number-columns-repeated="16382"/>
        </table:table-row>
        <table:table-row table:style-name="ro1">
          <table:table-cell office:value-type="float" office:value="461603" calcext:value-type="float">
            <text:p>461603</text:p>
          </table:table-cell>
          <table:table-cell office:value-type="float" office:value="134329" calcext:value-type="float">
            <text:p>134329</text:p>
          </table:table-cell>
          <table:table-cell table:style-name="ce2" table:number-columns-repeated="16382"/>
        </table:table-row>
        <table:table-row table:style-name="ro1">
          <table:table-cell office:value-type="float" office:value="463131" calcext:value-type="float">
            <text:p>463131</text:p>
          </table:table-cell>
          <table:table-cell office:value-type="float" office:value="135557" calcext:value-type="float">
            <text:p>135557</text:p>
          </table:table-cell>
          <table:table-cell table:style-name="ce2" table:number-columns-repeated="16382"/>
        </table:table-row>
        <table:table-row table:style-name="ro1">
          <table:table-cell office:value-type="float" office:value="456177" calcext:value-type="float">
            <text:p>456177</text:p>
          </table:table-cell>
          <table:table-cell office:value-type="float" office:value="129872" calcext:value-type="float">
            <text:p>129872</text:p>
          </table:table-cell>
          <table:table-cell table:style-name="ce2" table:number-columns-repeated="16382"/>
        </table:table-row>
        <table:table-row table:style-name="ro1">
          <table:table-cell office:value-type="float" office:value="455397" calcext:value-type="float">
            <text:p>455397</text:p>
          </table:table-cell>
          <table:table-cell office:value-type="float" office:value="129235" calcext:value-type="float">
            <text:p>129235</text:p>
          </table:table-cell>
          <table:table-cell table:style-name="ce2" table:number-columns-repeated="16382"/>
        </table:table-row>
        <table:table-row table:style-name="ro1">
          <table:table-cell office:value-type="float" office:value="455052" calcext:value-type="float">
            <text:p>455052</text:p>
          </table:table-cell>
          <table:table-cell office:value-type="float" office:value="1004769" calcext:value-type="float">
            <text:p>1004769</text:p>
          </table:table-cell>
          <table:table-cell table:style-name="ce2" table:number-columns-repeated="16382"/>
        </table:table-row>
        <table:table-row table:style-name="ro1">
          <table:table-cell office:value-type="float" office:value="364367" calcext:value-type="float">
            <text:p>364367</text:p>
          </table:table-cell>
          <table:table-cell office:value-type="float" office:value="28148" calcext:value-type="float">
            <text:p>28148</text:p>
          </table:table-cell>
          <table:table-cell table:style-name="ce2" table:number-columns-repeated="16382"/>
        </table:table-row>
        <table:table-row table:style-name="ro1">
          <table:table-cell office:value-type="float" office:value="365451" calcext:value-type="float">
            <text:p>365451</text:p>
          </table:table-cell>
          <table:table-cell office:value-type="float" office:value="30173" calcext:value-type="float">
            <text:p>30173</text:p>
          </table:table-cell>
          <table:table-cell table:style-name="ce2" table:number-columns-repeated="16382"/>
        </table:table-row>
        <table:table-row table:style-name="ro1">
          <table:table-cell office:value-type="float" office:value="365977" calcext:value-type="float">
            <text:p>365977</text:p>
          </table:table-cell>
          <table:table-cell office:value-type="float" office:value="31186" calcext:value-type="float">
            <text:p>31186</text:p>
          </table:table-cell>
          <table:table-cell table:style-name="ce2" table:number-columns-repeated="16382"/>
        </table:table-row>
        <table:table-row table:style-name="ro1">
          <table:table-cell office:value-type="float" office:value="367393" calcext:value-type="float">
            <text:p>367393</text:p>
          </table:table-cell>
          <table:table-cell office:value-type="float" office:value="33866" calcext:value-type="float">
            <text:p>33866</text:p>
          </table:table-cell>
          <table:table-cell table:style-name="ce2" table:number-columns-repeated="16382"/>
        </table:table-row>
        <table:table-row table:style-name="ro1">
          <table:table-cell office:value-type="float" office:value="367901" calcext:value-type="float">
            <text:p>367901</text:p>
          </table:table-cell>
          <table:table-cell office:value-type="float" office:value="1004937" calcext:value-type="float">
            <text:p>1004937</text:p>
          </table:table-cell>
          <table:table-cell table:style-name="ce2" table:number-columns-repeated="16382"/>
        </table:table-row>
        <table:table-row table:style-name="ro1">
          <table:table-cell office:value-type="float" office:value="369868" calcext:value-type="float">
            <text:p>369868</text:p>
          </table:table-cell>
          <table:table-cell office:value-type="float" office:value="41771" calcext:value-type="float">
            <text:p>41771</text:p>
          </table:table-cell>
          <table:table-cell table:style-name="ce2" table:number-columns-repeated="16382"/>
        </table:table-row>
        <table:table-row table:style-name="ro1">
          <table:table-cell office:value-type="float" office:value="370483" calcext:value-type="float">
            <text:p>370483</text:p>
          </table:table-cell>
          <table:table-cell office:value-type="float" office:value="40041" calcext:value-type="float">
            <text:p>40041</text:p>
          </table:table-cell>
          <table:table-cell table:style-name="ce2" table:number-columns-repeated="16382"/>
        </table:table-row>
        <table:table-row table:style-name="ro1">
          <table:table-cell office:value-type="float" office:value="375742" calcext:value-type="float">
            <text:p>375742</text:p>
          </table:table-cell>
          <table:table-cell office:value-type="float" office:value="48418" calcext:value-type="float">
            <text:p>48418</text:p>
          </table:table-cell>
          <table:table-cell table:style-name="ce2" table:number-columns-repeated="16382"/>
        </table:table-row>
        <table:table-row table:style-name="ro1">
          <table:table-cell office:value-type="float" office:value="376637" calcext:value-type="float">
            <text:p>376637</text:p>
          </table:table-cell>
          <table:table-cell office:value-type="float" office:value="49951" calcext:value-type="float">
            <text:p>49951</text:p>
          </table:table-cell>
          <table:table-cell table:style-name="ce2" table:number-columns-repeated="16382"/>
        </table:table-row>
        <table:table-row table:style-name="ro1">
          <table:table-cell office:value-type="float" office:value="378924" calcext:value-type="float">
            <text:p>378924</text:p>
          </table:table-cell>
          <table:table-cell office:value-type="float" office:value="53910" calcext:value-type="float">
            <text:p>53910</text:p>
          </table:table-cell>
          <table:table-cell table:style-name="ce2" table:number-columns-repeated="16382"/>
        </table:table-row>
        <table:table-row table:style-name="ro1">
          <table:table-cell office:value-type="float" office:value="378949" calcext:value-type="float">
            <text:p>378949</text:p>
          </table:table-cell>
          <table:table-cell office:value-type="float" office:value="53968" calcext:value-type="float">
            <text:p>53968</text:p>
          </table:table-cell>
          <table:table-cell table:style-name="ce2" table:number-columns-repeated="16382"/>
        </table:table-row>
        <table:table-row table:style-name="ro1">
          <table:table-cell office:value-type="float" office:value="379606" calcext:value-type="float">
            <text:p>379606</text:p>
          </table:table-cell>
          <table:table-cell office:value-type="float" office:value="55130" calcext:value-type="float">
            <text:p>55130</text:p>
          </table:table-cell>
          <table:table-cell table:style-name="ce2" table:number-columns-repeated="16382"/>
        </table:table-row>
        <table:table-row table:style-name="ro1">
          <table:table-cell office:value-type="float" office:value="380839" calcext:value-type="float">
            <text:p>380839</text:p>
          </table:table-cell>
          <table:table-cell office:value-type="float" office:value="57115" calcext:value-type="float">
            <text:p>57115</text:p>
          </table:table-cell>
          <table:table-cell table:style-name="ce2" table:number-columns-repeated="16382"/>
        </table:table-row>
        <table:table-row table:style-name="ro1">
          <table:table-cell office:value-type="float" office:value="381047" calcext:value-type="float">
            <text:p>381047</text:p>
          </table:table-cell>
          <table:table-cell office:value-type="float" office:value="57463" calcext:value-type="float">
            <text:p>57463</text:p>
          </table:table-cell>
          <table:table-cell table:style-name="ce2" table:number-columns-repeated="16382"/>
        </table:table-row>
        <table:table-row table:style-name="ro1">
          <table:table-cell office:value-type="float" office:value="381751" calcext:value-type="float">
            <text:p>381751</text:p>
          </table:table-cell>
          <table:table-cell office:value-type="float" office:value="58564" calcext:value-type="float">
            <text:p>58564</text:p>
          </table:table-cell>
          <table:table-cell table:style-name="ce2" table:number-columns-repeated="16382"/>
        </table:table-row>
        <table:table-row table:style-name="ro1">
          <table:table-cell office:value-type="float" office:value="382009" calcext:value-type="float">
            <text:p>382009</text:p>
          </table:table-cell>
          <table:table-cell office:value-type="float" office:value="58929" calcext:value-type="float">
            <text:p>58929</text:p>
          </table:table-cell>
          <table:table-cell table:style-name="ce2" table:number-columns-repeated="16382"/>
        </table:table-row>
        <table:table-row table:style-name="ro1">
          <table:table-cell office:value-type="float" office:value="383623" calcext:value-type="float">
            <text:p>383623</text:p>
          </table:table-cell>
          <table:table-cell office:value-type="float" office:value="61400" calcext:value-type="float">
            <text:p>61400</text:p>
          </table:table-cell>
          <table:table-cell table:style-name="ce2" table:number-columns-repeated="16382"/>
        </table:table-row>
        <table:table-row table:style-name="ro1">
          <table:table-cell office:value-type="float" office:value="386749" calcext:value-type="float">
            <text:p>386749</text:p>
          </table:table-cell>
          <table:table-cell office:value-type="float" office:value="65982" calcext:value-type="float">
            <text:p>65982</text:p>
          </table:table-cell>
          <table:table-cell table:style-name="ce2" table:number-columns-repeated="16382"/>
        </table:table-row>
        <table:table-row table:style-name="ro1">
          <table:table-cell office:value-type="float" office:value="388724" calcext:value-type="float">
            <text:p>388724</text:p>
          </table:table-cell>
          <table:table-cell office:value-type="float" office:value="68787" calcext:value-type="float">
            <text:p>68787</text:p>
          </table:table-cell>
          <table:table-cell table:style-name="ce2" table:number-columns-repeated="16382"/>
        </table:table-row>
        <table:table-row table:style-name="ro1">
          <table:table-cell office:value-type="float" office:value="389461" calcext:value-type="float">
            <text:p>389461</text:p>
          </table:table-cell>
          <table:table-cell office:value-type="float" office:value="78078" calcext:value-type="float">
            <text:p>78078</text:p>
          </table:table-cell>
          <table:table-cell table:style-name="ce2" table:number-columns-repeated="16382"/>
        </table:table-row>
        <table:table-row table:style-name="ro1">
          <table:table-cell office:value-type="float" office:value="391333" calcext:value-type="float">
            <text:p>391333</text:p>
          </table:table-cell>
          <table:table-cell office:value-type="float" office:value="72824" calcext:value-type="float">
            <text:p>72824</text:p>
          </table:table-cell>
          <table:table-cell table:style-name="ce2" table:number-columns-repeated="16382"/>
        </table:table-row>
        <table:table-row table:style-name="ro1">
          <table:table-cell office:value-type="float" office:value="392916" calcext:value-type="float">
            <text:p>392916</text:p>
          </table:table-cell>
          <table:table-cell office:value-type="float" office:value="75522" calcext:value-type="float">
            <text:p>75522</text:p>
          </table:table-cell>
          <table:table-cell table:style-name="ce2" table:number-columns-repeated="16382"/>
        </table:table-row>
        <table:table-row table:style-name="ro1">
          <table:table-cell office:value-type="float" office:value="395786" calcext:value-type="float">
            <text:p>395786</text:p>
          </table:table-cell>
          <table:table-cell office:value-type="float" office:value="77673" calcext:value-type="float">
            <text:p>77673</text:p>
          </table:table-cell>
          <table:table-cell table:style-name="ce2" table:number-columns-repeated="16382"/>
        </table:table-row>
        <table:table-row table:style-name="ro1">
          <table:table-cell office:value-type="float" office:value="396641" calcext:value-type="float">
            <text:p>396641</text:p>
          </table:table-cell>
          <table:table-cell office:value-type="float" office:value="78711" calcext:value-type="float">
            <text:p>78711</text:p>
          </table:table-cell>
          <table:table-cell table:style-name="ce2" table:number-columns-repeated="16382"/>
        </table:table-row>
        <table:table-row table:style-name="ro1">
          <table:table-cell office:value-type="float" office:value="397237" calcext:value-type="float">
            <text:p>397237</text:p>
          </table:table-cell>
          <table:table-cell office:value-type="float" office:value="79413" calcext:value-type="float">
            <text:p>79413</text:p>
          </table:table-cell>
          <table:table-cell table:style-name="ce2" table:number-columns-repeated="16382"/>
        </table:table-row>
        <table:table-row table:style-name="ro1">
          <table:table-cell office:value-type="float" office:value="398002" calcext:value-type="float">
            <text:p>398002</text:p>
          </table:table-cell>
          <table:table-cell office:value-type="float" office:value="80319" calcext:value-type="float">
            <text:p>80319</text:p>
          </table:table-cell>
          <table:table-cell table:style-name="ce2" table:number-columns-repeated="16382"/>
        </table:table-row>
        <table:table-row table:style-name="ro1">
          <table:table-cell office:value-type="float" office:value="399632" calcext:value-type="float">
            <text:p>399632</text:p>
          </table:table-cell>
          <table:table-cell office:value-type="float" office:value="82277" calcext:value-type="float">
            <text:p>82277</text:p>
          </table:table-cell>
          <table:table-cell table:style-name="ce2" table:number-columns-repeated="16382"/>
        </table:table-row>
        <table:table-row table:style-name="ro1">
          <table:table-cell office:value-type="float" office:value="402903" calcext:value-type="float">
            <text:p>402903</text:p>
          </table:table-cell>
          <table:table-cell office:value-type="float" office:value="86208" calcext:value-type="float">
            <text:p>86208</text:p>
          </table:table-cell>
          <table:table-cell table:style-name="ce2" table:number-columns-repeated="16382"/>
        </table:table-row>
        <table:table-row table:style-name="ro1">
          <table:table-cell office:value-type="float" office:value="403205" calcext:value-type="float">
            <text:p>403205</text:p>
          </table:table-cell>
          <table:table-cell office:value-type="float" office:value="86589" calcext:value-type="float">
            <text:p>86589</text:p>
          </table:table-cell>
          <table:table-cell table:style-name="ce2" table:number-columns-repeated="16382"/>
        </table:table-row>
        <table:table-row table:style-name="ro1">
          <table:table-cell office:value-type="float" office:value="403218" calcext:value-type="float">
            <text:p>403218</text:p>
          </table:table-cell>
          <table:table-cell office:value-type="float" office:value="86606" calcext:value-type="float">
            <text:p>86606</text:p>
          </table:table-cell>
          <table:table-cell table:style-name="ce2" table:number-columns-repeated="16382"/>
        </table:table-row>
        <table:table-row table:style-name="ro1">
          <table:table-cell office:value-type="float" office:value="405165" calcext:value-type="float">
            <text:p>405165</text:p>
          </table:table-cell>
          <table:table-cell office:value-type="float" office:value="88785" calcext:value-type="float">
            <text:p>88785</text:p>
          </table:table-cell>
          <table:table-cell table:style-name="ce2" table:number-columns-repeated="16382"/>
        </table:table-row>
        <table:table-row table:style-name="ro1">
          <table:table-cell office:value-type="float" office:value="405674" calcext:value-type="float">
            <text:p>405674</text:p>
          </table:table-cell>
          <table:table-cell office:value-type="float" office:value="89282" calcext:value-type="float">
            <text:p>89282</text:p>
          </table:table-cell>
          <table:table-cell table:style-name="ce2" table:number-columns-repeated="16382"/>
        </table:table-row>
        <table:table-row table:style-name="ro1">
          <table:table-cell office:value-type="float" office:value="406800" calcext:value-type="float">
            <text:p>406800</text:p>
          </table:table-cell>
          <table:table-cell office:value-type="float" office:value="90088" calcext:value-type="float">
            <text:p>90088</text:p>
          </table:table-cell>
          <table:table-cell table:style-name="ce2" table:number-columns-repeated="16382"/>
        </table:table-row>
        <table:table-row table:style-name="ro1">
          <table:table-cell office:value-type="float" office:value="407301" calcext:value-type="float">
            <text:p>407301</text:p>
          </table:table-cell>
          <table:table-cell office:value-type="float" office:value="90919" calcext:value-type="float">
            <text:p>90919</text:p>
          </table:table-cell>
          <table:table-cell table:style-name="ce2" table:number-columns-repeated="16382"/>
        </table:table-row>
        <table:table-row table:style-name="ro1">
          <table:table-cell office:value-type="float" office:value="411176" calcext:value-type="float">
            <text:p>411176</text:p>
          </table:table-cell>
          <table:table-cell office:value-type="float" office:value="94826" calcext:value-type="float">
            <text:p>94826</text:p>
          </table:table-cell>
          <table:table-cell table:style-name="ce2" table:number-columns-repeated="16382"/>
        </table:table-row>
        <table:table-row table:style-name="ro1">
          <table:table-cell office:value-type="float" office:value="411926" calcext:value-type="float">
            <text:p>411926</text:p>
          </table:table-cell>
          <table:table-cell office:value-type="float" office:value="74499" calcext:value-type="float">
            <text:p>74499</text:p>
          </table:table-cell>
          <table:table-cell table:style-name="ce2" table:number-columns-repeated="16382"/>
        </table:table-row>
        <table:table-row table:style-name="ro1">
          <table:table-cell office:value-type="float" office:value="416454" calcext:value-type="float">
            <text:p>416454</text:p>
          </table:table-cell>
          <table:table-cell office:value-type="float" office:value="99790" calcext:value-type="float">
            <text:p>99790</text:p>
          </table:table-cell>
          <table:table-cell table:style-name="ce2" table:number-columns-repeated="16382"/>
        </table:table-row>
        <table:table-row table:style-name="ro1">
          <table:table-cell office:value-type="float" office:value="418332" calcext:value-type="float">
            <text:p>418332</text:p>
          </table:table-cell>
          <table:table-cell office:value-type="float" office:value="101404" calcext:value-type="float">
            <text:p>101404</text:p>
          </table:table-cell>
          <table:table-cell table:style-name="ce2" table:number-columns-repeated="16382"/>
        </table:table-row>
        <table:table-row table:style-name="ro1">
          <table:table-cell office:value-type="float" office:value="420160" calcext:value-type="float">
            <text:p>420160</text:p>
          </table:table-cell>
          <table:table-cell office:value-type="float" office:value="102136" calcext:value-type="float">
            <text:p>102136</text:p>
          </table:table-cell>
          <table:table-cell table:style-name="ce2" table:number-columns-repeated="16382"/>
        </table:table-row>
        <table:table-row table:style-name="ro1">
          <table:table-cell office:value-type="float" office:value="423090" calcext:value-type="float">
            <text:p>423090</text:p>
          </table:table-cell>
          <table:table-cell office:value-type="float" office:value="102167" calcext:value-type="float">
            <text:p>102167</text:p>
          </table:table-cell>
          <table:table-cell table:style-name="ce2" table:number-columns-repeated="16382"/>
        </table:table-row>
        <table:table-row table:style-name="ro1">
          <table:table-cell office:value-type="float" office:value="426572" calcext:value-type="float">
            <text:p>426572</text:p>
          </table:table-cell>
          <table:table-cell office:value-type="float" office:value="105447" calcext:value-type="float">
            <text:p>105447</text:p>
          </table:table-cell>
          <table:table-cell table:style-name="ce2" table:number-columns-repeated="16382"/>
        </table:table-row>
        <table:table-row table:style-name="ro1">
          <table:table-cell office:value-type="float" office:value="427724" calcext:value-type="float">
            <text:p>427724</text:p>
          </table:table-cell>
          <table:table-cell office:value-type="float" office:value="1002871" calcext:value-type="float">
            <text:p>1002871</text:p>
          </table:table-cell>
          <table:table-cell table:style-name="ce2" table:number-columns-repeated="16382"/>
        </table:table-row>
        <table:table-row table:style-name="ro1">
          <table:table-cell office:value-type="float" office:value="430397" calcext:value-type="float">
            <text:p>430397</text:p>
          </table:table-cell>
          <table:table-cell office:value-type="float" office:value="103298" calcext:value-type="float">
            <text:p>103298</text:p>
          </table:table-cell>
          <table:table-cell table:style-name="ce2" table:number-columns-repeated="16382"/>
        </table:table-row>
        <table:table-row table:style-name="ro1">
          <table:table-cell office:value-type="float" office:value="444377" calcext:value-type="float">
            <text:p>444377</text:p>
          </table:table-cell>
          <table:table-cell office:value-type="float" office:value="120275" calcext:value-type="float">
            <text:p>120275</text:p>
          </table:table-cell>
          <table:table-cell table:style-name="ce2" table:number-columns-repeated="16382"/>
        </table:table-row>
        <table:table-row table:style-name="ro1">
          <table:table-cell office:value-type="float" office:value="445398" calcext:value-type="float">
            <text:p>445398</text:p>
          </table:table-cell>
          <table:table-cell office:value-type="float" office:value="121083" calcext:value-type="float">
            <text:p>121083</text:p>
          </table:table-cell>
          <table:table-cell table:style-name="ce2" table:number-columns-repeated="16382"/>
        </table:table-row>
        <table:table-row table:style-name="ro1">
          <table:table-cell office:value-type="float" office:value="458964" calcext:value-type="float">
            <text:p>458964</text:p>
          </table:table-cell>
          <table:table-cell office:value-type="float" office:value="132196" calcext:value-type="float">
            <text:p>132196</text:p>
          </table:table-cell>
          <table:table-cell table:style-name="ce2" table:number-columns-repeated="16382"/>
        </table:table-row>
        <table:table-row table:style-name="ro1">
          <table:table-cell office:value-type="float" office:value="460646" calcext:value-type="float">
            <text:p>460646</text:p>
          </table:table-cell>
          <table:table-cell office:value-type="float" office:value="133535" calcext:value-type="float">
            <text:p>133535</text:p>
          </table:table-cell>
          <table:table-cell table:style-name="ce2" table:number-columns-repeated="16382"/>
        </table:table-row>
        <table:table-row table:style-name="ro1">
          <table:table-cell office:value-type="float" office:value="461854" calcext:value-type="float">
            <text:p>461854</text:p>
          </table:table-cell>
          <table:table-cell office:value-type="float" office:value="115635" calcext:value-type="float">
            <text:p>115635</text:p>
          </table:table-cell>
          <table:table-cell table:style-name="ce2" table:number-columns-repeated="16382"/>
        </table:table-row>
        <table:table-row table:style-name="ro1">
          <table:table-cell office:value-type="float" office:value="456132" calcext:value-type="float">
            <text:p>456132</text:p>
          </table:table-cell>
          <table:table-cell office:value-type="float" office:value="129841" calcext:value-type="float">
            <text:p>129841</text:p>
          </table:table-cell>
          <table:table-cell table:style-name="ce2" table:number-columns-repeated="16382"/>
        </table:table-row>
        <table:table-row table:style-name="ro1">
          <table:table-cell office:value-type="float" office:value="458416" calcext:value-type="float">
            <text:p>458416</text:p>
          </table:table-cell>
          <table:table-cell office:value-type="float" office:value="131724" calcext:value-type="float">
            <text:p>131724</text:p>
          </table:table-cell>
          <table:table-cell table:style-name="ce2" table:number-columns-repeated="16382"/>
        </table:table-row>
        <table:table-row table:style-name="ro1">
          <table:table-cell office:value-type="float" office:value="459914" calcext:value-type="float">
            <text:p>459914</text:p>
          </table:table-cell>
          <table:table-cell office:value-type="float" office:value="132949" calcext:value-type="float">
            <text:p>132949</text:p>
          </table:table-cell>
          <table:table-cell table:style-name="ce2" table:number-columns-repeated="16382"/>
        </table:table-row>
        <table:table-row table:style-name="ro1">
          <table:table-cell office:value-type="float" office:value="452519" calcext:value-type="float">
            <text:p>452519</text:p>
          </table:table-cell>
          <table:table-cell office:value-type="float" office:value="126813" calcext:value-type="float">
            <text:p>126813</text:p>
          </table:table-cell>
          <table:table-cell table:style-name="ce2" table:number-columns-repeated="16382"/>
        </table:table-row>
        <table:table-row table:style-name="ro1">
          <table:table-cell office:value-type="float" office:value="452519" calcext:value-type="float">
            <text:p>452519</text:p>
          </table:table-cell>
          <table:table-cell office:value-type="float" office:value="126815" calcext:value-type="float">
            <text:p>126815</text:p>
          </table:table-cell>
          <table:table-cell table:style-name="ce2" table:number-columns-repeated="16382"/>
        </table:table-row>
        <table:table-row table:style-name="ro1">
          <table:table-cell office:value-type="float" office:value="453044" calcext:value-type="float">
            <text:p>453044</text:p>
          </table:table-cell>
          <table:table-cell office:value-type="float" office:value="127260" calcext:value-type="float">
            <text:p>127260</text:p>
          </table:table-cell>
          <table:table-cell table:style-name="ce2" table:number-columns-repeated="16382"/>
        </table:table-row>
        <table:table-row table:style-name="ro1">
          <table:table-cell office:value-type="float" office:value="470766" calcext:value-type="float">
            <text:p>470766</text:p>
          </table:table-cell>
          <table:table-cell office:value-type="float" office:value="138455" calcext:value-type="float">
            <text:p>138455</text:p>
          </table:table-cell>
          <table:table-cell table:style-name="ce2" table:number-columns-repeated="16382"/>
        </table:table-row>
        <table:table-row table:style-name="ro1">
          <table:table-cell office:value-type="float" office:value="362558" calcext:value-type="float">
            <text:p>362558</text:p>
          </table:table-cell>
          <table:table-cell office:value-type="float" office:value="24238" calcext:value-type="float">
            <text:p>24238</text:p>
          </table:table-cell>
          <table:table-cell table:style-name="ce2" table:number-columns-repeated="16382"/>
        </table:table-row>
        <table:table-row table:style-name="ro1">
          <table:table-cell office:value-type="float" office:value="362558" calcext:value-type="float">
            <text:p>362558</text:p>
          </table:table-cell>
          <table:table-cell office:value-type="float" office:value="48987" calcext:value-type="float">
            <text:p>48987</text:p>
          </table:table-cell>
          <table:table-cell table:style-name="ce2" table:number-columns-repeated="16382"/>
        </table:table-row>
        <table:table-row table:style-name="ro1">
          <table:table-cell office:value-type="float" office:value="363829" calcext:value-type="float">
            <text:p>363829</text:p>
          </table:table-cell>
          <table:table-cell office:value-type="float" office:value="46486" calcext:value-type="float">
            <text:p>46486</text:p>
          </table:table-cell>
          <table:table-cell table:style-name="ce2" table:number-columns-repeated="16382"/>
        </table:table-row>
        <table:table-row table:style-name="ro1">
          <table:table-cell office:value-type="float" office:value="364959" calcext:value-type="float">
            <text:p>364959</text:p>
          </table:table-cell>
          <table:table-cell office:value-type="float" office:value="29211" calcext:value-type="float">
            <text:p>29211</text:p>
          </table:table-cell>
          <table:table-cell table:style-name="ce2" table:number-columns-repeated="16382"/>
        </table:table-row>
        <table:table-row table:style-name="ro1">
          <table:table-cell office:value-type="float" office:value="368453" calcext:value-type="float">
            <text:p>368453</text:p>
          </table:table-cell>
          <table:table-cell office:value-type="float" office:value="35863" calcext:value-type="float">
            <text:p>35863</text:p>
          </table:table-cell>
          <table:table-cell table:style-name="ce2" table:number-columns-repeated="16382"/>
        </table:table-row>
        <table:table-row table:style-name="ro1">
          <table:table-cell office:value-type="float" office:value="369868" calcext:value-type="float">
            <text:p>369868</text:p>
          </table:table-cell>
          <table:table-cell office:value-type="float" office:value="38498" calcext:value-type="float">
            <text:p>38498</text:p>
          </table:table-cell>
          <table:table-cell table:style-name="ce2" table:number-columns-repeated="16382"/>
        </table:table-row>
        <table:table-row table:style-name="ro1">
          <table:table-cell office:value-type="float" office:value="371273" calcext:value-type="float">
            <text:p>371273</text:p>
          </table:table-cell>
          <table:table-cell office:value-type="float" office:value="41003" calcext:value-type="float">
            <text:p>41003</text:p>
          </table:table-cell>
          <table:table-cell table:style-name="ce2" table:number-columns-repeated="16382"/>
        </table:table-row>
        <table:table-row table:style-name="ro1">
          <table:table-cell office:value-type="float" office:value="375742" calcext:value-type="float">
            <text:p>375742</text:p>
          </table:table-cell>
          <table:table-cell office:value-type="float" office:value="48417" calcext:value-type="float">
            <text:p>48417</text:p>
          </table:table-cell>
          <table:table-cell table:style-name="ce2" table:number-columns-repeated="16382"/>
        </table:table-row>
        <table:table-row table:style-name="ro1">
          <table:table-cell office:value-type="float" office:value="376637" calcext:value-type="float">
            <text:p>376637</text:p>
          </table:table-cell>
          <table:table-cell office:value-type="float" office:value="49952" calcext:value-type="float">
            <text:p>49952</text:p>
          </table:table-cell>
          <table:table-cell table:style-name="ce2" table:number-columns-repeated="16382"/>
        </table:table-row>
        <table:table-row table:style-name="ro1">
          <table:table-cell office:value-type="float" office:value="376843" calcext:value-type="float">
            <text:p>376843</text:p>
          </table:table-cell>
          <table:table-cell office:value-type="float" office:value="61152" calcext:value-type="float">
            <text:p>61152</text:p>
          </table:table-cell>
          <table:table-cell table:style-name="ce2" table:number-columns-repeated="16382"/>
        </table:table-row>
        <table:table-row table:style-name="ro1">
          <table:table-cell office:value-type="float" office:value="378665" calcext:value-type="float">
            <text:p>378665</text:p>
          </table:table-cell>
          <table:table-cell office:value-type="float" office:value="53444" calcext:value-type="float">
            <text:p>53444</text:p>
          </table:table-cell>
          <table:table-cell table:style-name="ce2" table:number-columns-repeated="16382"/>
        </table:table-row>
        <table:table-row table:style-name="ro1">
          <table:table-cell office:value-type="float" office:value="379606" calcext:value-type="float">
            <text:p>379606</text:p>
          </table:table-cell>
          <table:table-cell office:value-type="float" office:value="55133" calcext:value-type="float">
            <text:p>55133</text:p>
          </table:table-cell>
          <table:table-cell table:style-name="ce2" table:number-columns-repeated="16382"/>
        </table:table-row>
        <table:table-row table:style-name="ro1">
          <table:table-cell office:value-type="float" office:value="379760" calcext:value-type="float">
            <text:p>379760</text:p>
          </table:table-cell>
          <table:table-cell office:value-type="float" office:value="55386" calcext:value-type="float">
            <text:p>55386</text:p>
          </table:table-cell>
          <table:table-cell table:style-name="ce2" table:number-columns-repeated="16382"/>
        </table:table-row>
        <table:table-row table:style-name="ro1">
          <table:table-cell office:value-type="float" office:value="379760" calcext:value-type="float">
            <text:p>379760</text:p>
          </table:table-cell>
          <table:table-cell office:value-type="float" office:value="55387" calcext:value-type="float">
            <text:p>55387</text:p>
          </table:table-cell>
          <table:table-cell table:style-name="ce2" table:number-columns-repeated="16382"/>
        </table:table-row>
        <table:table-row table:style-name="ro1">
          <table:table-cell office:value-type="float" office:value="382357" calcext:value-type="float">
            <text:p>382357</text:p>
          </table:table-cell>
          <table:table-cell office:value-type="float" office:value="59507" calcext:value-type="float">
            <text:p>59507</text:p>
          </table:table-cell>
          <table:table-cell table:style-name="ce2" table:number-columns-repeated="16382"/>
        </table:table-row>
        <table:table-row table:style-name="ro1">
          <table:table-cell office:value-type="float" office:value="383179" calcext:value-type="float">
            <text:p>383179</text:p>
          </table:table-cell>
          <table:table-cell office:value-type="float" office:value="60763" calcext:value-type="float">
            <text:p>60763</text:p>
          </table:table-cell>
          <table:table-cell table:style-name="ce2" table:number-columns-repeated="16382"/>
        </table:table-row>
        <table:table-row table:style-name="ro1">
          <table:table-cell office:value-type="float" office:value="383671" calcext:value-type="float">
            <text:p>383671</text:p>
          </table:table-cell>
          <table:table-cell office:value-type="float" office:value="61465" calcext:value-type="float">
            <text:p>61465</text:p>
          </table:table-cell>
          <table:table-cell table:style-name="ce2" table:number-columns-repeated="16382"/>
        </table:table-row>
        <table:table-row table:style-name="ro1">
          <table:table-cell office:value-type="float" office:value="384329" calcext:value-type="float">
            <text:p>384329</text:p>
          </table:table-cell>
          <table:table-cell office:value-type="float" office:value="62405" calcext:value-type="float">
            <text:p>62405</text:p>
          </table:table-cell>
          <table:table-cell table:style-name="ce2" table:number-columns-repeated="16382"/>
        </table:table-row>
        <table:table-row table:style-name="ro1">
          <table:table-cell office:value-type="float" office:value="384367" calcext:value-type="float">
            <text:p>384367</text:p>
          </table:table-cell>
          <table:table-cell office:value-type="float" office:value="62460" calcext:value-type="float">
            <text:p>62460</text:p>
          </table:table-cell>
          <table:table-cell table:style-name="ce2" table:number-columns-repeated="16382"/>
        </table:table-row>
        <table:table-row table:style-name="ro1">
          <table:table-cell office:value-type="float" office:value="386749" calcext:value-type="float">
            <text:p>386749</text:p>
          </table:table-cell>
          <table:table-cell office:value-type="float" office:value="65981" calcext:value-type="float">
            <text:p>65981</text:p>
          </table:table-cell>
          <table:table-cell table:style-name="ce2" table:number-columns-repeated="16382"/>
        </table:table-row>
        <table:table-row table:style-name="ro1">
          <table:table-cell office:value-type="float" office:value="388605" calcext:value-type="float">
            <text:p>388605</text:p>
          </table:table-cell>
          <table:table-cell office:value-type="float" office:value="68617" calcext:value-type="float">
            <text:p>68617</text:p>
          </table:table-cell>
          <table:table-cell table:style-name="ce2" table:number-columns-repeated="16382"/>
        </table:table-row>
        <table:table-row table:style-name="ro1">
          <table:table-cell office:value-type="float" office:value="392669" calcext:value-type="float">
            <text:p>392669</text:p>
          </table:table-cell>
          <table:table-cell office:value-type="float" office:value="73889" calcext:value-type="float">
            <text:p>73889</text:p>
          </table:table-cell>
          <table:table-cell table:style-name="ce2" table:number-columns-repeated="16382"/>
        </table:table-row>
        <table:table-row table:style-name="ro1">
          <table:table-cell office:value-type="float" office:value="392916" calcext:value-type="float">
            <text:p>392916</text:p>
          </table:table-cell>
          <table:table-cell office:value-type="float" office:value="74187" calcext:value-type="float">
            <text:p>74187</text:p>
          </table:table-cell>
          <table:table-cell table:style-name="ce2" table:number-columns-repeated="16382"/>
        </table:table-row>
        <table:table-row table:style-name="ro1">
          <table:table-cell office:value-type="float" office:value="395458" calcext:value-type="float">
            <text:p>395458</text:p>
          </table:table-cell>
          <table:table-cell office:value-type="float" office:value="77290" calcext:value-type="float">
            <text:p>77290</text:p>
          </table:table-cell>
          <table:table-cell table:style-name="ce2" table:number-columns-repeated="16382"/>
        </table:table-row>
        <table:table-row table:style-name="ro1">
          <table:table-cell office:value-type="float" office:value="396840" calcext:value-type="float">
            <text:p>396840</text:p>
          </table:table-cell>
          <table:table-cell office:value-type="float" office:value="78940" calcext:value-type="float">
            <text:p>78940</text:p>
          </table:table-cell>
          <table:table-cell table:style-name="ce2" table:number-columns-repeated="16382"/>
        </table:table-row>
        <table:table-row table:style-name="ro1">
          <table:table-cell office:value-type="float" office:value="397121" calcext:value-type="float">
            <text:p>397121</text:p>
          </table:table-cell>
          <table:table-cell office:value-type="float" office:value="79267" calcext:value-type="float">
            <text:p>79267</text:p>
          </table:table-cell>
          <table:table-cell table:style-name="ce2" table:number-columns-repeated="16382"/>
        </table:table-row>
        <table:table-row table:style-name="ro1">
          <table:table-cell office:value-type="float" office:value="398072" calcext:value-type="float">
            <text:p>398072</text:p>
          </table:table-cell>
          <table:table-cell office:value-type="float" office:value="80394" calcext:value-type="float">
            <text:p>80394</text:p>
          </table:table-cell>
          <table:table-cell table:style-name="ce2" table:number-columns-repeated="16382"/>
        </table:table-row>
        <table:table-row table:style-name="ro1">
          <table:table-cell office:value-type="float" office:value="401981" calcext:value-type="float">
            <text:p>401981</text:p>
          </table:table-cell>
          <table:table-cell office:value-type="float" office:value="85128" calcext:value-type="float">
            <text:p>85128</text:p>
          </table:table-cell>
          <table:table-cell table:style-name="ce2" table:number-columns-repeated="16382"/>
        </table:table-row>
        <table:table-row table:style-name="ro1">
          <table:table-cell office:value-type="float" office:value="402430" calcext:value-type="float">
            <text:p>402430</text:p>
          </table:table-cell>
          <table:table-cell office:value-type="float" office:value="85660" calcext:value-type="float">
            <text:p>85660</text:p>
          </table:table-cell>
          <table:table-cell table:style-name="ce2" table:number-columns-repeated="16382"/>
        </table:table-row>
        <table:table-row table:style-name="ro1">
          <table:table-cell office:value-type="float" office:value="404643" calcext:value-type="float">
            <text:p>404643</text:p>
          </table:table-cell>
          <table:table-cell office:value-type="float" office:value="88242" calcext:value-type="float">
            <text:p>88242</text:p>
          </table:table-cell>
          <table:table-cell table:style-name="ce2" table:number-columns-repeated="16382"/>
        </table:table-row>
        <table:table-row table:style-name="ro1">
          <table:table-cell office:value-type="float" office:value="404835" calcext:value-type="float">
            <text:p>404835</text:p>
          </table:table-cell>
          <table:table-cell office:value-type="float" office:value="88472" calcext:value-type="float">
            <text:p>88472</text:p>
          </table:table-cell>
          <table:table-cell table:style-name="ce2" table:number-columns-repeated="16382"/>
        </table:table-row>
        <table:table-row table:style-name="ro1">
          <table:table-cell office:value-type="float" office:value="406396" calcext:value-type="float">
            <text:p>406396</text:p>
          </table:table-cell>
          <table:table-cell office:value-type="float" office:value="89980" calcext:value-type="float">
            <text:p>89980</text:p>
          </table:table-cell>
          <table:table-cell table:style-name="ce2" table:number-columns-repeated="16382"/>
        </table:table-row>
        <table:table-row table:style-name="ro1">
          <table:table-cell office:value-type="float" office:value="410801" calcext:value-type="float">
            <text:p>410801</text:p>
          </table:table-cell>
          <table:table-cell office:value-type="float" office:value="94453" calcext:value-type="float">
            <text:p>94453</text:p>
          </table:table-cell>
          <table:table-cell table:style-name="ce2" table:number-columns-repeated="16382"/>
        </table:table-row>
        <table:table-row table:style-name="ro1">
          <table:table-cell office:value-type="float" office:value="410801" calcext:value-type="float">
            <text:p>410801</text:p>
          </table:table-cell>
          <table:table-cell office:value-type="float" office:value="94473" calcext:value-type="float">
            <text:p>94473</text:p>
          </table:table-cell>
          <table:table-cell table:style-name="ce2" table:number-columns-repeated="16382"/>
        </table:table-row>
        <table:table-row table:style-name="ro1">
          <table:table-cell office:value-type="float" office:value="414861" calcext:value-type="float">
            <text:p>414861</text:p>
          </table:table-cell>
          <table:table-cell office:value-type="float" office:value="95878" calcext:value-type="float">
            <text:p>95878</text:p>
          </table:table-cell>
          <table:table-cell table:style-name="ce2" table:number-columns-repeated="16382"/>
        </table:table-row>
        <table:table-row table:style-name="ro1">
          <table:table-cell office:value-type="float" office:value="420160" calcext:value-type="float">
            <text:p>420160</text:p>
          </table:table-cell>
          <table:table-cell office:value-type="float" office:value="102861" calcext:value-type="float">
            <text:p>102861</text:p>
          </table:table-cell>
          <table:table-cell table:style-name="ce2" table:number-columns-repeated="16382"/>
        </table:table-row>
        <table:table-row table:style-name="ro1">
          <table:table-cell office:value-type="float" office:value="421085" calcext:value-type="float">
            <text:p>421085</text:p>
          </table:table-cell>
          <table:table-cell office:value-type="float" office:value="87425" calcext:value-type="float">
            <text:p>87425</text:p>
          </table:table-cell>
          <table:table-cell table:style-name="ce2" table:number-columns-repeated="16382"/>
        </table:table-row>
        <table:table-row table:style-name="ro1">
          <table:table-cell office:value-type="float" office:value="423090" calcext:value-type="float">
            <text:p>423090</text:p>
          </table:table-cell>
          <table:table-cell office:value-type="float" office:value="103923" calcext:value-type="float">
            <text:p>103923</text:p>
          </table:table-cell>
          <table:table-cell table:style-name="ce2" table:number-columns-repeated="16382"/>
        </table:table-row>
        <table:table-row table:style-name="ro1">
          <table:table-cell office:value-type="float" office:value="429301" calcext:value-type="float">
            <text:p>429301</text:p>
          </table:table-cell>
          <table:table-cell office:value-type="float" office:value="107864" calcext:value-type="float">
            <text:p>107864</text:p>
          </table:table-cell>
          <table:table-cell table:style-name="ce2" table:number-columns-repeated="16382"/>
        </table:table-row>
        <table:table-row table:style-name="ro1">
          <table:table-cell office:value-type="float" office:value="429847" calcext:value-type="float">
            <text:p>429847</text:p>
          </table:table-cell>
          <table:table-cell office:value-type="float" office:value="108342" calcext:value-type="float">
            <text:p>108342</text:p>
          </table:table-cell>
          <table:table-cell table:style-name="ce2" table:number-columns-repeated="16382"/>
        </table:table-row>
        <table:table-row table:style-name="ro1">
          <table:table-cell office:value-type="float" office:value="429968" calcext:value-type="float">
            <text:p>429968</text:p>
          </table:table-cell>
          <table:table-cell office:value-type="float" office:value="108442" calcext:value-type="float">
            <text:p>108442</text:p>
          </table:table-cell>
          <table:table-cell table:style-name="ce2" table:number-columns-repeated="16382"/>
        </table:table-row>
        <table:table-row table:style-name="ro1">
          <table:table-cell office:value-type="float" office:value="430540" calcext:value-type="float">
            <text:p>430540</text:p>
          </table:table-cell>
          <table:table-cell office:value-type="float" office:value="73888" calcext:value-type="float">
            <text:p>73888</text:p>
          </table:table-cell>
          <table:table-cell table:style-name="ce2" table:number-columns-repeated="16382"/>
        </table:table-row>
        <table:table-row table:style-name="ro1">
          <table:table-cell office:value-type="float" office:value="434252" calcext:value-type="float">
            <text:p>434252</text:p>
          </table:table-cell>
          <table:table-cell office:value-type="float" office:value="111878" calcext:value-type="float">
            <text:p>111878</text:p>
          </table:table-cell>
          <table:table-cell table:style-name="ce2" table:number-columns-repeated="16382"/>
        </table:table-row>
        <table:table-row table:style-name="ro1">
          <table:table-cell office:value-type="float" office:value="440287" calcext:value-type="float">
            <text:p>440287</text:p>
          </table:table-cell>
          <table:table-cell office:value-type="float" office:value="116991" calcext:value-type="float">
            <text:p>116991</text:p>
          </table:table-cell>
          <table:table-cell table:style-name="ce2" table:number-columns-repeated="16382"/>
        </table:table-row>
        <table:table-row table:style-name="ro1">
          <table:table-cell office:value-type="float" office:value="440611" calcext:value-type="float">
            <text:p>440611</text:p>
          </table:table-cell>
          <table:table-cell office:value-type="float" office:value="117255" calcext:value-type="float">
            <text:p>117255</text:p>
          </table:table-cell>
          <table:table-cell table:style-name="ce2" table:number-columns-repeated="16382"/>
        </table:table-row>
        <table:table-row table:style-name="ro1">
          <table:table-cell office:value-type="float" office:value="441482" calcext:value-type="float">
            <text:p>441482</text:p>
          </table:table-cell>
          <table:table-cell office:value-type="float" office:value="117984" calcext:value-type="float">
            <text:p>117984</text:p>
          </table:table-cell>
          <table:table-cell table:style-name="ce2" table:number-columns-repeated="16382"/>
        </table:table-row>
        <table:table-row table:style-name="ro1">
          <table:table-cell office:value-type="float" office:value="445559" calcext:value-type="float">
            <text:p>445559</text:p>
          </table:table-cell>
          <table:table-cell office:value-type="float" office:value="121214" calcext:value-type="float">
            <text:p>121214</text:p>
          </table:table-cell>
          <table:table-cell table:style-name="ce2" table:number-columns-repeated="16382"/>
        </table:table-row>
        <table:table-row table:style-name="ro1">
          <table:table-cell office:value-type="float" office:value="465338" calcext:value-type="float">
            <text:p>465338</text:p>
          </table:table-cell>
          <table:table-cell office:value-type="float" office:value="130517" calcext:value-type="float">
            <text:p>130517</text:p>
          </table:table-cell>
          <table:table-cell table:style-name="ce2" table:number-columns-repeated="16382"/>
        </table:table-row>
        <table:table-row table:style-name="ro1">
          <table:table-cell office:value-type="float" office:value="365977" calcext:value-type="float">
            <text:p>365977</text:p>
          </table:table-cell>
          <table:table-cell office:value-type="float" office:value="85258" calcext:value-type="float">
            <text:p>85258</text:p>
          </table:table-cell>
          <table:table-cell table:style-name="ce2" table:number-columns-repeated="16382"/>
        </table:table-row>
        <table:table-row table:style-name="ro1">
          <table:table-cell office:value-type="float" office:value="366057" calcext:value-type="float">
            <text:p>366057</text:p>
          </table:table-cell>
          <table:table-cell office:value-type="float" office:value="31376" calcext:value-type="float">
            <text:p>31376</text:p>
          </table:table-cell>
          <table:table-cell table:style-name="ce2" table:number-columns-repeated="16382"/>
        </table:table-row>
        <table:table-row table:style-name="ro1">
          <table:table-cell office:value-type="float" office:value="366343" calcext:value-type="float">
            <text:p>366343</text:p>
          </table:table-cell>
          <table:table-cell office:value-type="float" office:value="31945" calcext:value-type="float">
            <text:p>31945</text:p>
          </table:table-cell>
          <table:table-cell table:style-name="ce2" table:number-columns-repeated="16382"/>
        </table:table-row>
        <table:table-row table:style-name="ro1">
          <table:table-cell office:value-type="float" office:value="367627" calcext:value-type="float">
            <text:p>367627</text:p>
          </table:table-cell>
          <table:table-cell office:value-type="float" office:value="34299" calcext:value-type="float">
            <text:p>34299</text:p>
          </table:table-cell>
          <table:table-cell table:style-name="ce2" table:number-columns-repeated="16382"/>
        </table:table-row>
        <table:table-row table:style-name="ro1">
          <table:table-cell office:value-type="float" office:value="367901" calcext:value-type="float">
            <text:p>367901</text:p>
          </table:table-cell>
          <table:table-cell office:value-type="float" office:value="34825" calcext:value-type="float">
            <text:p>34825</text:p>
          </table:table-cell>
          <table:table-cell table:style-name="ce2" table:number-columns-repeated="16382"/>
        </table:table-row>
        <table:table-row table:style-name="ro1">
          <table:table-cell office:value-type="float" office:value="367901" calcext:value-type="float">
            <text:p>367901</text:p>
          </table:table-cell>
          <table:table-cell office:value-type="float" office:value="56128" calcext:value-type="float">
            <text:p>56128</text:p>
          </table:table-cell>
          <table:table-cell table:style-name="ce2" table:number-columns-repeated="16382"/>
        </table:table-row>
        <table:table-row table:style-name="ro1">
          <table:table-cell office:value-type="float" office:value="369664" calcext:value-type="float">
            <text:p>369664</text:p>
          </table:table-cell>
          <table:table-cell office:value-type="float" office:value="38066" calcext:value-type="float">
            <text:p>38066</text:p>
          </table:table-cell>
          <table:table-cell table:style-name="ce2" table:number-columns-repeated="16382"/>
        </table:table-row>
        <table:table-row table:style-name="ro1">
          <table:table-cell office:value-type="float" office:value="371940" calcext:value-type="float">
            <text:p>371940</text:p>
          </table:table-cell>
          <table:table-cell office:value-type="float" office:value="42924" calcext:value-type="float">
            <text:p>42924</text:p>
          </table:table-cell>
          <table:table-cell table:style-name="ce2" table:number-columns-repeated="16382"/>
        </table:table-row>
        <table:table-row table:style-name="ro1">
          <table:table-cell office:value-type="float" office:value="379659" calcext:value-type="float">
            <text:p>379659</text:p>
          </table:table-cell>
          <table:table-cell office:value-type="float" office:value="68417" calcext:value-type="float">
            <text:p>68417</text:p>
          </table:table-cell>
          <table:table-cell table:style-name="ce2" table:number-columns-repeated="16382"/>
        </table:table-row>
        <table:table-row table:style-name="ro1">
          <table:table-cell office:value-type="float" office:value="380085" calcext:value-type="float">
            <text:p>380085</text:p>
          </table:table-cell>
          <table:table-cell office:value-type="float" office:value="55931" calcext:value-type="float">
            <text:p>55931</text:p>
          </table:table-cell>
          <table:table-cell table:style-name="ce2" table:number-columns-repeated="16382"/>
        </table:table-row>
        <table:table-row table:style-name="ro1">
          <table:table-cell office:value-type="float" office:value="380372" calcext:value-type="float">
            <text:p>380372</text:p>
          </table:table-cell>
          <table:table-cell office:value-type="float" office:value="56382" calcext:value-type="float">
            <text:p>56382</text:p>
          </table:table-cell>
          <table:table-cell table:style-name="ce2" table:number-columns-repeated="16382"/>
        </table:table-row>
        <table:table-row table:style-name="ro1">
          <table:table-cell office:value-type="float" office:value="380839" calcext:value-type="float">
            <text:p>380839</text:p>
          </table:table-cell>
          <table:table-cell office:value-type="float" office:value="57117" calcext:value-type="float">
            <text:p>57117</text:p>
          </table:table-cell>
          <table:table-cell table:style-name="ce2" table:number-columns-repeated="16382"/>
        </table:table-row>
        <table:table-row table:style-name="ro1">
          <table:table-cell office:value-type="float" office:value="383074" calcext:value-type="float">
            <text:p>383074</text:p>
          </table:table-cell>
          <table:table-cell office:value-type="float" office:value="60620" calcext:value-type="float">
            <text:p>60620</text:p>
          </table:table-cell>
          <table:table-cell table:style-name="ce2" table:number-columns-repeated="16382"/>
        </table:table-row>
        <table:table-row table:style-name="ro1">
          <table:table-cell office:value-type="float" office:value="383623" calcext:value-type="float">
            <text:p>383623</text:p>
          </table:table-cell>
          <table:table-cell office:value-type="float" office:value="61397" calcext:value-type="float">
            <text:p>61397</text:p>
          </table:table-cell>
          <table:table-cell table:style-name="ce2" table:number-columns-repeated="16382"/>
        </table:table-row>
        <table:table-row table:style-name="ro1">
          <table:table-cell office:value-type="float" office:value="387235" calcext:value-type="float">
            <text:p>387235</text:p>
          </table:table-cell>
          <table:table-cell office:value-type="float" office:value="66679" calcext:value-type="float">
            <text:p>66679</text:p>
          </table:table-cell>
          <table:table-cell table:style-name="ce2" table:number-columns-repeated="16382"/>
        </table:table-row>
        <table:table-row table:style-name="ro1">
          <table:table-cell office:value-type="float" office:value="388267" calcext:value-type="float">
            <text:p>388267</text:p>
          </table:table-cell>
          <table:table-cell office:value-type="float" office:value="68176" calcext:value-type="float">
            <text:p>68176</text:p>
          </table:table-cell>
          <table:table-cell table:style-name="ce2" table:number-columns-repeated="16382"/>
        </table:table-row>
        <table:table-row table:style-name="ro1">
          <table:table-cell office:value-type="float" office:value="388579" calcext:value-type="float">
            <text:p>388579</text:p>
          </table:table-cell>
          <table:table-cell office:value-type="float" office:value="68585" calcext:value-type="float">
            <text:p>68585</text:p>
          </table:table-cell>
          <table:table-cell table:style-name="ce2" table:number-columns-repeated="16382"/>
        </table:table-row>
        <table:table-row table:style-name="ro1">
          <table:table-cell office:value-type="float" office:value="391193" calcext:value-type="float">
            <text:p>391193</text:p>
          </table:table-cell>
          <table:table-cell office:value-type="float" office:value="71998" calcext:value-type="float">
            <text:p>71998</text:p>
          </table:table-cell>
          <table:table-cell table:style-name="ce2" table:number-columns-repeated="16382"/>
        </table:table-row>
        <table:table-row table:style-name="ro1">
          <table:table-cell office:value-type="float" office:value="392641" calcext:value-type="float">
            <text:p>392641</text:p>
          </table:table-cell>
          <table:table-cell office:value-type="float" office:value="73857" calcext:value-type="float">
            <text:p>73857</text:p>
          </table:table-cell>
          <table:table-cell table:style-name="ce2" table:number-columns-repeated="16382"/>
        </table:table-row>
        <table:table-row table:style-name="ro1">
          <table:table-cell office:value-type="float" office:value="396221" calcext:value-type="float">
            <text:p>396221</text:p>
          </table:table-cell>
          <table:table-cell office:value-type="float" office:value="78209" calcext:value-type="float">
            <text:p>78209</text:p>
          </table:table-cell>
          <table:table-cell table:style-name="ce2" table:number-columns-repeated="16382"/>
        </table:table-row>
        <table:table-row table:style-name="ro1">
          <table:table-cell office:value-type="float" office:value="399632" calcext:value-type="float">
            <text:p>399632</text:p>
          </table:table-cell>
          <table:table-cell office:value-type="float" office:value="82278" calcext:value-type="float">
            <text:p>82278</text:p>
          </table:table-cell>
          <table:table-cell table:style-name="ce2" table:number-columns-repeated="16382"/>
        </table:table-row>
        <table:table-row table:style-name="ro1">
          <table:table-cell office:value-type="float" office:value="401586" calcext:value-type="float">
            <text:p>401586</text:p>
          </table:table-cell>
          <table:table-cell office:value-type="float" office:value="84642" calcext:value-type="float">
            <text:p>84642</text:p>
          </table:table-cell>
          <table:table-cell table:style-name="ce2" table:number-columns-repeated="16382"/>
        </table:table-row>
        <table:table-row table:style-name="ro1">
          <table:table-cell office:value-type="float" office:value="402233" calcext:value-type="float">
            <text:p>402233</text:p>
          </table:table-cell>
          <table:table-cell office:value-type="float" office:value="85428" calcext:value-type="float">
            <text:p>85428</text:p>
          </table:table-cell>
          <table:table-cell table:style-name="ce2" table:number-columns-repeated="16382"/>
        </table:table-row>
        <table:table-row table:style-name="ro1">
          <table:table-cell office:value-type="float" office:value="403356" calcext:value-type="float">
            <text:p>403356</text:p>
          </table:table-cell>
          <table:table-cell office:value-type="float" office:value="86785" calcext:value-type="float">
            <text:p>86785</text:p>
          </table:table-cell>
          <table:table-cell table:style-name="ce2" table:number-columns-repeated="16382"/>
        </table:table-row>
        <table:table-row table:style-name="ro1">
          <table:table-cell office:value-type="float" office:value="403562" calcext:value-type="float">
            <text:p>403562</text:p>
          </table:table-cell>
          <table:table-cell office:value-type="float" office:value="87061" calcext:value-type="float">
            <text:p>87061</text:p>
          </table:table-cell>
          <table:table-cell table:style-name="ce2" table:number-columns-repeated="16382"/>
        </table:table-row>
        <table:table-row table:style-name="ro1">
          <table:table-cell office:value-type="float" office:value="403837" calcext:value-type="float">
            <text:p>403837</text:p>
          </table:table-cell>
          <table:table-cell office:value-type="float" office:value="87386" calcext:value-type="float">
            <text:p>87386</text:p>
          </table:table-cell>
          <table:table-cell table:style-name="ce2" table:number-columns-repeated="16382"/>
        </table:table-row>
        <table:table-row table:style-name="ro1">
          <table:table-cell office:value-type="float" office:value="407053" calcext:value-type="float">
            <text:p>407053</text:p>
          </table:table-cell>
          <table:table-cell office:value-type="float" office:value="90627" calcext:value-type="float">
            <text:p>90627</text:p>
          </table:table-cell>
          <table:table-cell table:style-name="ce2" table:number-columns-repeated="16382"/>
        </table:table-row>
        <table:table-row table:style-name="ro1">
          <table:table-cell office:value-type="float" office:value="407395" calcext:value-type="float">
            <text:p>407395</text:p>
          </table:table-cell>
          <table:table-cell office:value-type="float" office:value="91028" calcext:value-type="float">
            <text:p>91028</text:p>
          </table:table-cell>
          <table:table-cell table:style-name="ce2" table:number-columns-repeated="16382"/>
        </table:table-row>
        <table:table-row table:style-name="ro1">
          <table:table-cell office:value-type="float" office:value="408664" calcext:value-type="float">
            <text:p>408664</text:p>
          </table:table-cell>
          <table:table-cell office:value-type="float" office:value="92247" calcext:value-type="float">
            <text:p>92247</text:p>
          </table:table-cell>
          <table:table-cell table:style-name="ce2" table:number-columns-repeated="16382"/>
        </table:table-row>
        <table:table-row table:style-name="ro1">
          <table:table-cell office:value-type="float" office:value="414861" calcext:value-type="float">
            <text:p>414861</text:p>
          </table:table-cell>
          <table:table-cell office:value-type="float" office:value="95880" calcext:value-type="float">
            <text:p>95880</text:p>
          </table:table-cell>
          <table:table-cell table:style-name="ce2" table:number-columns-repeated="16382"/>
        </table:table-row>
        <table:table-row table:style-name="ro1">
          <table:table-cell office:value-type="float" office:value="417100" calcext:value-type="float">
            <text:p>417100</text:p>
          </table:table-cell>
          <table:table-cell office:value-type="float" office:value="100366" calcext:value-type="float">
            <text:p>100366</text:p>
          </table:table-cell>
          <table:table-cell table:style-name="ce2" table:number-columns-repeated="16382"/>
        </table:table-row>
        <table:table-row table:style-name="ro1">
          <table:table-cell office:value-type="float" office:value="417269" calcext:value-type="float">
            <text:p>417269</text:p>
          </table:table-cell>
          <table:table-cell office:value-type="float" office:value="100512" calcext:value-type="float">
            <text:p>100512</text:p>
          </table:table-cell>
          <table:table-cell table:style-name="ce2" table:number-columns-repeated="16382"/>
        </table:table-row>
        <table:table-row table:style-name="ro1">
          <table:table-cell office:value-type="float" office:value="417899" calcext:value-type="float">
            <text:p>417899</text:p>
          </table:table-cell>
          <table:table-cell office:value-type="float" office:value="79866" calcext:value-type="float">
            <text:p>79866</text:p>
          </table:table-cell>
          <table:table-cell table:style-name="ce2" table:number-columns-repeated="16382"/>
        </table:table-row>
        <table:table-row table:style-name="ro1">
          <table:table-cell office:value-type="float" office:value="420127" calcext:value-type="float">
            <text:p>420127</text:p>
          </table:table-cell>
          <table:table-cell office:value-type="float" office:value="102832" calcext:value-type="float">
            <text:p>102832</text:p>
          </table:table-cell>
          <table:table-cell table:style-name="ce2" table:number-columns-repeated="16382"/>
        </table:table-row>
        <table:table-row table:style-name="ro1">
          <table:table-cell office:value-type="float" office:value="422748" calcext:value-type="float">
            <text:p>422748</text:p>
          </table:table-cell>
          <table:table-cell office:value-type="float" office:value="103867" calcext:value-type="float">
            <text:p>103867</text:p>
          </table:table-cell>
          <table:table-cell table:style-name="ce2" table:number-columns-repeated="16382"/>
        </table:table-row>
        <table:table-row table:style-name="ro1">
          <table:table-cell office:value-type="float" office:value="425183" calcext:value-type="float">
            <text:p>425183</text:p>
          </table:table-cell>
          <table:table-cell office:value-type="float" office:value="104239" calcext:value-type="float">
            <text:p>104239</text:p>
          </table:table-cell>
          <table:table-cell table:style-name="ce2" table:number-columns-repeated="16382"/>
        </table:table-row>
        <table:table-row table:style-name="ro1">
          <table:table-cell office:value-type="float" office:value="425327" calcext:value-type="float">
            <text:p>425327</text:p>
          </table:table-cell>
          <table:table-cell office:value-type="float" office:value="104341" calcext:value-type="float">
            <text:p>104341</text:p>
          </table:table-cell>
          <table:table-cell table:style-name="ce2" table:number-columns-repeated="16382"/>
        </table:table-row>
        <table:table-row table:style-name="ro1">
          <table:table-cell office:value-type="float" office:value="425416" calcext:value-type="float">
            <text:p>425416</text:p>
          </table:table-cell>
          <table:table-cell office:value-type="float" office:value="101408" calcext:value-type="float">
            <text:p>101408</text:p>
          </table:table-cell>
          <table:table-cell table:style-name="ce2" table:number-columns-repeated="16382"/>
        </table:table-row>
        <table:table-row table:style-name="ro1">
          <table:table-cell office:value-type="float" office:value="425696" calcext:value-type="float">
            <text:p>425696</text:p>
          </table:table-cell>
          <table:table-cell office:value-type="float" office:value="104658" calcext:value-type="float">
            <text:p>104658</text:p>
          </table:table-cell>
          <table:table-cell table:style-name="ce2" table:number-columns-repeated="16382"/>
        </table:table-row>
        <table:table-row table:style-name="ro1">
          <table:table-cell office:value-type="float" office:value="438652" calcext:value-type="float">
            <text:p>438652</text:p>
          </table:table-cell>
          <table:table-cell office:value-type="float" office:value="115654" calcext:value-type="float">
            <text:p>115654</text:p>
          </table:table-cell>
          <table:table-cell table:style-name="ce2" table:number-columns-repeated="16382"/>
        </table:table-row>
        <table:table-row table:style-name="ro1">
          <table:table-cell office:value-type="float" office:value="441434" calcext:value-type="float">
            <text:p>441434</text:p>
          </table:table-cell>
          <table:table-cell office:value-type="float" office:value="116550" calcext:value-type="float">
            <text:p>116550</text:p>
          </table:table-cell>
          <table:table-cell table:style-name="ce2" table:number-columns-repeated="16382"/>
        </table:table-row>
        <table:table-row table:style-name="ro1">
          <table:table-cell office:value-type="float" office:value="444970" calcext:value-type="float">
            <text:p>444970</text:p>
          </table:table-cell>
          <table:table-cell office:value-type="float" office:value="85277" calcext:value-type="float">
            <text:p>85277</text:p>
          </table:table-cell>
          <table:table-cell table:style-name="ce2" table:number-columns-repeated="16382"/>
        </table:table-row>
        <table:table-row table:style-name="ro1">
          <table:table-cell office:value-type="float" office:value="461854" calcext:value-type="float">
            <text:p>461854</text:p>
          </table:table-cell>
          <table:table-cell office:value-type="float" office:value="121492" calcext:value-type="float">
            <text:p>121492</text:p>
          </table:table-cell>
          <table:table-cell table:style-name="ce2" table:number-columns-repeated="16382"/>
        </table:table-row>
        <table:table-row table:style-name="ro1">
          <table:table-cell office:value-type="float" office:value="457629" calcext:value-type="float">
            <text:p>457629</text:p>
          </table:table-cell>
          <table:table-cell office:value-type="float" office:value="131079" calcext:value-type="float">
            <text:p>131079</text:p>
          </table:table-cell>
          <table:table-cell table:style-name="ce2" table:number-columns-repeated="16382"/>
        </table:table-row>
        <table:table-row table:style-name="ro1">
          <table:table-cell office:value-type="float" office:value="453290" calcext:value-type="float">
            <text:p>453290</text:p>
          </table:table-cell>
          <table:table-cell office:value-type="float" office:value="127455" calcext:value-type="float">
            <text:p>127455</text:p>
          </table:table-cell>
          <table:table-cell table:style-name="ce2" table:number-columns-repeated="16382"/>
        </table:table-row>
        <table:table-row table:style-name="ro1">
          <table:table-cell office:value-type="float" office:value="448247" calcext:value-type="float">
            <text:p>448247</text:p>
          </table:table-cell>
          <table:table-cell office:value-type="float" office:value="123346" calcext:value-type="float">
            <text:p>123346</text:p>
          </table:table-cell>
          <table:table-cell table:style-name="ce2" table:number-columns-repeated="16382"/>
        </table:table-row>
        <table:table-row table:style-name="ro1">
          <table:table-cell office:value-type="float" office:value="354355" calcext:value-type="float">
            <text:p>354355</text:p>
          </table:table-cell>
          <table:table-cell office:value-type="float" office:value="6239" calcext:value-type="float">
            <text:p>6239</text:p>
          </table:table-cell>
          <table:table-cell table:style-name="ce2" table:number-columns-repeated="16382"/>
        </table:table-row>
        <table:table-row table:style-name="ro1">
          <table:table-cell office:value-type="float" office:value="356277" calcext:value-type="float">
            <text:p>356277</text:p>
          </table:table-cell>
          <table:table-cell office:value-type="float" office:value="10586" calcext:value-type="float">
            <text:p>10586</text:p>
          </table:table-cell>
          <table:table-cell table:style-name="ce2" table:number-columns-repeated="16382"/>
        </table:table-row>
        <table:table-row table:style-name="ro1">
          <table:table-cell office:value-type="float" office:value="359330" calcext:value-type="float">
            <text:p>359330</text:p>
          </table:table-cell>
          <table:table-cell office:value-type="float" office:value="17525" calcext:value-type="float">
            <text:p>17525</text:p>
          </table:table-cell>
          <table:table-cell table:style-name="ce2" table:number-columns-repeated="16382"/>
        </table:table-row>
        <table:table-row table:style-name="ro1">
          <table:table-cell office:value-type="float" office:value="365433" calcext:value-type="float">
            <text:p>365433</text:p>
          </table:table-cell>
          <table:table-cell office:value-type="float" office:value="30131" calcext:value-type="float">
            <text:p>30131</text:p>
          </table:table-cell>
          <table:table-cell table:style-name="ce2" table:number-columns-repeated="16382"/>
        </table:table-row>
        <table:table-row table:style-name="ro1">
          <table:table-cell office:value-type="float" office:value="365451" calcext:value-type="float">
            <text:p>365451</text:p>
          </table:table-cell>
          <table:table-cell office:value-type="float" office:value="46541" calcext:value-type="float">
            <text:p>46541</text:p>
          </table:table-cell>
          <table:table-cell table:style-name="ce2" table:number-columns-repeated="16382"/>
        </table:table-row>
        <table:table-row table:style-name="ro1">
          <table:table-cell office:value-type="float" office:value="367619" calcext:value-type="float">
            <text:p>367619</text:p>
          </table:table-cell>
          <table:table-cell office:value-type="float" office:value="34284" calcext:value-type="float">
            <text:p>34284</text:p>
          </table:table-cell>
          <table:table-cell table:style-name="ce2" table:number-columns-repeated="16382"/>
        </table:table-row>
        <table:table-row table:style-name="ro1">
          <table:table-cell office:value-type="float" office:value="367901" calcext:value-type="float">
            <text:p>367901</text:p>
          </table:table-cell>
          <table:table-cell office:value-type="float" office:value="55076" calcext:value-type="float">
            <text:p>55076</text:p>
          </table:table-cell>
          <table:table-cell table:style-name="ce2" table:number-columns-repeated="16382"/>
        </table:table-row>
        <table:table-row table:style-name="ro1">
          <table:table-cell office:value-type="float" office:value="368453" calcext:value-type="float">
            <text:p>368453</text:p>
          </table:table-cell>
          <table:table-cell office:value-type="float" office:value="35862" calcext:value-type="float">
            <text:p>35862</text:p>
          </table:table-cell>
          <table:table-cell table:style-name="ce2" table:number-columns-repeated="16382"/>
        </table:table-row>
        <table:table-row table:style-name="ro1">
          <table:table-cell office:value-type="float" office:value="370685" calcext:value-type="float">
            <text:p>370685</text:p>
          </table:table-cell>
          <table:table-cell office:value-type="float" office:value="39981" calcext:value-type="float">
            <text:p>39981</text:p>
          </table:table-cell>
          <table:table-cell table:style-name="ce2" table:number-columns-repeated="16382"/>
        </table:table-row>
        <table:table-row table:style-name="ro1">
          <table:table-cell office:value-type="float" office:value="371505" calcext:value-type="float">
            <text:p>371505</text:p>
          </table:table-cell>
          <table:table-cell office:value-type="float" office:value="81239" calcext:value-type="float">
            <text:p>81239</text:p>
          </table:table-cell>
          <table:table-cell table:style-name="ce2" table:number-columns-repeated="16382"/>
        </table:table-row>
        <table:table-row table:style-name="ro1">
          <table:table-cell office:value-type="float" office:value="373569" calcext:value-type="float">
            <text:p>373569</text:p>
          </table:table-cell>
          <table:table-cell office:value-type="float" office:value="44839" calcext:value-type="float">
            <text:p>44839</text:p>
          </table:table-cell>
          <table:table-cell table:style-name="ce2" table:number-columns-repeated="16382"/>
        </table:table-row>
        <table:table-row table:style-name="ro1">
          <table:table-cell office:value-type="float" office:value="376128" calcext:value-type="float">
            <text:p>376128</text:p>
          </table:table-cell>
          <table:table-cell office:value-type="float" office:value="49090" calcext:value-type="float">
            <text:p>49090</text:p>
          </table:table-cell>
          <table:table-cell table:style-name="ce2" table:number-columns-repeated="16382"/>
        </table:table-row>
        <table:table-row table:style-name="ro1">
          <table:table-cell office:value-type="float" office:value="380437" calcext:value-type="float">
            <text:p>380437</text:p>
          </table:table-cell>
          <table:table-cell office:value-type="float" office:value="56476" calcext:value-type="float">
            <text:p>56476</text:p>
          </table:table-cell>
          <table:table-cell table:style-name="ce2" table:number-columns-repeated="16382"/>
        </table:table-row>
        <table:table-row table:style-name="ro1">
          <table:table-cell office:value-type="float" office:value="383074" calcext:value-type="float">
            <text:p>383074</text:p>
          </table:table-cell>
          <table:table-cell office:value-type="float" office:value="60618" calcext:value-type="float">
            <text:p>60618</text:p>
          </table:table-cell>
          <table:table-cell table:style-name="ce2" table:number-columns-repeated="16382"/>
        </table:table-row>
        <table:table-row table:style-name="ro1">
          <table:table-cell office:value-type="float" office:value="393019" calcext:value-type="float">
            <text:p>393019</text:p>
          </table:table-cell>
          <table:table-cell office:value-type="float" office:value="74312" calcext:value-type="float">
            <text:p>74312</text:p>
          </table:table-cell>
          <table:table-cell table:style-name="ce2" table:number-columns-repeated="16382"/>
        </table:table-row>
        <table:table-row table:style-name="ro1">
          <table:table-cell office:value-type="float" office:value="394584" calcext:value-type="float">
            <text:p>394584</text:p>
          </table:table-cell>
          <table:table-cell office:value-type="float" office:value="76268" calcext:value-type="float">
            <text:p>76268</text:p>
          </table:table-cell>
          <table:table-cell table:style-name="ce2" table:number-columns-repeated="16382"/>
        </table:table-row>
        <table:table-row table:style-name="ro1">
          <table:table-cell office:value-type="float" office:value="398411" calcext:value-type="float">
            <text:p>398411</text:p>
          </table:table-cell>
          <table:table-cell office:value-type="float" office:value="80839" calcext:value-type="float">
            <text:p>80839</text:p>
          </table:table-cell>
          <table:table-cell table:style-name="ce2" table:number-columns-repeated="16382"/>
        </table:table-row>
        <table:table-row table:style-name="ro1">
          <table:table-cell office:value-type="float" office:value="400628" calcext:value-type="float">
            <text:p>400628</text:p>
          </table:table-cell>
          <table:table-cell office:value-type="float" office:value="83496" calcext:value-type="float">
            <text:p>83496</text:p>
          </table:table-cell>
          <table:table-cell table:style-name="ce2" table:number-columns-repeated="16382"/>
        </table:table-row>
        <table:table-row table:style-name="ro1">
          <table:table-cell office:value-type="float" office:value="401217" calcext:value-type="float">
            <text:p>401217</text:p>
          </table:table-cell>
          <table:table-cell office:value-type="float" office:value="84218" calcext:value-type="float">
            <text:p>84218</text:p>
          </table:table-cell>
          <table:table-cell table:style-name="ce2" table:number-columns-repeated="16382"/>
        </table:table-row>
        <table:table-row table:style-name="ro1">
          <table:table-cell office:value-type="float" office:value="401217" calcext:value-type="float">
            <text:p>401217</text:p>
          </table:table-cell>
          <table:table-cell office:value-type="float" office:value="84322" calcext:value-type="float">
            <text:p>84322</text:p>
          </table:table-cell>
          <table:table-cell table:style-name="ce2" table:number-columns-repeated="16382"/>
        </table:table-row>
        <table:table-row table:style-name="ro1">
          <table:table-cell office:value-type="float" office:value="402430" calcext:value-type="float">
            <text:p>402430</text:p>
          </table:table-cell>
          <table:table-cell office:value-type="float" office:value="85657" calcext:value-type="float">
            <text:p>85657</text:p>
          </table:table-cell>
          <table:table-cell table:style-name="ce2" table:number-columns-repeated="16382"/>
        </table:table-row>
        <table:table-row table:style-name="ro1">
          <table:table-cell office:value-type="float" office:value="405242" calcext:value-type="float">
            <text:p>405242</text:p>
          </table:table-cell>
          <table:table-cell office:value-type="float" office:value="88889" calcext:value-type="float">
            <text:p>88889</text:p>
          </table:table-cell>
          <table:table-cell table:style-name="ce2" table:number-columns-repeated="16382"/>
        </table:table-row>
        <table:table-row table:style-name="ro1">
          <table:table-cell office:value-type="float" office:value="406396" calcext:value-type="float">
            <text:p>406396</text:p>
          </table:table-cell>
          <table:table-cell office:value-type="float" office:value="64603" calcext:value-type="float">
            <text:p>64603</text:p>
          </table:table-cell>
          <table:table-cell table:style-name="ce2" table:number-columns-repeated="16382"/>
        </table:table-row>
        <table:table-row table:style-name="ro1">
          <table:table-cell office:value-type="float" office:value="407622" calcext:value-type="float">
            <text:p>407622</text:p>
          </table:table-cell>
          <table:table-cell office:value-type="float" office:value="1001865" calcext:value-type="float">
            <text:p>1001865</text:p>
          </table:table-cell>
          <table:table-cell table:style-name="ce2" table:number-columns-repeated="16382"/>
        </table:table-row>
        <table:table-row table:style-name="ro1">
          <table:table-cell office:value-type="float" office:value="408608" calcext:value-type="float">
            <text:p>408608</text:p>
          </table:table-cell>
          <table:table-cell office:value-type="float" office:value="92175" calcext:value-type="float">
            <text:p>92175</text:p>
          </table:table-cell>
          <table:table-cell table:style-name="ce2" table:number-columns-repeated="16382"/>
        </table:table-row>
        <table:table-row table:style-name="ro1">
          <table:table-cell office:value-type="float" office:value="410165" calcext:value-type="float">
            <text:p>410165</text:p>
          </table:table-cell>
          <table:table-cell office:value-type="float" office:value="93847" calcext:value-type="float">
            <text:p>93847</text:p>
          </table:table-cell>
          <table:table-cell table:style-name="ce2" table:number-columns-repeated="16382"/>
        </table:table-row>
        <table:table-row table:style-name="ro1">
          <table:table-cell office:value-type="float" office:value="417383" calcext:value-type="float">
            <text:p>417383</text:p>
          </table:table-cell>
          <table:table-cell office:value-type="float" office:value="100614" calcext:value-type="float">
            <text:p>100614</text:p>
          </table:table-cell>
          <table:table-cell table:style-name="ce2" table:number-columns-repeated="16382"/>
        </table:table-row>
        <table:table-row table:style-name="ro1">
          <table:table-cell office:value-type="float" office:value="421085" calcext:value-type="float">
            <text:p>421085</text:p>
          </table:table-cell>
          <table:table-cell office:value-type="float" office:value="87423" calcext:value-type="float">
            <text:p>87423</text:p>
          </table:table-cell>
          <table:table-cell table:style-name="ce2" table:number-columns-repeated="16382"/>
        </table:table-row>
        <table:table-row table:style-name="ro1">
          <table:table-cell office:value-type="float" office:value="426572" calcext:value-type="float">
            <text:p>426572</text:p>
          </table:table-cell>
          <table:table-cell office:value-type="float" office:value="105446" calcext:value-type="float">
            <text:p>105446</text:p>
          </table:table-cell>
          <table:table-cell table:style-name="ce2" table:number-columns-repeated="16382"/>
        </table:table-row>
        <table:table-row table:style-name="ro1">
          <table:table-cell office:value-type="float" office:value="427891" calcext:value-type="float">
            <text:p>427891</text:p>
          </table:table-cell>
          <table:table-cell office:value-type="float" office:value="106536" calcext:value-type="float">
            <text:p>106536</text:p>
          </table:table-cell>
          <table:table-cell table:style-name="ce2" table:number-columns-repeated="16382"/>
        </table:table-row>
        <table:table-row table:style-name="ro1">
          <table:table-cell office:value-type="float" office:value="428175" calcext:value-type="float">
            <text:p>428175</text:p>
          </table:table-cell>
          <table:table-cell office:value-type="float" office:value="106833" calcext:value-type="float">
            <text:p>106833</text:p>
          </table:table-cell>
          <table:table-cell table:style-name="ce2" table:number-columns-repeated="16382"/>
        </table:table-row>
        <table:table-row table:style-name="ro1">
          <table:table-cell office:value-type="float" office:value="431640" calcext:value-type="float">
            <text:p>431640</text:p>
          </table:table-cell>
          <table:table-cell office:value-type="float" office:value="109777" calcext:value-type="float">
            <text:p>109777</text:p>
          </table:table-cell>
          <table:table-cell table:style-name="ce2" table:number-columns-repeated="16382"/>
        </table:table-row>
        <table:table-row table:style-name="ro1">
          <table:table-cell office:value-type="float" office:value="466952" calcext:value-type="float">
            <text:p>466952</text:p>
          </table:table-cell>
          <table:table-cell office:value-type="float" office:value="138725" calcext:value-type="float">
            <text:p>138725</text:p>
          </table:table-cell>
          <table:table-cell table:style-name="ce2" table:number-columns-repeated="16382"/>
        </table:table-row>
        <table:table-row table:style-name="ro1">
          <table:table-cell office:value-type="float" office:value="466984" calcext:value-type="float">
            <text:p>466984</text:p>
          </table:table-cell>
          <table:table-cell office:value-type="float" office:value="138753" calcext:value-type="float">
            <text:p>138753</text:p>
          </table:table-cell>
          <table:table-cell table:style-name="ce2" table:number-columns-repeated="16382"/>
        </table:table-row>
        <table:table-row table:style-name="ro1">
          <table:table-cell office:value-type="float" office:value="456177" calcext:value-type="float">
            <text:p>456177</text:p>
          </table:table-cell>
          <table:table-cell office:value-type="float" office:value="129874" calcext:value-type="float">
            <text:p>129874</text:p>
          </table:table-cell>
          <table:table-cell table:style-name="ce2" table:number-columns-repeated="16382"/>
        </table:table-row>
        <table:table-row table:style-name="ro1">
          <table:table-cell office:value-type="float" office:value="458420" calcext:value-type="float">
            <text:p>458420</text:p>
          </table:table-cell>
          <table:table-cell office:value-type="float" office:value="131728" calcext:value-type="float">
            <text:p>131728</text:p>
          </table:table-cell>
          <table:table-cell table:style-name="ce2" table:number-columns-repeated="16382"/>
        </table:table-row>
        <table:table-row table:style-name="ro1">
          <table:table-cell office:value-type="float" office:value="451681" calcext:value-type="float">
            <text:p>451681</text:p>
          </table:table-cell>
          <table:table-cell office:value-type="float" office:value="123956" calcext:value-type="float">
            <text:p>123956</text:p>
          </table:table-cell>
          <table:table-cell table:style-name="ce2" table:number-columns-repeated="16382"/>
        </table:table-row>
        <table:table-row table:style-name="ro1">
          <table:table-cell office:value-type="float" office:value="454485" calcext:value-type="float">
            <text:p>454485</text:p>
          </table:table-cell>
          <table:table-cell office:value-type="float" office:value="128434" calcext:value-type="float">
            <text:p>128434</text:p>
          </table:table-cell>
          <table:table-cell table:style-name="ce2" table:number-columns-repeated="16382"/>
        </table:table-row>
        <table:table-row table:style-name="ro1">
          <table:table-cell office:value-type="float" office:value="454485" calcext:value-type="float">
            <text:p>454485</text:p>
          </table:table-cell>
          <table:table-cell office:value-type="float" office:value="128436" calcext:value-type="float">
            <text:p>128436</text:p>
          </table:table-cell>
          <table:table-cell table:style-name="ce2" table:number-columns-repeated="16382"/>
        </table:table-row>
        <table:table-row table:style-name="ro1">
          <table:table-cell office:value-type="float" office:value="356197" calcext:value-type="float">
            <text:p>356197</text:p>
          </table:table-cell>
          <table:table-cell office:value-type="float" office:value="10450" calcext:value-type="float">
            <text:p>10450</text:p>
          </table:table-cell>
          <table:table-cell table:style-name="ce2" table:number-columns-repeated="16382"/>
        </table:table-row>
        <table:table-row table:style-name="ro1">
          <table:table-cell office:value-type="float" office:value="364256" calcext:value-type="float">
            <text:p>364256</text:p>
          </table:table-cell>
          <table:table-cell office:value-type="float" office:value="27926" calcext:value-type="float">
            <text:p>27926</text:p>
          </table:table-cell>
          <table:table-cell table:style-name="ce2" table:number-columns-repeated="16382"/>
        </table:table-row>
        <table:table-row table:style-name="ro1">
          <table:table-cell office:value-type="float" office:value="365116" calcext:value-type="float">
            <text:p>365116</text:p>
          </table:table-cell>
          <table:table-cell office:value-type="float" office:value="29491" calcext:value-type="float">
            <text:p>29491</text:p>
          </table:table-cell>
          <table:table-cell table:style-name="ce2" table:number-columns-repeated="16382"/>
        </table:table-row>
        <table:table-row table:style-name="ro1">
          <table:table-cell office:value-type="float" office:value="365116" calcext:value-type="float">
            <text:p>365116</text:p>
          </table:table-cell>
          <table:table-cell office:value-type="float" office:value="83138" calcext:value-type="float">
            <text:p>83138</text:p>
          </table:table-cell>
          <table:table-cell table:style-name="ce2" table:number-columns-repeated="16382"/>
        </table:table-row>
        <table:table-row table:style-name="ro1">
          <table:table-cell office:value-type="float" office:value="366343" calcext:value-type="float">
            <text:p>366343</text:p>
          </table:table-cell>
          <table:table-cell office:value-type="float" office:value="56707" calcext:value-type="float">
            <text:p>56707</text:p>
          </table:table-cell>
          <table:table-cell table:style-name="ce2" table:number-columns-repeated="16382"/>
        </table:table-row>
        <table:table-row table:style-name="ro1">
          <table:table-cell office:value-type="float" office:value="366437" calcext:value-type="float">
            <text:p>366437</text:p>
          </table:table-cell>
          <table:table-cell office:value-type="float" office:value="32132" calcext:value-type="float">
            <text:p>32132</text:p>
          </table:table-cell>
          <table:table-cell table:style-name="ce2" table:number-columns-repeated="16382"/>
        </table:table-row>
        <table:table-row table:style-name="ro1">
          <table:table-cell office:value-type="float" office:value="367627" calcext:value-type="float">
            <text:p>367627</text:p>
          </table:table-cell>
          <table:table-cell office:value-type="float" office:value="34300" calcext:value-type="float">
            <text:p>34300</text:p>
          </table:table-cell>
          <table:table-cell table:style-name="ce2" table:number-columns-repeated="16382"/>
        </table:table-row>
        <table:table-row table:style-name="ro1">
          <table:table-cell office:value-type="float" office:value="367901" calcext:value-type="float">
            <text:p>367901</text:p>
          </table:table-cell>
          <table:table-cell office:value-type="float" office:value="58188" calcext:value-type="float">
            <text:p>58188</text:p>
          </table:table-cell>
          <table:table-cell table:style-name="ce2" table:number-columns-repeated="16382"/>
        </table:table-row>
        <table:table-row table:style-name="ro1">
          <table:table-cell office:value-type="float" office:value="367901" calcext:value-type="float">
            <text:p>367901</text:p>
          </table:table-cell>
          <table:table-cell office:value-type="float" office:value="69396" calcext:value-type="float">
            <text:p>69396</text:p>
          </table:table-cell>
          <table:table-cell table:style-name="ce2" table:number-columns-repeated="16382"/>
        </table:table-row>
        <table:table-row table:style-name="ro1">
          <table:table-cell office:value-type="float" office:value="370483" calcext:value-type="float">
            <text:p>370483</text:p>
          </table:table-cell>
          <table:table-cell office:value-type="float" office:value="39656" calcext:value-type="float">
            <text:p>39656</text:p>
          </table:table-cell>
          <table:table-cell table:style-name="ce2" table:number-columns-repeated="16382"/>
        </table:table-row>
        <table:table-row table:style-name="ro1">
          <table:table-cell office:value-type="float" office:value="370685" calcext:value-type="float">
            <text:p>370685</text:p>
          </table:table-cell>
          <table:table-cell office:value-type="float" office:value="39980" calcext:value-type="float">
            <text:p>39980</text:p>
          </table:table-cell>
          <table:table-cell table:style-name="ce2" table:number-columns-repeated="16382"/>
        </table:table-row>
        <table:table-row table:style-name="ro1">
          <table:table-cell office:value-type="float" office:value="371505" calcext:value-type="float">
            <text:p>371505</text:p>
          </table:table-cell>
          <table:table-cell office:value-type="float" office:value="41395" calcext:value-type="float">
            <text:p>41395</text:p>
          </table:table-cell>
          <table:table-cell table:style-name="ce2" table:number-columns-repeated="16382"/>
        </table:table-row>
        <table:table-row table:style-name="ro1">
          <table:table-cell office:value-type="float" office:value="376128" calcext:value-type="float">
            <text:p>376128</text:p>
          </table:table-cell>
          <table:table-cell office:value-type="float" office:value="49091" calcext:value-type="float">
            <text:p>49091</text:p>
          </table:table-cell>
          <table:table-cell table:style-name="ce2" table:number-columns-repeated="16382"/>
        </table:table-row>
        <table:table-row table:style-name="ro1">
          <table:table-cell office:value-type="float" office:value="376459" calcext:value-type="float">
            <text:p>376459</text:p>
          </table:table-cell>
          <table:table-cell office:value-type="float" office:value="49654" calcext:value-type="float">
            <text:p>49654</text:p>
          </table:table-cell>
          <table:table-cell table:style-name="ce2" table:number-columns-repeated="16382"/>
        </table:table-row>
        <table:table-row table:style-name="ro1">
          <table:table-cell office:value-type="float" office:value="379659" calcext:value-type="float">
            <text:p>379659</text:p>
          </table:table-cell>
          <table:table-cell office:value-type="float" office:value="55230" calcext:value-type="float">
            <text:p>55230</text:p>
          </table:table-cell>
          <table:table-cell table:style-name="ce2" table:number-columns-repeated="16382"/>
        </table:table-row>
        <table:table-row table:style-name="ro1">
          <table:table-cell office:value-type="float" office:value="379814" calcext:value-type="float">
            <text:p>379814</text:p>
          </table:table-cell>
          <table:table-cell office:value-type="float" office:value="55470" calcext:value-type="float">
            <text:p>55470</text:p>
          </table:table-cell>
          <table:table-cell table:style-name="ce2" table:number-columns-repeated="16382"/>
        </table:table-row>
        <table:table-row table:style-name="ro1">
          <table:table-cell office:value-type="float" office:value="381663" calcext:value-type="float">
            <text:p>381663</text:p>
          </table:table-cell>
          <table:table-cell office:value-type="float" office:value="58433" calcext:value-type="float">
            <text:p>58433</text:p>
          </table:table-cell>
          <table:table-cell table:style-name="ce2" table:number-columns-repeated="16382"/>
        </table:table-row>
        <table:table-row table:style-name="ro1">
          <table:table-cell office:value-type="float" office:value="383669" calcext:value-type="float">
            <text:p>383669</text:p>
          </table:table-cell>
          <table:table-cell office:value-type="float" office:value="61464" calcext:value-type="float">
            <text:p>61464</text:p>
          </table:table-cell>
          <table:table-cell table:style-name="ce2" table:number-columns-repeated="16382"/>
        </table:table-row>
        <table:table-row table:style-name="ro1">
          <table:table-cell office:value-type="float" office:value="383669" calcext:value-type="float">
            <text:p>383669</text:p>
          </table:table-cell>
          <table:table-cell office:value-type="float" office:value="66061" calcext:value-type="float">
            <text:p>66061</text:p>
          </table:table-cell>
          <table:table-cell table:style-name="ce2" table:number-columns-repeated="16382"/>
        </table:table-row>
        <table:table-row table:style-name="ro1">
          <table:table-cell office:value-type="float" office:value="383681" calcext:value-type="float">
            <text:p>383681</text:p>
          </table:table-cell>
          <table:table-cell office:value-type="float" office:value="61478" calcext:value-type="float">
            <text:p>61478</text:p>
          </table:table-cell>
          <table:table-cell table:style-name="ce2" table:number-columns-repeated="16382"/>
        </table:table-row>
        <table:table-row table:style-name="ro1">
          <table:table-cell office:value-type="float" office:value="383779" calcext:value-type="float">
            <text:p>383779</text:p>
          </table:table-cell>
          <table:table-cell office:value-type="float" office:value="61632" calcext:value-type="float">
            <text:p>61632</text:p>
          </table:table-cell>
          <table:table-cell table:style-name="ce2" table:number-columns-repeated="16382"/>
        </table:table-row>
        <table:table-row table:style-name="ro1">
          <table:table-cell office:value-type="float" office:value="384335" calcext:value-type="float">
            <text:p>384335</text:p>
          </table:table-cell>
          <table:table-cell office:value-type="float" office:value="62415" calcext:value-type="float">
            <text:p>62415</text:p>
          </table:table-cell>
          <table:table-cell table:style-name="ce2" table:number-columns-repeated="16382"/>
        </table:table-row>
        <table:table-row table:style-name="ro1">
          <table:table-cell office:value-type="float" office:value="384801" calcext:value-type="float">
            <text:p>384801</text:p>
          </table:table-cell>
          <table:table-cell office:value-type="float" office:value="63121" calcext:value-type="float">
            <text:p>63121</text:p>
          </table:table-cell>
          <table:table-cell table:style-name="ce2" table:number-columns-repeated="16382"/>
        </table:table-row>
        <table:table-row table:style-name="ro1">
          <table:table-cell office:value-type="float" office:value="389461" calcext:value-type="float">
            <text:p>389461</text:p>
          </table:table-cell>
          <table:table-cell office:value-type="float" office:value="69743" calcext:value-type="float">
            <text:p>69743</text:p>
          </table:table-cell>
          <table:table-cell table:style-name="ce2" table:number-columns-repeated="16382"/>
        </table:table-row>
        <table:table-row table:style-name="ro1">
          <table:table-cell office:value-type="float" office:value="390445" calcext:value-type="float">
            <text:p>390445</text:p>
          </table:table-cell>
          <table:table-cell office:value-type="float" office:value="71017" calcext:value-type="float">
            <text:p>71017</text:p>
          </table:table-cell>
          <table:table-cell table:style-name="ce2" table:number-columns-repeated="16382"/>
        </table:table-row>
        <table:table-row table:style-name="ro1">
          <table:table-cell office:value-type="float" office:value="392641" calcext:value-type="float">
            <text:p>392641</text:p>
          </table:table-cell>
          <table:table-cell office:value-type="float" office:value="73856" calcext:value-type="float">
            <text:p>73856</text:p>
          </table:table-cell>
          <table:table-cell table:style-name="ce2" table:number-columns-repeated="16382"/>
        </table:table-row>
        <table:table-row table:style-name="ro1">
          <table:table-cell office:value-type="float" office:value="394857" calcext:value-type="float">
            <text:p>394857</text:p>
          </table:table-cell>
          <table:table-cell office:value-type="float" office:value="76576" calcext:value-type="float">
            <text:p>76576</text:p>
          </table:table-cell>
          <table:table-cell table:style-name="ce2" table:number-columns-repeated="16382"/>
        </table:table-row>
        <table:table-row table:style-name="ro1">
          <table:table-cell office:value-type="float" office:value="396221" calcext:value-type="float">
            <text:p>396221</text:p>
          </table:table-cell>
          <table:table-cell office:value-type="float" office:value="78213" calcext:value-type="float">
            <text:p>78213</text:p>
          </table:table-cell>
          <table:table-cell table:style-name="ce2" table:number-columns-repeated="16382"/>
        </table:table-row>
        <table:table-row table:style-name="ro1">
          <table:table-cell office:value-type="float" office:value="397524" calcext:value-type="float">
            <text:p>397524</text:p>
          </table:table-cell>
          <table:table-cell office:value-type="float" office:value="79755" calcext:value-type="float">
            <text:p>79755</text:p>
          </table:table-cell>
          <table:table-cell table:style-name="ce2" table:number-columns-repeated="16382"/>
        </table:table-row>
        <table:table-row table:style-name="ro1">
          <table:table-cell office:value-type="float" office:value="397786" calcext:value-type="float">
            <text:p>397786</text:p>
          </table:table-cell>
          <table:table-cell office:value-type="float" office:value="80055" calcext:value-type="float">
            <text:p>80055</text:p>
          </table:table-cell>
          <table:table-cell table:style-name="ce2" table:number-columns-repeated="16382"/>
        </table:table-row>
        <table:table-row table:style-name="ro1">
          <table:table-cell office:value-type="float" office:value="398567" calcext:value-type="float">
            <text:p>398567</text:p>
          </table:table-cell>
          <table:table-cell office:value-type="float" office:value="81031" calcext:value-type="float">
            <text:p>81031</text:p>
          </table:table-cell>
          <table:table-cell table:style-name="ce2" table:number-columns-repeated="16382"/>
        </table:table-row>
        <table:table-row table:style-name="ro1">
          <table:table-cell office:value-type="float" office:value="400622" calcext:value-type="float">
            <text:p>400622</text:p>
          </table:table-cell>
          <table:table-cell office:value-type="float" office:value="83490" calcext:value-type="float">
            <text:p>83490</text:p>
          </table:table-cell>
          <table:table-cell table:style-name="ce2" table:number-columns-repeated="16382"/>
        </table:table-row>
        <table:table-row table:style-name="ro1">
          <table:table-cell office:value-type="float" office:value="404835" calcext:value-type="float">
            <text:p>404835</text:p>
          </table:table-cell>
          <table:table-cell office:value-type="float" office:value="88470" calcext:value-type="float">
            <text:p>88470</text:p>
          </table:table-cell>
          <table:table-cell table:style-name="ce2" table:number-columns-repeated="16382"/>
        </table:table-row>
        <table:table-row table:style-name="ro1">
          <table:table-cell office:value-type="float" office:value="408551" calcext:value-type="float">
            <text:p>408551</text:p>
          </table:table-cell>
          <table:table-cell office:value-type="float" office:value="92143" calcext:value-type="float">
            <text:p>92143</text:p>
          </table:table-cell>
          <table:table-cell table:style-name="ce2" table:number-columns-repeated="16382"/>
        </table:table-row>
        <table:table-row table:style-name="ro1">
          <table:table-cell office:value-type="float" office:value="408608" calcext:value-type="float">
            <text:p>408608</text:p>
          </table:table-cell>
          <table:table-cell office:value-type="float" office:value="92174" calcext:value-type="float">
            <text:p>92174</text:p>
          </table:table-cell>
          <table:table-cell table:style-name="ce2" table:number-columns-repeated="16382"/>
        </table:table-row>
        <table:table-row table:style-name="ro1">
          <table:table-cell office:value-type="float" office:value="417899" calcext:value-type="float">
            <text:p>417899</text:p>
          </table:table-cell>
          <table:table-cell office:value-type="float" office:value="79922" calcext:value-type="float">
            <text:p>79922</text:p>
          </table:table-cell>
          <table:table-cell table:style-name="ce2" table:number-columns-repeated="16382"/>
        </table:table-row>
        <table:table-row table:style-name="ro1">
          <table:table-cell office:value-type="float" office:value="418490" calcext:value-type="float">
            <text:p>418490</text:p>
          </table:table-cell>
          <table:table-cell office:value-type="float" office:value="101543" calcext:value-type="float">
            <text:p>101543</text:p>
          </table:table-cell>
          <table:table-cell table:style-name="ce2" table:number-columns-repeated="16382"/>
        </table:table-row>
        <table:table-row table:style-name="ro1">
          <table:table-cell office:value-type="float" office:value="425696" calcext:value-type="float">
            <text:p>425696</text:p>
          </table:table-cell>
          <table:table-cell office:value-type="float" office:value="104656" calcext:value-type="float">
            <text:p>104656</text:p>
          </table:table-cell>
          <table:table-cell table:style-name="ce2" table:number-columns-repeated="16382"/>
        </table:table-row>
        <table:table-row table:style-name="ro1">
          <table:table-cell office:value-type="float" office:value="428889" calcext:value-type="float">
            <text:p>428889</text:p>
          </table:table-cell>
          <table:table-cell office:value-type="float" office:value="107481" calcext:value-type="float">
            <text:p>107481</text:p>
          </table:table-cell>
          <table:table-cell table:style-name="ce2" table:number-columns-repeated="16382"/>
        </table:table-row>
        <table:table-row table:style-name="ro1">
          <table:table-cell office:value-type="float" office:value="431707" calcext:value-type="float">
            <text:p>431707</text:p>
          </table:table-cell>
          <table:table-cell office:value-type="float" office:value="109931" calcext:value-type="float">
            <text:p>109931</text:p>
          </table:table-cell>
          <table:table-cell table:style-name="ce2" table:number-columns-repeated="16382"/>
        </table:table-row>
        <table:table-row table:style-name="ro1">
          <table:table-cell office:value-type="float" office:value="434295" calcext:value-type="float">
            <text:p>434295</text:p>
          </table:table-cell>
          <table:table-cell office:value-type="float" office:value="111920" calcext:value-type="float">
            <text:p>111920</text:p>
          </table:table-cell>
          <table:table-cell table:style-name="ce2" table:number-columns-repeated="16382"/>
        </table:table-row>
        <table:table-row table:style-name="ro1">
          <table:table-cell office:value-type="float" office:value="443113" calcext:value-type="float">
            <text:p>443113</text:p>
          </table:table-cell>
          <table:table-cell office:value-type="float" office:value="45918" calcext:value-type="float">
            <text:p>45918</text:p>
          </table:table-cell>
          <table:table-cell table:style-name="ce2" table:number-columns-repeated="16382"/>
        </table:table-row>
        <table:table-row table:style-name="ro1">
          <table:table-cell office:value-type="float" office:value="445945" calcext:value-type="float">
            <text:p>445945</text:p>
          </table:table-cell>
          <table:table-cell office:value-type="float" office:value="121510" calcext:value-type="float">
            <text:p>121510</text:p>
          </table:table-cell>
          <table:table-cell table:style-name="ce2" table:number-columns-repeated="16382"/>
        </table:table-row>
        <table:table-row table:style-name="ro1">
          <table:table-cell office:value-type="float" office:value="464447" calcext:value-type="float">
            <text:p>464447</text:p>
          </table:table-cell>
          <table:table-cell office:value-type="float" office:value="136665" calcext:value-type="float">
            <text:p>136665</text:p>
          </table:table-cell>
          <table:table-cell table:style-name="ce2" table:number-columns-repeated="16382"/>
        </table:table-row>
        <table:table-row table:style-name="ro1">
          <table:table-cell office:value-type="float" office:value="456934" calcext:value-type="float">
            <text:p>456934</text:p>
          </table:table-cell>
          <table:table-cell office:value-type="float" office:value="130527" calcext:value-type="float">
            <text:p>130527</text:p>
          </table:table-cell>
          <table:table-cell table:style-name="ce2" table:number-columns-repeated="16382"/>
        </table:table-row>
        <table:table-row table:style-name="ro1">
          <table:table-cell office:value-type="float" office:value="448692" calcext:value-type="float">
            <text:p>448692</text:p>
          </table:table-cell>
          <table:table-cell office:value-type="float" office:value="123722" calcext:value-type="float">
            <text:p>123722</text:p>
          </table:table-cell>
          <table:table-cell table:style-name="ce2" table:number-columns-repeated="16382"/>
        </table:table-row>
        <table:table-row table:style-name="ro1">
          <table:table-cell office:value-type="float" office:value="355811" calcext:value-type="float">
            <text:p>355811</text:p>
          </table:table-cell>
          <table:table-cell office:value-type="float" office:value="9696" calcext:value-type="float">
            <text:p>9696</text:p>
          </table:table-cell>
          <table:table-cell table:style-name="ce2" table:number-columns-repeated="16382"/>
        </table:table-row>
        <table:table-row table:style-name="ro1">
          <table:table-cell office:value-type="float" office:value="367901" calcext:value-type="float">
            <text:p>367901</text:p>
          </table:table-cell>
          <table:table-cell office:value-type="float" office:value="36855" calcext:value-type="float">
            <text:p>36855</text:p>
          </table:table-cell>
          <table:table-cell table:style-name="ce2" table:number-columns-repeated="16382"/>
        </table:table-row>
        <table:table-row table:style-name="ro1">
          <table:table-cell office:value-type="float" office:value="367901" calcext:value-type="float">
            <text:p>367901</text:p>
          </table:table-cell>
          <table:table-cell office:value-type="float" office:value="64131" calcext:value-type="float">
            <text:p>64131</text:p>
          </table:table-cell>
          <table:table-cell table:style-name="ce2" table:number-columns-repeated="16382"/>
        </table:table-row>
        <table:table-row table:style-name="ro1">
          <table:table-cell office:value-type="float" office:value="367901" calcext:value-type="float">
            <text:p>367901</text:p>
          </table:table-cell>
          <table:table-cell office:value-type="float" office:value="1001865" calcext:value-type="float">
            <text:p>1001865</text:p>
          </table:table-cell>
          <table:table-cell table:style-name="ce2" table:number-columns-repeated="16382"/>
        </table:table-row>
        <table:table-row table:style-name="ro1">
          <table:table-cell office:value-type="float" office:value="367970" calcext:value-type="float">
            <text:p>367970</text:p>
          </table:table-cell>
          <table:table-cell office:value-type="float" office:value="34945" calcext:value-type="float">
            <text:p>34945</text:p>
          </table:table-cell>
          <table:table-cell table:style-name="ce2" table:number-columns-repeated="16382"/>
        </table:table-row>
        <table:table-row table:style-name="ro1">
          <table:table-cell office:value-type="float" office:value="369639" calcext:value-type="float">
            <text:p>369639</text:p>
          </table:table-cell>
          <table:table-cell office:value-type="float" office:value="38001" calcext:value-type="float">
            <text:p>38001</text:p>
          </table:table-cell>
          <table:table-cell table:style-name="ce2" table:number-columns-repeated="16382"/>
        </table:table-row>
        <table:table-row table:style-name="ro1">
          <table:table-cell office:value-type="float" office:value="380437" calcext:value-type="float">
            <text:p>380437</text:p>
          </table:table-cell>
          <table:table-cell office:value-type="float" office:value="56477" calcext:value-type="float">
            <text:p>56477</text:p>
          </table:table-cell>
          <table:table-cell table:style-name="ce2" table:number-columns-repeated="16382"/>
        </table:table-row>
        <table:table-row table:style-name="ro1">
          <table:table-cell office:value-type="float" office:value="383179" calcext:value-type="float">
            <text:p>383179</text:p>
          </table:table-cell>
          <table:table-cell office:value-type="float" office:value="60762" calcext:value-type="float">
            <text:p>60762</text:p>
          </table:table-cell>
          <table:table-cell table:style-name="ce2" table:number-columns-repeated="16382"/>
        </table:table-row>
        <table:table-row table:style-name="ro1">
          <table:table-cell office:value-type="float" office:value="383779" calcext:value-type="float">
            <text:p>383779</text:p>
          </table:table-cell>
          <table:table-cell office:value-type="float" office:value="61631" calcext:value-type="float">
            <text:p>61631</text:p>
          </table:table-cell>
          <table:table-cell table:style-name="ce2" table:number-columns-repeated="16382"/>
        </table:table-row>
        <table:table-row table:style-name="ro1">
          <table:table-cell office:value-type="float" office:value="389049" calcext:value-type="float">
            <text:p>389049</text:p>
          </table:table-cell>
          <table:table-cell office:value-type="float" office:value="69231" calcext:value-type="float">
            <text:p>69231</text:p>
          </table:table-cell>
          <table:table-cell table:style-name="ce2" table:number-columns-repeated="16382"/>
        </table:table-row>
        <table:table-row table:style-name="ro1">
          <table:table-cell office:value-type="float" office:value="391656" calcext:value-type="float">
            <text:p>391656</text:p>
          </table:table-cell>
          <table:table-cell office:value-type="float" office:value="80563" calcext:value-type="float">
            <text:p>80563</text:p>
          </table:table-cell>
          <table:table-cell table:style-name="ce2" table:number-columns-repeated="16382"/>
        </table:table-row>
        <table:table-row table:style-name="ro1">
          <table:table-cell office:value-type="float" office:value="394584" calcext:value-type="float">
            <text:p>394584</text:p>
          </table:table-cell>
          <table:table-cell office:value-type="float" office:value="76269" calcext:value-type="float">
            <text:p>76269</text:p>
          </table:table-cell>
          <table:table-cell table:style-name="ce2" table:number-columns-repeated="16382"/>
        </table:table-row>
        <table:table-row table:style-name="ro1">
          <table:table-cell office:value-type="float" office:value="399066" calcext:value-type="float">
            <text:p>399066</text:p>
          </table:table-cell>
          <table:table-cell office:value-type="float" office:value="81634" calcext:value-type="float">
            <text:p>81634</text:p>
          </table:table-cell>
          <table:table-cell table:style-name="ce2" table:number-columns-repeated="16382"/>
        </table:table-row>
        <table:table-row table:style-name="ro1">
          <table:table-cell office:value-type="float" office:value="399066" calcext:value-type="float">
            <text:p>399066</text:p>
          </table:table-cell>
          <table:table-cell office:value-type="float" office:value="81637" calcext:value-type="float">
            <text:p>81637</text:p>
          </table:table-cell>
          <table:table-cell table:style-name="ce2" table:number-columns-repeated="16382"/>
        </table:table-row>
        <table:table-row table:style-name="ro1">
          <table:table-cell office:value-type="float" office:value="406800" calcext:value-type="float">
            <text:p>406800</text:p>
          </table:table-cell>
          <table:table-cell office:value-type="float" office:value="89827" calcext:value-type="float">
            <text:p>89827</text:p>
          </table:table-cell>
          <table:table-cell table:style-name="ce2" table:number-columns-repeated="16382"/>
        </table:table-row>
        <table:table-row table:style-name="ro1">
          <table:table-cell office:value-type="float" office:value="406826" calcext:value-type="float">
            <text:p>406826</text:p>
          </table:table-cell>
          <table:table-cell office:value-type="float" office:value="90380" calcext:value-type="float">
            <text:p>90380</text:p>
          </table:table-cell>
          <table:table-cell table:style-name="ce2" table:number-columns-repeated="16382"/>
        </table:table-row>
        <table:table-row table:style-name="ro1">
          <table:table-cell office:value-type="float" office:value="407053" calcext:value-type="float">
            <text:p>407053</text:p>
          </table:table-cell>
          <table:table-cell office:value-type="float" office:value="90626" calcext:value-type="float">
            <text:p>90626</text:p>
          </table:table-cell>
          <table:table-cell table:style-name="ce2" table:number-columns-repeated="16382"/>
        </table:table-row>
        <table:table-row table:style-name="ro1">
          <table:table-cell office:value-type="float" office:value="411097" calcext:value-type="float">
            <text:p>411097</text:p>
          </table:table-cell>
          <table:table-cell office:value-type="float" office:value="77282" calcext:value-type="float">
            <text:p>77282</text:p>
          </table:table-cell>
          <table:table-cell table:style-name="ce2" table:number-columns-repeated="16382"/>
        </table:table-row>
        <table:table-row table:style-name="ro1">
          <table:table-cell office:value-type="float" office:value="411830" calcext:value-type="float">
            <text:p>411830</text:p>
          </table:table-cell>
          <table:table-cell office:value-type="float" office:value="93308" calcext:value-type="float">
            <text:p>93308</text:p>
          </table:table-cell>
          <table:table-cell table:style-name="ce2" table:number-columns-repeated="16382"/>
        </table:table-row>
        <table:table-row table:style-name="ro1">
          <table:table-cell office:value-type="float" office:value="415344" calcext:value-type="float">
            <text:p>415344</text:p>
          </table:table-cell>
          <table:table-cell office:value-type="float" office:value="70336" calcext:value-type="float">
            <text:p>70336</text:p>
          </table:table-cell>
          <table:table-cell table:style-name="ce2" table:number-columns-repeated="16382"/>
        </table:table-row>
        <table:table-row table:style-name="ro1">
          <table:table-cell office:value-type="float" office:value="417100" calcext:value-type="float">
            <text:p>417100</text:p>
          </table:table-cell>
          <table:table-cell office:value-type="float" office:value="100376" calcext:value-type="float">
            <text:p>100376</text:p>
          </table:table-cell>
          <table:table-cell table:style-name="ce2" table:number-columns-repeated="16382"/>
        </table:table-row>
        <table:table-row table:style-name="ro1">
          <table:table-cell office:value-type="float" office:value="418490" calcext:value-type="float">
            <text:p>418490</text:p>
          </table:table-cell>
          <table:table-cell office:value-type="float" office:value="87350" calcext:value-type="float">
            <text:p>87350</text:p>
          </table:table-cell>
          <table:table-cell table:style-name="ce2" table:number-columns-repeated="16382"/>
        </table:table-row>
        <table:table-row table:style-name="ro1">
          <table:table-cell office:value-type="float" office:value="419217" calcext:value-type="float">
            <text:p>419217</text:p>
          </table:table-cell>
          <table:table-cell office:value-type="float" office:value="102006" calcext:value-type="float">
            <text:p>102006</text:p>
          </table:table-cell>
          <table:table-cell table:style-name="ce2" table:number-columns-repeated="16382"/>
        </table:table-row>
        <table:table-row table:style-name="ro1">
          <table:table-cell office:value-type="float" office:value="420215" calcext:value-type="float">
            <text:p>420215</text:p>
          </table:table-cell>
          <table:table-cell office:value-type="float" office:value="102903" calcext:value-type="float">
            <text:p>102903</text:p>
          </table:table-cell>
          <table:table-cell table:style-name="ce2" table:number-columns-repeated="16382"/>
        </table:table-row>
        <table:table-row table:style-name="ro1">
          <table:table-cell office:value-type="float" office:value="420583" calcext:value-type="float">
            <text:p>420583</text:p>
          </table:table-cell>
          <table:table-cell office:value-type="float" office:value="103241" calcext:value-type="float">
            <text:p>103241</text:p>
          </table:table-cell>
          <table:table-cell table:style-name="ce2" table:number-columns-repeated="16382"/>
        </table:table-row>
        <table:table-row table:style-name="ro1">
          <table:table-cell office:value-type="float" office:value="425327" calcext:value-type="float">
            <text:p>425327</text:p>
          </table:table-cell>
          <table:table-cell office:value-type="float" office:value="102972" calcext:value-type="float">
            <text:p>102972</text:p>
          </table:table-cell>
          <table:table-cell table:style-name="ce2" table:number-columns-repeated="16382"/>
        </table:table-row>
        <table:table-row table:style-name="ro1">
          <table:table-cell office:value-type="float" office:value="428889" calcext:value-type="float">
            <text:p>428889</text:p>
          </table:table-cell>
          <table:table-cell office:value-type="float" office:value="107485" calcext:value-type="float">
            <text:p>107485</text:p>
          </table:table-cell>
          <table:table-cell table:style-name="ce2" table:number-columns-repeated="16382"/>
        </table:table-row>
        <table:table-row table:style-name="ro1">
          <table:table-cell office:value-type="float" office:value="441434" calcext:value-type="float">
            <text:p>441434</text:p>
          </table:table-cell>
          <table:table-cell office:value-type="float" office:value="101381" calcext:value-type="float">
            <text:p>101381</text:p>
          </table:table-cell>
          <table:table-cell table:style-name="ce2" table:number-columns-repeated="16382"/>
        </table:table-row>
        <table:table-row table:style-name="ro1">
          <table:table-cell office:value-type="float" office:value="442757" calcext:value-type="float">
            <text:p>442757</text:p>
          </table:table-cell>
          <table:table-cell office:value-type="float" office:value="118999" calcext:value-type="float">
            <text:p>118999</text:p>
          </table:table-cell>
          <table:table-cell table:style-name="ce2" table:number-columns-repeated="16382"/>
        </table:table-row>
        <table:table-row table:style-name="ro1">
          <table:table-cell office:value-type="float" office:value="445518" calcext:value-type="float">
            <text:p>445518</text:p>
          </table:table-cell>
          <table:table-cell office:value-type="float" office:value="121162" calcext:value-type="float">
            <text:p>121162</text:p>
          </table:table-cell>
          <table:table-cell table:style-name="ce2" table:number-columns-repeated="16382"/>
        </table:table-row>
        <table:table-row table:style-name="ro1">
          <table:table-cell office:value-type="float" office:value="445553" calcext:value-type="float">
            <text:p>445553</text:p>
          </table:table-cell>
          <table:table-cell office:value-type="float" office:value="99048" calcext:value-type="float">
            <text:p>99048</text:p>
          </table:table-cell>
          <table:table-cell table:style-name="ce2" table:number-columns-repeated="16382"/>
        </table:table-row>
        <table:table-row table:style-name="ro1">
          <table:table-cell office:value-type="float" office:value="446069" calcext:value-type="float">
            <text:p>446069</text:p>
          </table:table-cell>
          <table:table-cell office:value-type="float" office:value="121611" calcext:value-type="float">
            <text:p>121611</text:p>
          </table:table-cell>
          <table:table-cell table:style-name="ce2" table:number-columns-repeated="16382"/>
        </table:table-row>
        <table:table-row table:style-name="ro1">
          <table:table-cell office:value-type="float" office:value="460411" calcext:value-type="float">
            <text:p>460411</text:p>
          </table:table-cell>
          <table:table-cell office:value-type="float" office:value="133355" calcext:value-type="float">
            <text:p>133355</text:p>
          </table:table-cell>
          <table:table-cell table:style-name="ce2" table:number-columns-repeated="16382"/>
        </table:table-row>
        <table:table-row table:style-name="ro1">
          <table:table-cell office:value-type="float" office:value="458964" calcext:value-type="float">
            <text:p>458964</text:p>
          </table:table-cell>
          <table:table-cell office:value-type="float" office:value="131539" calcext:value-type="float">
            <text:p>131539</text:p>
          </table:table-cell>
          <table:table-cell table:style-name="ce2" table:number-columns-repeated="16382"/>
        </table:table-row>
        <table:table-row table:style-name="ro1">
          <table:table-cell office:value-type="float" office:value="458229" calcext:value-type="float">
            <text:p>458229</text:p>
          </table:table-cell>
          <table:table-cell office:value-type="float" office:value="131578" calcext:value-type="float">
            <text:p>131578</text:p>
          </table:table-cell>
          <table:table-cell table:style-name="ce2" table:number-columns-repeated="16382"/>
        </table:table-row>
        <table:table-row table:style-name="ro1">
          <table:table-cell office:value-type="float" office:value="458351" calcext:value-type="float">
            <text:p>458351</text:p>
          </table:table-cell>
          <table:table-cell office:value-type="float" office:value="131658" calcext:value-type="float">
            <text:p>131658</text:p>
          </table:table-cell>
          <table:table-cell table:style-name="ce2" table:number-columns-repeated="16382"/>
        </table:table-row>
        <table:table-row table:style-name="ro1">
          <table:table-cell office:value-type="float" office:value="354691" calcext:value-type="float">
            <text:p>354691</text:p>
          </table:table-cell>
          <table:table-cell office:value-type="float" office:value="7084" calcext:value-type="float">
            <text:p>7084</text:p>
          </table:table-cell>
          <table:table-cell table:style-name="ce2" table:number-columns-repeated="16382"/>
        </table:table-row>
        <table:table-row table:style-name="ro1">
          <table:table-cell office:value-type="float" office:value="356197" calcext:value-type="float">
            <text:p>356197</text:p>
          </table:table-cell>
          <table:table-cell office:value-type="float" office:value="10452" calcext:value-type="float">
            <text:p>10452</text:p>
          </table:table-cell>
          <table:table-cell table:style-name="ce2" table:number-columns-repeated="16382"/>
        </table:table-row>
        <table:table-row table:style-name="ro1">
          <table:table-cell office:value-type="float" office:value="360979" calcext:value-type="float">
            <text:p>360979</text:p>
          </table:table-cell>
          <table:table-cell office:value-type="float" office:value="20884" calcext:value-type="float">
            <text:p>20884</text:p>
          </table:table-cell>
          <table:table-cell table:style-name="ce2" table:number-columns-repeated="16382"/>
        </table:table-row>
        <table:table-row table:style-name="ro1">
          <table:table-cell office:value-type="float" office:value="363580" calcext:value-type="float">
            <text:p>363580</text:p>
          </table:table-cell>
          <table:table-cell office:value-type="float" office:value="26449" calcext:value-type="float">
            <text:p>26449</text:p>
          </table:table-cell>
          <table:table-cell table:style-name="ce2" table:number-columns-repeated="16382"/>
        </table:table-row>
        <table:table-row table:style-name="ro1">
          <table:table-cell office:value-type="float" office:value="363829" calcext:value-type="float">
            <text:p>363829</text:p>
          </table:table-cell>
          <table:table-cell office:value-type="float" office:value="26996" calcext:value-type="float">
            <text:p>26996</text:p>
          </table:table-cell>
          <table:table-cell table:style-name="ce2" table:number-columns-repeated="16382"/>
        </table:table-row>
        <table:table-row table:style-name="ro1">
          <table:table-cell office:value-type="float" office:value="366008" calcext:value-type="float">
            <text:p>366008</text:p>
          </table:table-cell>
          <table:table-cell office:value-type="float" office:value="31276" calcext:value-type="float">
            <text:p>31276</text:p>
          </table:table-cell>
          <table:table-cell table:style-name="ce2" table:number-columns-repeated="16382"/>
        </table:table-row>
        <table:table-row table:style-name="ro1">
          <table:table-cell office:value-type="float" office:value="366008" calcext:value-type="float">
            <text:p>366008</text:p>
          </table:table-cell>
          <table:table-cell office:value-type="float" office:value="35020" calcext:value-type="float">
            <text:p>35020</text:p>
          </table:table-cell>
          <table:table-cell table:style-name="ce2" table:number-columns-repeated="16382"/>
        </table:table-row>
        <table:table-row table:style-name="ro1">
          <table:table-cell office:value-type="float" office:value="366975" calcext:value-type="float">
            <text:p>366975</text:p>
          </table:table-cell>
          <table:table-cell office:value-type="float" office:value="33102" calcext:value-type="float">
            <text:p>33102</text:p>
          </table:table-cell>
          <table:table-cell table:style-name="ce2" table:number-columns-repeated="16382"/>
        </table:table-row>
        <table:table-row table:style-name="ro1">
          <table:table-cell office:value-type="float" office:value="367901" calcext:value-type="float">
            <text:p>367901</text:p>
          </table:table-cell>
          <table:table-cell office:value-type="float" office:value="1001822" calcext:value-type="float">
            <text:p>1001822</text:p>
          </table:table-cell>
          <table:table-cell table:style-name="ce2" table:number-columns-repeated="16382"/>
        </table:table-row>
        <table:table-row table:style-name="ro1">
          <table:table-cell office:value-type="float" office:value="369639" calcext:value-type="float">
            <text:p>369639</text:p>
          </table:table-cell>
          <table:table-cell office:value-type="float" office:value="46864" calcext:value-type="float">
            <text:p>46864</text:p>
          </table:table-cell>
          <table:table-cell table:style-name="ce2" table:number-columns-repeated="16382"/>
        </table:table-row>
        <table:table-row table:style-name="ro1">
          <table:table-cell office:value-type="float" office:value="369664" calcext:value-type="float">
            <text:p>369664</text:p>
          </table:table-cell>
          <table:table-cell office:value-type="float" office:value="38065" calcext:value-type="float">
            <text:p>38065</text:p>
          </table:table-cell>
          <table:table-cell table:style-name="ce2" table:number-columns-repeated="16382"/>
        </table:table-row>
        <table:table-row table:style-name="ro1">
          <table:table-cell office:value-type="float" office:value="377533" calcext:value-type="float">
            <text:p>377533</text:p>
          </table:table-cell>
          <table:table-cell office:value-type="float" office:value="51474" calcext:value-type="float">
            <text:p>51474</text:p>
          </table:table-cell>
          <table:table-cell table:style-name="ce2" table:number-columns-repeated="16382"/>
        </table:table-row>
        <table:table-row table:style-name="ro1">
          <table:table-cell office:value-type="float" office:value="378924" calcext:value-type="float">
            <text:p>378924</text:p>
          </table:table-cell>
          <table:table-cell office:value-type="float" office:value="53915" calcext:value-type="float">
            <text:p>53915</text:p>
          </table:table-cell>
          <table:table-cell table:style-name="ce2" table:number-columns-repeated="16382"/>
        </table:table-row>
        <table:table-row table:style-name="ro1">
          <table:table-cell office:value-type="float" office:value="378949" calcext:value-type="float">
            <text:p>378949</text:p>
          </table:table-cell>
          <table:table-cell office:value-type="float" office:value="53969" calcext:value-type="float">
            <text:p>53969</text:p>
          </table:table-cell>
          <table:table-cell table:style-name="ce2" table:number-columns-repeated="16382"/>
        </table:table-row>
        <table:table-row table:style-name="ro1">
          <table:table-cell office:value-type="float" office:value="385485" calcext:value-type="float">
            <text:p>385485</text:p>
          </table:table-cell>
          <table:table-cell office:value-type="float" office:value="64125" calcext:value-type="float">
            <text:p>64125</text:p>
          </table:table-cell>
          <table:table-cell table:style-name="ce2" table:number-columns-repeated="16382"/>
        </table:table-row>
        <table:table-row table:style-name="ro1">
          <table:table-cell office:value-type="float" office:value="386903" calcext:value-type="float">
            <text:p>386903</text:p>
          </table:table-cell>
          <table:table-cell office:value-type="float" office:value="66216" calcext:value-type="float">
            <text:p>66216</text:p>
          </table:table-cell>
          <table:table-cell table:style-name="ce2" table:number-columns-repeated="16382"/>
        </table:table-row>
        <table:table-row table:style-name="ro1">
          <table:table-cell office:value-type="float" office:value="388267" calcext:value-type="float">
            <text:p>388267</text:p>
          </table:table-cell>
          <table:table-cell office:value-type="float" office:value="68175" calcext:value-type="float">
            <text:p>68175</text:p>
          </table:table-cell>
          <table:table-cell table:style-name="ce2" table:number-columns-repeated="16382"/>
        </table:table-row>
        <table:table-row table:style-name="ro1">
          <table:table-cell office:value-type="float" office:value="391193" calcext:value-type="float">
            <text:p>391193</text:p>
          </table:table-cell>
          <table:table-cell office:value-type="float" office:value="76343" calcext:value-type="float">
            <text:p>76343</text:p>
          </table:table-cell>
          <table:table-cell table:style-name="ce2" table:number-columns-repeated="16382"/>
        </table:table-row>
        <table:table-row table:style-name="ro1">
          <table:table-cell office:value-type="float" office:value="393069" calcext:value-type="float">
            <text:p>393069</text:p>
          </table:table-cell>
          <table:table-cell office:value-type="float" office:value="74370" calcext:value-type="float">
            <text:p>74370</text:p>
          </table:table-cell>
          <table:table-cell table:style-name="ce2" table:number-columns-repeated="16382"/>
        </table:table-row>
        <table:table-row table:style-name="ro1">
          <table:table-cell office:value-type="float" office:value="395792" calcext:value-type="float">
            <text:p>395792</text:p>
          </table:table-cell>
          <table:table-cell office:value-type="float" office:value="77679" calcext:value-type="float">
            <text:p>77679</text:p>
          </table:table-cell>
          <table:table-cell table:style-name="ce2" table:number-columns-repeated="16382"/>
        </table:table-row>
        <table:table-row table:style-name="ro1">
          <table:table-cell office:value-type="float" office:value="395792" calcext:value-type="float">
            <text:p>395792</text:p>
          </table:table-cell>
          <table:table-cell office:value-type="float" office:value="77681" calcext:value-type="float">
            <text:p>77681</text:p>
          </table:table-cell>
          <table:table-cell table:style-name="ce2" table:number-columns-repeated="16382"/>
        </table:table-row>
        <table:table-row table:style-name="ro1">
          <table:table-cell office:value-type="float" office:value="396641" calcext:value-type="float">
            <text:p>396641</text:p>
          </table:table-cell>
          <table:table-cell office:value-type="float" office:value="78713" calcext:value-type="float">
            <text:p>78713</text:p>
          </table:table-cell>
          <table:table-cell table:style-name="ce2" table:number-columns-repeated="16382"/>
        </table:table-row>
        <table:table-row table:style-name="ro1">
          <table:table-cell office:value-type="float" office:value="396949" calcext:value-type="float">
            <text:p>396949</text:p>
          </table:table-cell>
          <table:table-cell office:value-type="float" office:value="79066" calcext:value-type="float">
            <text:p>79066</text:p>
          </table:table-cell>
          <table:table-cell table:style-name="ce2" table:number-columns-repeated="16382"/>
        </table:table-row>
        <table:table-row table:style-name="ro1">
          <table:table-cell office:value-type="float" office:value="397898" calcext:value-type="float">
            <text:p>397898</text:p>
          </table:table-cell>
          <table:table-cell office:value-type="float" office:value="80198" calcext:value-type="float">
            <text:p>80198</text:p>
          </table:table-cell>
          <table:table-cell table:style-name="ce2" table:number-columns-repeated="16382"/>
        </table:table-row>
        <table:table-row table:style-name="ro1">
          <table:table-cell office:value-type="float" office:value="401040" calcext:value-type="float">
            <text:p>401040</text:p>
          </table:table-cell>
          <table:table-cell office:value-type="float" office:value="84005" calcext:value-type="float">
            <text:p>84005</text:p>
          </table:table-cell>
          <table:table-cell table:style-name="ce2" table:number-columns-repeated="16382"/>
        </table:table-row>
        <table:table-row table:style-name="ro1">
          <table:table-cell office:value-type="float" office:value="401628" calcext:value-type="float">
            <text:p>401628</text:p>
          </table:table-cell>
          <table:table-cell office:value-type="float" office:value="84693" calcext:value-type="float">
            <text:p>84693</text:p>
          </table:table-cell>
          <table:table-cell table:style-name="ce2" table:number-columns-repeated="16382"/>
        </table:table-row>
        <table:table-row table:style-name="ro1">
          <table:table-cell office:value-type="float" office:value="402958" calcext:value-type="float">
            <text:p>402958</text:p>
          </table:table-cell>
          <table:table-cell office:value-type="float" office:value="86274" calcext:value-type="float">
            <text:p>86274</text:p>
          </table:table-cell>
          <table:table-cell table:style-name="ce2" table:number-columns-repeated="16382"/>
        </table:table-row>
        <table:table-row table:style-name="ro1">
          <table:table-cell office:value-type="float" office:value="406653" calcext:value-type="float">
            <text:p>406653</text:p>
          </table:table-cell>
          <table:table-cell office:value-type="float" office:value="90232" calcext:value-type="float">
            <text:p>90232</text:p>
          </table:table-cell>
          <table:table-cell table:style-name="ce2" table:number-columns-repeated="16382"/>
        </table:table-row>
        <table:table-row table:style-name="ro1">
          <table:table-cell office:value-type="float" office:value="407301" calcext:value-type="float">
            <text:p>407301</text:p>
          </table:table-cell>
          <table:table-cell office:value-type="float" office:value="90929" calcext:value-type="float">
            <text:p>90929</text:p>
          </table:table-cell>
          <table:table-cell table:style-name="ce2" table:number-columns-repeated="16382"/>
        </table:table-row>
        <table:table-row table:style-name="ro1">
          <table:table-cell office:value-type="float" office:value="410178" calcext:value-type="float">
            <text:p>410178</text:p>
          </table:table-cell>
          <table:table-cell office:value-type="float" office:value="36193" calcext:value-type="float">
            <text:p>36193</text:p>
          </table:table-cell>
          <table:table-cell table:style-name="ce2" table:number-columns-repeated="16382"/>
        </table:table-row>
        <table:table-row table:style-name="ro1">
          <table:table-cell office:value-type="float" office:value="410178" calcext:value-type="float">
            <text:p>410178</text:p>
          </table:table-cell>
          <table:table-cell office:value-type="float" office:value="89472" calcext:value-type="float">
            <text:p>89472</text:p>
          </table:table-cell>
          <table:table-cell table:style-name="ce2" table:number-columns-repeated="16382"/>
        </table:table-row>
        <table:table-row table:style-name="ro1">
          <table:table-cell office:value-type="float" office:value="410744" calcext:value-type="float">
            <text:p>410744</text:p>
          </table:table-cell>
          <table:table-cell office:value-type="float" office:value="94433" calcext:value-type="float">
            <text:p>94433</text:p>
          </table:table-cell>
          <table:table-cell table:style-name="ce2" table:number-columns-repeated="16382"/>
        </table:table-row>
        <table:table-row table:style-name="ro1">
          <table:table-cell office:value-type="float" office:value="412022" calcext:value-type="float">
            <text:p>412022</text:p>
          </table:table-cell>
          <table:table-cell office:value-type="float" office:value="95720" calcext:value-type="float">
            <text:p>95720</text:p>
          </table:table-cell>
          <table:table-cell table:style-name="ce2" table:number-columns-repeated="16382"/>
        </table:table-row>
        <table:table-row table:style-name="ro1">
          <table:table-cell office:value-type="float" office:value="414778" calcext:value-type="float">
            <text:p>414778</text:p>
          </table:table-cell>
          <table:table-cell office:value-type="float" office:value="96404" calcext:value-type="float">
            <text:p>96404</text:p>
          </table:table-cell>
          <table:table-cell table:style-name="ce2" table:number-columns-repeated="16382"/>
        </table:table-row>
        <table:table-row table:style-name="ro1">
          <table:table-cell office:value-type="float" office:value="416454" calcext:value-type="float">
            <text:p>416454</text:p>
          </table:table-cell>
          <table:table-cell office:value-type="float" office:value="99791" calcext:value-type="float">
            <text:p>99791</text:p>
          </table:table-cell>
          <table:table-cell table:style-name="ce2" table:number-columns-repeated="16382"/>
        </table:table-row>
        <table:table-row table:style-name="ro1">
          <table:table-cell office:value-type="float" office:value="419217" calcext:value-type="float">
            <text:p>419217</text:p>
          </table:table-cell>
          <table:table-cell office:value-type="float" office:value="102007" calcext:value-type="float">
            <text:p>102007</text:p>
          </table:table-cell>
          <table:table-cell table:style-name="ce2" table:number-columns-repeated="16382"/>
        </table:table-row>
        <table:table-row table:style-name="ro1">
          <table:table-cell office:value-type="float" office:value="425416" calcext:value-type="float">
            <text:p>425416</text:p>
          </table:table-cell>
          <table:table-cell office:value-type="float" office:value="84619" calcext:value-type="float">
            <text:p>84619</text:p>
          </table:table-cell>
          <table:table-cell table:style-name="ce2" table:number-columns-repeated="16382"/>
        </table:table-row>
        <table:table-row table:style-name="ro1">
          <table:table-cell office:value-type="float" office:value="425431" calcext:value-type="float">
            <text:p>425431</text:p>
          </table:table-cell>
          <table:table-cell office:value-type="float" office:value="104427" calcext:value-type="float">
            <text:p>104427</text:p>
          </table:table-cell>
          <table:table-cell table:style-name="ce2" table:number-columns-repeated="16382"/>
        </table:table-row>
        <table:table-row table:style-name="ro1">
          <table:table-cell office:value-type="float" office:value="429562" calcext:value-type="float">
            <text:p>429562</text:p>
          </table:table-cell>
          <table:table-cell office:value-type="float" office:value="108088" calcext:value-type="float">
            <text:p>108088</text:p>
          </table:table-cell>
          <table:table-cell table:style-name="ce2" table:number-columns-repeated="16382"/>
        </table:table-row>
        <table:table-row table:style-name="ro1">
          <table:table-cell office:value-type="float" office:value="436070" calcext:value-type="float">
            <text:p>436070</text:p>
          </table:table-cell>
          <table:table-cell office:value-type="float" office:value="113468" calcext:value-type="float">
            <text:p>113468</text:p>
          </table:table-cell>
          <table:table-cell table:style-name="ce2" table:number-columns-repeated="16382"/>
        </table:table-row>
        <table:table-row table:style-name="ro1">
          <table:table-cell office:value-type="float" office:value="436822" calcext:value-type="float">
            <text:p>436822</text:p>
          </table:table-cell>
          <table:table-cell office:value-type="float" office:value="104246" calcext:value-type="float">
            <text:p>104246</text:p>
          </table:table-cell>
          <table:table-cell table:style-name="ce2" table:number-columns-repeated="16382"/>
        </table:table-row>
        <table:table-row table:style-name="ro1">
          <table:table-cell office:value-type="float" office:value="436822" calcext:value-type="float">
            <text:p>436822</text:p>
          </table:table-cell>
          <table:table-cell office:value-type="float" office:value="112490" calcext:value-type="float">
            <text:p>112490</text:p>
          </table:table-cell>
          <table:table-cell table:style-name="ce2" table:number-columns-repeated="16382"/>
        </table:table-row>
        <table:table-row table:style-name="ro1">
          <table:table-cell office:value-type="float" office:value="437265" calcext:value-type="float">
            <text:p>437265</text:p>
          </table:table-cell>
          <table:table-cell office:value-type="float" office:value="114469" calcext:value-type="float">
            <text:p>114469</text:p>
          </table:table-cell>
          <table:table-cell table:style-name="ce2" table:number-columns-repeated="16382"/>
        </table:table-row>
        <table:table-row table:style-name="ro1">
          <table:table-cell office:value-type="float" office:value="442423" calcext:value-type="float">
            <text:p>442423</text:p>
          </table:table-cell>
          <table:table-cell office:value-type="float" office:value="118734" calcext:value-type="float">
            <text:p>118734</text:p>
          </table:table-cell>
          <table:table-cell table:style-name="ce2" table:number-columns-repeated="16382"/>
        </table:table-row>
        <table:table-row table:style-name="ro1">
          <table:table-cell office:value-type="float" office:value="464470" calcext:value-type="float">
            <text:p>464470</text:p>
          </table:table-cell>
          <table:table-cell office:value-type="float" office:value="136687" calcext:value-type="float">
            <text:p>136687</text:p>
          </table:table-cell>
          <table:table-cell table:style-name="ce2" table:number-columns-repeated="16382"/>
        </table:table-row>
        <table:table-row table:style-name="ro1">
          <table:table-cell office:value-type="float" office:value="463574" calcext:value-type="float">
            <text:p>463574</text:p>
          </table:table-cell>
          <table:table-cell office:value-type="float" office:value="135918" calcext:value-type="float">
            <text:p>135918</text:p>
          </table:table-cell>
          <table:table-cell table:style-name="ce2" table:number-columns-repeated="16382"/>
        </table:table-row>
        <table:table-row table:style-name="ro1">
          <table:table-cell office:value-type="float" office:value="457689" calcext:value-type="float">
            <text:p>457689</text:p>
          </table:table-cell>
          <table:table-cell office:value-type="float" office:value="131132" calcext:value-type="float">
            <text:p>131132</text:p>
          </table:table-cell>
          <table:table-cell table:style-name="ce2" table:number-columns-repeated="16382"/>
        </table:table-row>
        <table:table-row table:style-name="ro1">
          <table:table-cell office:value-type="float" office:value="459382" calcext:value-type="float">
            <text:p>459382</text:p>
          </table:table-cell>
          <table:table-cell office:value-type="float" office:value="132538" calcext:value-type="float">
            <text:p>132538</text:p>
          </table:table-cell>
          <table:table-cell table:style-name="ce2" table:number-columns-repeated="16382"/>
        </table:table-row>
        <table:table-row table:style-name="ro1">
          <table:table-cell office:value-type="float" office:value="451681" calcext:value-type="float">
            <text:p>451681</text:p>
          </table:table-cell>
          <table:table-cell office:value-type="float" office:value="125673" calcext:value-type="float">
            <text:p>125673</text:p>
          </table:table-cell>
          <table:table-cell table:style-name="ce2" table:number-columns-repeated="16382"/>
        </table:table-row>
        <table:table-row table:style-name="ro1" table:number-rows-repeated="1048218">
          <table:table-cell table:number-columns-repeated="2"/>
          <table:table-cell table:style-name="ce2" table:number-columns-repeated="16382"/>
        </table:table-row>
        <table:table-row table:style-name="ro1">
          <table:table-cell table:number-columns-repeated="2"/>
          <table:table-cell table:style-name="ce2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FILE_5f_GROUPS" style:display-name="PageStyle_PROFILE_GROUP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COUNTS" style:display-name="PageStyle_ACCOU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NSACTIONS" style:display-name="PageStyle_TRANSA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Basilis Papadopoulos</meta:initial-creator>
    <meta:creation-date>2015-06-05T18:17:20</meta:creation-date>
    <dc:date>2026-05-08T01:39:23.278353200</dc:date>
    <meta:generator>LibreOffice/25.2.7.2$Windows_X86_64 LibreOffice_project/5cbfd1ab6520636bb5f7b99185aa69bd7456825d</meta:generator>
    <meta:editing-duration>PT7H9M23S</meta:editing-duration>
    <meta:editing-cycles>1</meta:editing-cycles>
    <meta:document-statistic meta:table-count="3" meta:cell-count="3281" meta:object-count="0"/>
    <meta:user-defined meta:name="AppVersion">16.0300</meta:user-defined>
  </office:meta>
</office:document-meta>
</file>